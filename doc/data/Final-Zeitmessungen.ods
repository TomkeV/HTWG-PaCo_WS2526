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ptos Narrow" svg:font-family="&quot;Aptos Narrow&quot;"/>
    <style:font-face style:name="Liberation Sans" svg:font-family="&quot;Liberation Sans&quot;"/>
    <style:font-face style:name="Arial Unicode MS" svg:font-family="&quot;Arial Unicode M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4pt" style:font-size-asian="14pt" style:font-size-complex="14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/>
      <style:text-properties style:font-name="Aptos Narrow" style:font-name-asian="Aptos Narrow" style:font-name-complex="Aptos Narrow" style:font-family-generic="swiss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Aptos Narrow" style:font-name-asian="Aptos Narrow" style:font-name-complex="Aptos Narrow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ptos Narrow" style:font-name-asian="Aptos Narrow" style:font-name-complex="Aptos Narrow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4pt" style:font-size-asian="14pt" style:font-size-complex="14pt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Aptos Narrow" style:font-name-asian="Aptos Narrow" style:font-name-complex="Aptos Narrow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transparent"/>
      <style:text-properties fo:color="#666666" style:font-name="Aptos Narrow" style:font-name-asian="Aptos Narrow" style:font-name-complex="Aptos Narrow" style:font-family-generic="swiss"/>
    </style:style>
    <style:style style:name="ce9" style:family="table-cell" style:parent-style-name="Default" style:data-style-name="N0">
      <style:text-properties style:font-name="Aptos Narrow" style:font-name-asian="Aptos Narrow" style:font-name-complex="Aptos Narrow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ext-properties style:font-name="Aptos Narrow" style:font-name-asian="Aptos Narrow" style:font-name-complex="Aptos Narrow" style:font-family-generic="swiss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ptos Narrow" style:font-name-asian="Aptos Narrow" style:font-name-complex="Aptos Narrow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fo:background-color="transparent"/>
      <style:text-properties style:font-name="Arial Unicode MS" style:font-name-asian="Arial Unicode MS" style:font-name-complex="Arial Unicode MS"/>
    </style:style>
    <style:style style:name="ce13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automatic" fo:background-color="transparent"/>
      <style:text-properties fo:color="#FFFFFF" style:font-name="Aptos Narrow" style:font-name-asian="Aptos Narrow" style:font-name-complex="Aptos Narrow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/>
      <style:text-properties fo:color="#275317" style:font-name="Aptos Narrow" style:font-name-asian="Aptos Narrow" style:font-name-complex="Aptos Narrow" style:font-family-generic="swiss"/>
    </style:style>
    <style:style style:name="ce16" style:family="table-cell" style:parent-style-name="Default" style:data-style-name="N0">
      <style:table-cell-properties style:vertical-align="automatic" fo:background-color="transparent"/>
      <style:text-properties fo:color="#FF0000" style:font-name="Aptos Narrow" style:font-name-asian="Aptos Narrow" style:font-name-complex="Aptos Narrow" style:font-family-generic="swiss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ptos Narrow" style:font-name-asian="Aptos Narrow" style:font-name-complex="Aptos Narrow" fo:font-size="14pt" style:font-size-asian="14pt" style:font-size-complex="14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30729166666667cm" style:use-optimal-column-width="true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5.08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4.18041666666667cm" style:use-optimal-column-width="true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99520833333333cm" style:use-optimal-column-width="true"/>
    </style:style>
    <style:style style:name="co12" style:family="table-column">
      <style:table-column-properties fo:break-before="auto" style:column-width="2.54cm" style:use-optimal-column-width="true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4.18041666666667cm"/>
    </style:style>
    <style:style style:name="co16" style:family="table-column">
      <style:table-column-properties fo:break-before="auto" style:column-width="2.301875cm"/>
    </style:style>
    <style:style style:name="co17" style:family="table-column">
      <style:table-column-properties fo:break-before="auto" style:column-width="5.55625cm"/>
    </style:style>
    <style:style style:name="co18" style:family="table-column">
      <style:table-column-properties fo:break-before="auto" style:column-width="2.72520833333333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2225cm"/>
    </style:style>
    <style:style style:name="co21" style:family="table-column">
      <style:table-column-properties fo:break-before="auto" style:column-width="3.65125cm"/>
    </style:style>
    <style:style style:name="co22" style:family="table-column">
      <style:table-column-properties fo:break-before="auto" style:column-width="2.43416666666667cm"/>
    </style:style>
    <style:style style:name="co23" style:family="table-column">
      <style:table-column-properties fo:break-before="auto" style:column-width="2.48708333333333cm"/>
    </style:style>
    <style:style style:name="co24" style:family="table-column">
      <style:table-column-properties fo:break-before="auto" style:column-width="1.93145833333333cm"/>
    </style:style>
    <style:style style:name="co25" style:family="table-column">
      <style:table-column-properties fo:break-before="auto" style:column-width="4.10104166666667cm"/>
    </style:style>
    <style:style style:name="co26" style:family="table-column">
      <style:table-column-properties fo:break-before="auto" style:column-width="2.751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riell_iterativ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6374" table:default-cell-style-name="ce3"/>
        <table:table-row table:style-name="ro1">
          <table:table-cell office:value-type="string" table:number-columns-spanned="4" table:number-rows-spanned="1" table:style-name="ce19">
            <text:p>Zeitmessungen seriell-iterative Ausführung</text:p>
          </table:table-cell>
          <table:covered-table-cell table:number-columns-repeated="3"/>
          <table:table-cell table:number-columns-repeated="16380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4" table:number-rows-spanned="1" table:style-name="ce6">
            <text:p>Messwerte Thinkpad P15 Gen 2 (Tomke)</text:p>
          </table:table-cell>
          <table:covered-table-cell table:number-columns-repeated="3"/>
          <table:table-cell table:number-columns-repeated="16380" table:style-name="ce3"/>
        </table:table-row>
        <table:table-row table:style-name="ro2">
          <table:table-cell office:value-type="string" table:style-name="ce4">
            <text:p>Baumtiefe (Ebenen)</text:p>
          </table:table-cell>
          <table:table-cell office:value-type="string" table:number-columns-spanned="3" table:number-rows-spanned="1" table:style-name="ce7">
            <text:p>Aufgezeichnete Laufzeiten</text:p>
          </table:table-cell>
          <table:covered-table-cell table:number-columns-repeated="2"/>
          <table:table-cell table:number-columns-repeated="4" table:style-name="ce4"/>
          <table:table-cell office:value-type="string" table:style-name="ce5">
            <text:p>Mittelwert Laufzeit</text:p>
          </table:table-cell>
          <table:table-cell table:style-name="ce4"/>
          <table:table-cell table:number-columns-repeated="1637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SUM([.B5:.H5])/7" table:style-name="ce3">
            <text:p>0</text:p>
          </table:table-cell>
          <table:table-cell table:number-columns-repeated="16375" table:style-name="ce3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7.1428571428571429E-4" table:formula="of:=SUM([.B6:.H6])/7" table:style-name="ce3">
            <text:p>0,000714286</text:p>
          </table:table-cell>
          <table:table-cell table:number-columns-repeated="16375" table:style-name="ce3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.142857142857143E-3" table:formula="of:=SUM([.B7:.H7])/7" table:style-name="ce3">
            <text:p>0,002142857</text:p>
          </table:table-cell>
          <table:table-cell table:number-columns-repeated="16375" table:style-name="ce3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8.0000000000000002E-3" table:style-name="ce3">
            <text:p>0,008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8.0000000000000002E-3" table:style-name="ce3">
            <text:p>0,008</text:p>
          </table:table-cell>
          <table:table-cell office:value-type="float" office:value="8.0000000000000002E-3" table:style-name="ce3">
            <text:p>0,008</text:p>
          </table:table-cell>
          <table:table-cell office:value-type="float" office:value="7.4285714285714285E-3" table:formula="of:=SUM([.B8:.H8])/7" table:style-name="ce3">
            <text:p>0,007428571</text:p>
          </table:table-cell>
          <table:table-cell table:number-columns-repeated="16375" table:style-name="ce3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3.5000000000000003E-2" table:style-name="ce3">
            <text:p>0,035</text:p>
          </table:table-cell>
          <table:table-cell office:value-type="float" office:value="3.5999999999999997E-2" table:style-name="ce3">
            <text:p>0,036</text:p>
          </table:table-cell>
          <table:table-cell office:value-type="float" office:value="4.2999999999999997E-2" table:style-name="ce3">
            <text:p>0,043</text:p>
          </table:table-cell>
          <table:table-cell office:value-type="float" office:value="0.04" table:style-name="ce3">
            <text:p>0,04</text:p>
          </table:table-cell>
          <table:table-cell office:value-type="float" office:value="2.8000000000000001E-2" table:style-name="ce3">
            <text:p>0,028</text:p>
          </table:table-cell>
          <table:table-cell office:value-type="float" office:value="2.9000000000000001E-2" table:style-name="ce3">
            <text:p>0,029</text:p>
          </table:table-cell>
          <table:table-cell office:value-type="float" office:value="3.1E-2" table:style-name="ce3">
            <text:p>0,031</text:p>
          </table:table-cell>
          <table:table-cell office:value-type="float" office:value="3.4571428571428572E-2" table:formula="of:=SUM([.B9:.H9])/7" table:style-name="ce3">
            <text:p>0,034571429</text:p>
          </table:table-cell>
          <table:table-cell table:number-columns-repeated="16375" table:style-name="ce3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.187" table:style-name="ce3">
            <text:p>0,187</text:p>
          </table:table-cell>
          <table:table-cell office:value-type="float" office:value="0.121" table:style-name="ce3">
            <text:p>0,121</text:p>
          </table:table-cell>
          <table:table-cell office:value-type="float" office:value="0.14599999999999999" table:style-name="ce3">
            <text:p>0,146</text:p>
          </table:table-cell>
          <table:table-cell office:value-type="float" office:value="0.17699999999999999" table:style-name="ce3">
            <text:p>0,177</text:p>
          </table:table-cell>
          <table:table-cell office:value-type="float" office:value="0.20300000000000001" table:style-name="ce3">
            <text:p>0,203</text:p>
          </table:table-cell>
          <table:table-cell office:value-type="float" office:value="0.11899999999999999" table:style-name="ce3">
            <text:p>0,119</text:p>
          </table:table-cell>
          <table:table-cell office:value-type="float" office:value="0.13800000000000001" table:style-name="ce3">
            <text:p>0,138</text:p>
          </table:table-cell>
          <table:table-cell office:value-type="float" office:value="0.15585714285714289" table:formula="of:=SUM([.B10:.H10])/7" table:style-name="ce3">
            <text:p>0,155857143</text:p>
          </table:table-cell>
          <table:table-cell table:number-columns-repeated="16375" table:style-name="ce3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0.59699999999999998" table:style-name="ce3">
            <text:p>0,597</text:p>
          </table:table-cell>
          <table:table-cell office:value-type="float" office:value="0.61" table:style-name="ce3">
            <text:p>0,61</text:p>
          </table:table-cell>
          <table:table-cell office:value-type="float" office:value="0.59" table:style-name="ce3">
            <text:p>0,59</text:p>
          </table:table-cell>
          <table:table-cell office:value-type="float" office:value="0.63300000000000001" table:style-name="ce3">
            <text:p>0,633</text:p>
          </table:table-cell>
          <table:table-cell office:value-type="float" office:value="0.56899999999999995" table:style-name="ce3">
            <text:p>0,569</text:p>
          </table:table-cell>
          <table:table-cell office:value-type="float" office:value="0.64700000000000002" table:style-name="ce3">
            <text:p>0,647</text:p>
          </table:table-cell>
          <table:table-cell office:value-type="float" office:value="0.76700000000000002" table:style-name="ce3">
            <text:p>0,767</text:p>
          </table:table-cell>
          <table:table-cell office:value-type="float" office:value="0.63042857142857145" table:formula="of:=SUM([.B11:.H11])/7" table:style-name="ce3">
            <text:p>0,630428571</text:p>
          </table:table-cell>
          <table:table-cell table:number-columns-repeated="16375" table:style-name="ce3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.8820000000000001" table:style-name="ce3">
            <text:p>2,882</text:p>
          </table:table-cell>
          <table:table-cell office:value-type="float" office:value="2.4630000000000001" table:style-name="ce3">
            <text:p>2,463</text:p>
          </table:table-cell>
          <table:table-cell office:value-type="float" office:value="2.3109999999999999" table:style-name="ce3">
            <text:p>2,311</text:p>
          </table:table-cell>
          <table:table-cell office:value-type="float" office:value="2.3490000000000002" table:style-name="ce3">
            <text:p>2,349</text:p>
          </table:table-cell>
          <table:table-cell office:value-type="float" office:value="2.085" table:style-name="ce3">
            <text:p>2,085</text:p>
          </table:table-cell>
          <table:table-cell office:value-type="float" office:value="2.2589999999999999" table:style-name="ce3">
            <text:p>2,259</text:p>
          </table:table-cell>
          <table:table-cell office:value-type="float" office:value="2.6859999999999999" table:style-name="ce3">
            <text:p>2,686</text:p>
          </table:table-cell>
          <table:table-cell office:value-type="float" office:value="2.4335714285714287" table:formula="of:=SUM([.B12:.H12])/7" table:style-name="ce3">
            <text:p>2,433571429</text:p>
          </table:table-cell>
          <table:table-cell table:number-columns-repeated="16375" table:style-name="ce3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0.11" table:style-name="ce3">
            <text:p>20,11</text:p>
          </table:table-cell>
          <table:table-cell office:value-type="float" office:value="20.29" table:style-name="ce3">
            <text:p>20,29</text:p>
          </table:table-cell>
          <table:table-cell office:value-type="float" office:value="8.0449999999999999" table:style-name="ce3">
            <text:p>8,045</text:p>
          </table:table-cell>
          <table:table-cell office:value-type="float" office:value="20.59" table:style-name="ce3">
            <text:p>20,59</text:p>
          </table:table-cell>
          <table:table-cell office:value-type="float" office:value="20.759" table:style-name="ce3">
            <text:p>20,759</text:p>
          </table:table-cell>
          <table:table-cell office:value-type="float" office:value="11.824" table:style-name="ce3">
            <text:p>11,824</text:p>
          </table:table-cell>
          <table:table-cell office:value-type="float" office:value="21" table:style-name="ce3">
            <text:p>21</text:p>
          </table:table-cell>
          <table:table-cell office:value-type="float" office:value="17.516857142857141" table:formula="of:=SUM([.B13:.H13])/7" table:style-name="ce3">
            <text:p>17,51685714</text:p>
          </table:table-cell>
          <table:table-cell table:number-columns-repeated="16375" table:style-name="ce3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">
            <text:p>Messwerte ASUS ZenBook 13 (Sofie)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office:value-type="string" table:style-name="ce4">
            <text:p>Baumtiefe (Ebenen)</text:p>
          </table:table-cell>
          <table:table-cell office:value-type="string" table:style-name="ce4">
            <text:p>Aufgezeichnete Laufzeiten</text:p>
          </table:table-cell>
          <table:table-cell table:number-columns-repeated="6" table:style-name="ce4"/>
          <table:table-cell office:value-type="string" table:style-name="ce4">
            <text:p>Mittelwert Laufzeit</text:p>
          </table:table-cell>
          <table:table-cell table:style-name="ce4"/>
          <table:table-cell table:number-columns-repeated="1637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4285714285714287E-4" table:formula="of:=SUM([.B18:.H18])/7" table:style-name="ce3">
            <text:p>0,000142857</text:p>
          </table:table-cell>
          <table:table-cell table:number-columns-repeated="16375" table:style-name="ce3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5.7142857142857147E-4" table:formula="of:=SUM([.B19:.H19])/7" table:style-name="ce3">
            <text:p>0,000571429</text:p>
          </table:table-cell>
          <table:table-cell table:number-columns-repeated="16375" table:style-name="ce3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1E-3" table:style-name="ce3">
            <text:p>0,001</text:p>
          </table:table-cell>
          <table:table-cell office:value-type="float" office:value="2E-3" table:style-name="ce3">
            <text:p>0,002</text:p>
          </table:table-cell>
          <table:table-cell office:value-type="float" office:value="1.8571428571428571E-3" table:formula="of:=SUM([.B20:.H20])/7" table:style-name="ce3">
            <text:p>0,001857143</text:p>
          </table:table-cell>
          <table:table-cell table:number-columns-repeated="16375" table:style-name="ce3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6.0000000000000001E-3" table:style-name="ce3">
            <text:p>0,006</text:p>
          </table:table-cell>
          <table:table-cell office:value-type="float" office:value="6.0000000000000001E-3" table:style-name="ce3">
            <text:p>0,006</text:p>
          </table:table-cell>
          <table:table-cell office:value-type="float" office:value="6.0000000000000001E-3" table:style-name="ce3">
            <text:p>0,006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6.5714285714285709E-3" table:formula="of:=SUM([.B21:.H21])/7" table:style-name="ce3">
            <text:p>0,006571429</text:p>
          </table:table-cell>
          <table:table-cell table:number-columns-repeated="16375" table:style-name="ce3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.4E-2" table:style-name="ce3">
            <text:p>0,024</text:p>
          </table:table-cell>
          <table:table-cell office:value-type="float" office:value="2.4E-2" table:style-name="ce3">
            <text:p>0,024</text:p>
          </table:table-cell>
          <table:table-cell office:value-type="float" office:value="2.5000000000000001E-2" table:style-name="ce3">
            <text:p>0,025</text:p>
          </table:table-cell>
          <table:table-cell office:value-type="float" office:value="2.4E-2" table:style-name="ce3">
            <text:p>0,024</text:p>
          </table:table-cell>
          <table:table-cell office:value-type="float" office:value="2.5000000000000001E-2" table:style-name="ce3">
            <text:p>0,025</text:p>
          </table:table-cell>
          <table:table-cell office:value-type="float" office:value="2.4E-2" table:style-name="ce3">
            <text:p>0,024</text:p>
          </table:table-cell>
          <table:table-cell office:value-type="float" office:value="2.4E-2" table:style-name="ce3">
            <text:p>0,024</text:p>
          </table:table-cell>
          <table:table-cell office:value-type="float" office:value="2.4285714285714282E-2" table:formula="of:=SUM([.B22:.H22])/7" table:style-name="ce3">
            <text:p>0,024285714</text:p>
          </table:table-cell>
          <table:table-cell table:number-columns-repeated="16375" table:style-name="ce3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9.5000000000000001E-2" table:style-name="ce3">
            <text:p>0,095</text:p>
          </table:table-cell>
          <table:table-cell office:value-type="float" office:value="9.5000000000000001E-2" table:style-name="ce3">
            <text:p>0,095</text:p>
          </table:table-cell>
          <table:table-cell office:value-type="float" office:value="9.5000000000000001E-2" table:style-name="ce3">
            <text:p>0,095</text:p>
          </table:table-cell>
          <table:table-cell office:value-type="float" office:value="9.6000000000000002E-2" table:style-name="ce3">
            <text:p>0,096</text:p>
          </table:table-cell>
          <table:table-cell office:value-type="float" office:value="9.6000000000000002E-2" table:style-name="ce3">
            <text:p>0,096</text:p>
          </table:table-cell>
          <table:table-cell office:value-type="float" office:value="9.5000000000000001E-2" table:style-name="ce3">
            <text:p>0,095</text:p>
          </table:table-cell>
          <table:table-cell office:value-type="float" office:value="9.5000000000000001E-2" table:style-name="ce3">
            <text:p>0,095</text:p>
          </table:table-cell>
          <table:table-cell office:value-type="float" office:value="9.5285714285714279E-2" table:formula="of:=SUM([.B23:.H23])/7" table:style-name="ce3">
            <text:p>0,095285714</text:p>
          </table:table-cell>
          <table:table-cell table:number-columns-repeated="16375" table:style-name="ce3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0.375" table:style-name="ce3">
            <text:p>0,375</text:p>
          </table:table-cell>
          <table:table-cell office:value-type="float" office:value="0.38400000000000001" table:style-name="ce3">
            <text:p>0,384</text:p>
          </table:table-cell>
          <table:table-cell office:value-type="float" office:value="0.374" table:style-name="ce3">
            <text:p>0,374</text:p>
          </table:table-cell>
          <table:table-cell office:value-type="float" office:value="0.376" table:style-name="ce3">
            <text:p>0,376</text:p>
          </table:table-cell>
          <table:table-cell office:value-type="float" office:value="0.38500000000000001" table:style-name="ce3">
            <text:p>0,385</text:p>
          </table:table-cell>
          <table:table-cell office:value-type="float" office:value="0.372" table:style-name="ce3">
            <text:p>0,372</text:p>
          </table:table-cell>
          <table:table-cell office:value-type="float" office:value="0.372" table:style-name="ce3">
            <text:p>0,372</text:p>
          </table:table-cell>
          <table:table-cell office:value-type="float" office:value="0.37685714285714284" table:formula="of:=SUM([.B24:.H24])/7" table:style-name="ce3">
            <text:p>0,376857143</text:p>
          </table:table-cell>
          <table:table-cell table:number-columns-repeated="16375" table:style-name="ce3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.542" table:style-name="ce3">
            <text:p>1,542</text:p>
          </table:table-cell>
          <table:table-cell office:value-type="float" office:value="1.5509999999999999" table:style-name="ce3">
            <text:p>1,551</text:p>
          </table:table-cell>
          <table:table-cell office:value-type="float" office:value="1.5549999999999999" table:style-name="ce3">
            <text:p>1,555</text:p>
          </table:table-cell>
          <table:table-cell office:value-type="float" office:value="1.579" table:style-name="ce3">
            <text:p>1,579</text:p>
          </table:table-cell>
          <table:table-cell office:value-type="float" office:value="1.514" table:style-name="ce3">
            <text:p>1,514</text:p>
          </table:table-cell>
          <table:table-cell office:value-type="float" office:value="1.516" table:style-name="ce3">
            <text:p>1,516</text:p>
          </table:table-cell>
          <table:table-cell office:value-type="float" office:value="1.512" table:style-name="ce3">
            <text:p>1,512</text:p>
          </table:table-cell>
          <table:table-cell office:value-type="float" office:value="1.5384285714285715" table:formula="of:=SUM([.B25:.H25])/7" table:style-name="ce3">
            <text:p>1,538428571</text:p>
          </table:table-cell>
          <table:table-cell table:number-columns-repeated="16375" table:style-name="ce3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6.0039999999999996" table:style-name="ce3">
            <text:p>6,004</text:p>
          </table:table-cell>
          <table:table-cell office:value-type="float" office:value="6.04" table:style-name="ce3">
            <text:p>6,04</text:p>
          </table:table-cell>
          <table:table-cell office:value-type="float" office:value="6.0229999999999997" table:style-name="ce3">
            <text:p>6,023</text:p>
          </table:table-cell>
          <table:table-cell office:value-type="float" office:value="6.0389999999999997" table:style-name="ce3">
            <text:p>6,039</text:p>
          </table:table-cell>
          <table:table-cell office:value-type="float" office:value="6.0190000000000001" table:style-name="ce3">
            <text:p>6,019</text:p>
          </table:table-cell>
          <table:table-cell office:value-type="float" office:value="6.02" table:style-name="ce3">
            <text:p>6,02</text:p>
          </table:table-cell>
          <table:table-cell office:value-type="float" office:value="6.0039999999999996" table:style-name="ce3">
            <text:p>6,004</text:p>
          </table:table-cell>
          <table:table-cell office:value-type="float" office:value="6.021285714285713" table:formula="of:=SUM([.B26:.H26])/7" table:style-name="ce3">
            <text:p>6,021285714</text:p>
          </table:table-cell>
          <table:table-cell table:number-columns-repeated="16375" table:style-name="ce3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">
            <text:p>Messwerte Thinkpad P14s Gen 1 (Patrick)</text:p>
          </table:table-cell>
          <table:table-cell table:number-columns-repeated="3" table:style-name="ce2"/>
          <table:table-cell table:number-columns-repeated="16380" table:style-name="ce3"/>
        </table:table-row>
        <table:table-row table:style-name="ro2">
          <table:table-cell office:value-type="string" table:style-name="ce5">
            <text:p>Baumtiefe (Ebenen)</text:p>
          </table:table-cell>
          <table:table-cell office:value-type="string" table:style-name="ce4">
            <text:p>Aufgezeichnete Laufzeiten</text:p>
          </table:table-cell>
          <table:table-cell table:number-columns-repeated="6" table:style-name="ce4"/>
          <table:table-cell office:value-type="string" table:style-name="ce4">
            <text:p>Mittelwert Laufzeit</text:p>
          </table:table-cell>
          <table:table-cell table:style-name="ce4"/>
          <table:table-cell table:number-columns-repeated="1637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3.8200000000000002E-4" table:style-name="ce3">
            <text:p>0,000382</text:p>
          </table:table-cell>
          <table:table-cell office:value-type="float" office:value="3.77E-4" table:style-name="ce3">
            <text:p>0,000377</text:p>
          </table:table-cell>
          <table:table-cell office:value-type="float" office:value="7.1900000000000002E-4" table:style-name="ce3">
            <text:p>0,000719</text:p>
          </table:table-cell>
          <table:table-cell office:value-type="float" office:value="3.8099999999999999E-4" table:style-name="ce3">
            <text:p>0,000381</text:p>
          </table:table-cell>
          <table:table-cell office:value-type="float" office:value="3.8099999999999999E-4" table:style-name="ce3">
            <text:p>0,000381</text:p>
          </table:table-cell>
          <table:table-cell office:value-type="float" office:value="3.8200000000000002E-4" table:style-name="ce3">
            <text:p>0,000382</text:p>
          </table:table-cell>
          <table:table-cell office:value-type="float" office:value="3.8400000000000001E-4" table:style-name="ce3">
            <text:p>0,000384</text:p>
          </table:table-cell>
          <table:table-cell office:value-type="float" office:value="4.2942857142857144E-4" table:formula="of:=SUM([.B31:.H31])/7" table:style-name="ce3">
            <text:p>0,000429429</text:p>
          </table:table-cell>
          <table:table-cell table:number-columns-repeated="16375" table:style-name="ce3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.387E-3" table:style-name="ce3">
            <text:p>0,001387</text:p>
          </table:table-cell>
          <table:table-cell office:value-type="float" office:value="1.7329999999999999E-3" table:style-name="ce3">
            <text:p>0,001733</text:p>
          </table:table-cell>
          <table:table-cell office:value-type="float" office:value="1.4859999999999999E-3" table:style-name="ce3">
            <text:p>0,001486</text:p>
          </table:table-cell>
          <table:table-cell office:value-type="float" office:value="1.537E-3" table:style-name="ce3">
            <text:p>0,001537</text:p>
          </table:table-cell>
          <table:table-cell office:value-type="float" office:value="1.477E-3" table:style-name="ce3">
            <text:p>0,001477</text:p>
          </table:table-cell>
          <table:table-cell office:value-type="float" office:value="1.361E-3" table:style-name="ce3">
            <text:p>0,001361</text:p>
          </table:table-cell>
          <table:table-cell office:value-type="float" office:value="1.9840000000000001E-3" table:style-name="ce3">
            <text:p>0,001984</text:p>
          </table:table-cell>
          <table:table-cell office:value-type="float" office:value="1.5664285714285713E-3" table:formula="of:=SUM([.B32:.H32])/7" table:style-name="ce3">
            <text:p>0,001566429</text:p>
          </table:table-cell>
          <table:table-cell table:number-columns-repeated="16375" table:style-name="ce3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5.4050000000000001E-3" table:style-name="ce3">
            <text:p>0,005405</text:p>
          </table:table-cell>
          <table:table-cell office:value-type="float" office:value="5.1590000000000004E-3" table:style-name="ce3">
            <text:p>0,005159</text:p>
          </table:table-cell>
          <table:table-cell office:value-type="float" office:value="6.6470000000000001E-3" table:style-name="ce3">
            <text:p>0,006647</text:p>
          </table:table-cell>
          <table:table-cell office:value-type="float" office:value="5.8809999999999999E-3" table:style-name="ce3">
            <text:p>0,005881</text:p>
          </table:table-cell>
          <table:table-cell office:value-type="float" office:value="5.8690000000000001E-3" table:style-name="ce3">
            <text:p>0,005869</text:p>
          </table:table-cell>
          <table:table-cell office:value-type="float" office:value="5.8279999999999998E-3" table:style-name="ce3">
            <text:p>0,005828</text:p>
          </table:table-cell>
          <table:table-cell office:value-type="float" office:value="4.8399999999999997E-3" table:style-name="ce3">
            <text:p>0,00484</text:p>
          </table:table-cell>
          <table:table-cell office:value-type="float" office:value="5.6612857142857142E-3" table:formula="of:=SUM([.B33:.H33])/7" table:style-name="ce3">
            <text:p>0,005661286</text:p>
          </table:table-cell>
          <table:table-cell table:number-columns-repeated="16375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.8037999999999998E-2" table:style-name="ce3">
            <text:p>0,018038</text:p>
          </table:table-cell>
          <table:table-cell office:value-type="float" office:value="1.8290000000000001E-2" table:style-name="ce3">
            <text:p>0,01829</text:p>
          </table:table-cell>
          <table:table-cell office:value-type="float" office:value="1.8294000000000001E-2" table:style-name="ce3">
            <text:p>0,018294</text:p>
          </table:table-cell>
          <table:table-cell office:value-type="float" office:value="1.8461000000000002E-2" table:style-name="ce3">
            <text:p>0,018461</text:p>
          </table:table-cell>
          <table:table-cell office:value-type="float" office:value="1.8939999999999999E-2" table:style-name="ce3">
            <text:p>0,01894</text:p>
          </table:table-cell>
          <table:table-cell office:value-type="float" office:value="1.9501999999999999E-2" table:style-name="ce3">
            <text:p>0,019502</text:p>
          </table:table-cell>
          <table:table-cell office:value-type="float" office:value="2.1031999999999999E-2" table:style-name="ce3">
            <text:p>0,021032</text:p>
          </table:table-cell>
          <table:table-cell office:value-type="float" office:value="1.8936714285714286E-2" table:formula="of:=SUM([.B34:.H34])/7" table:style-name="ce3">
            <text:p>0,018936714</text:p>
          </table:table-cell>
          <table:table-cell table:number-columns-repeated="16375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7.0648000000000002E-2" table:style-name="ce3">
            <text:p>0,070648</text:p>
          </table:table-cell>
          <table:table-cell office:value-type="float" office:value="8.6629999999999999E-2" table:style-name="ce3">
            <text:p>0,08663</text:p>
          </table:table-cell>
          <table:table-cell office:value-type="float" office:value="7.4021000000000003E-2" table:style-name="ce3">
            <text:p>0,074021</text:p>
          </table:table-cell>
          <table:table-cell office:value-type="float" office:value="7.6621999999999996E-2" table:style-name="ce3">
            <text:p>0,076622</text:p>
          </table:table-cell>
          <table:table-cell office:value-type="float" office:value="7.4314000000000005E-2" table:style-name="ce3">
            <text:p>0,074314</text:p>
          </table:table-cell>
          <table:table-cell office:value-type="float" office:value="7.3810000000000001E-2" table:style-name="ce3">
            <text:p>0,07381</text:p>
          </table:table-cell>
          <table:table-cell office:value-type="float" office:value="7.4853000000000003E-2" table:style-name="ce3">
            <text:p>0,074853</text:p>
          </table:table-cell>
          <table:table-cell office:value-type="float" office:value="7.5842571428571426E-2" table:formula="of:=SUM([.B35:.H35])/7" table:style-name="ce3">
            <text:p>0,075842571</text:p>
          </table:table-cell>
          <table:table-cell table:number-columns-repeated="16375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.28134300000000001" table:style-name="ce3">
            <text:p>0,281343</text:p>
          </table:table-cell>
          <table:table-cell office:value-type="float" office:value="0.29369600000000001" table:style-name="ce3">
            <text:p>0,293696</text:p>
          </table:table-cell>
          <table:table-cell office:value-type="float" office:value="0.31811200000000001" table:style-name="ce3">
            <text:p>0,318112</text:p>
          </table:table-cell>
          <table:table-cell office:value-type="float" office:value="0.28829399999999999" table:style-name="ce3">
            <text:p>0,288294</text:p>
          </table:table-cell>
          <table:table-cell office:value-type="float" office:value="0.28693099999999999" table:style-name="ce3">
            <text:p>0,286931</text:p>
          </table:table-cell>
          <table:table-cell office:value-type="float" office:value="0.28564699999999998" table:style-name="ce3">
            <text:p>0,285647</text:p>
          </table:table-cell>
          <table:table-cell office:value-type="float" office:value="0.28504099999999999" table:style-name="ce3">
            <text:p>0,285041</text:p>
          </table:table-cell>
          <table:table-cell office:value-type="float" office:value="0.29129485714285719" table:formula="of:=SUM([.B36:.H36])/7" table:style-name="ce3">
            <text:p>0,291294857</text:p>
          </table:table-cell>
          <table:table-cell table:number-columns-repeated="16375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.12036" table:style-name="ce3">
            <text:p>1,12036</text:p>
          </table:table-cell>
          <table:table-cell office:value-type="float" office:value="1.1257299999999999" table:style-name="ce3">
            <text:p>1,12573</text:p>
          </table:table-cell>
          <table:table-cell office:value-type="float" office:value="1.1298900000000001" table:style-name="ce3">
            <text:p>1,12989</text:p>
          </table:table-cell>
          <table:table-cell office:value-type="float" office:value="1.11883" table:style-name="ce3">
            <text:p>1,11883</text:p>
          </table:table-cell>
          <table:table-cell office:value-type="float" office:value="1.1147800000000001" table:style-name="ce3">
            <text:p>1,11478</text:p>
          </table:table-cell>
          <table:table-cell office:value-type="float" office:value="1.11459" table:style-name="ce3">
            <text:p>1,11459</text:p>
          </table:table-cell>
          <table:table-cell office:value-type="float" office:value="1.1143700000000001" table:style-name="ce3">
            <text:p>1,11437</text:p>
          </table:table-cell>
          <table:table-cell office:value-type="float" office:value="1.119792857142857" table:formula="of:=SUM([.B37:.H37])/7" table:style-name="ce3">
            <text:p>1,119792857</text:p>
          </table:table-cell>
          <table:table-cell table:number-columns-repeated="16375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4.4406400000000001" table:style-name="ce3">
            <text:p>4,44064</text:p>
          </table:table-cell>
          <table:table-cell office:value-type="float" office:value="4.5031999999999996" table:style-name="ce3">
            <text:p>4,5032</text:p>
          </table:table-cell>
          <table:table-cell office:value-type="float" office:value="4.4329099999999997" table:style-name="ce3">
            <text:p>4,43291</text:p>
          </table:table-cell>
          <table:table-cell office:value-type="float" office:value="4.5057600000000004" table:style-name="ce3">
            <text:p>4,50576</text:p>
          </table:table-cell>
          <table:table-cell office:value-type="float" office:value="4.5552200000000003" table:style-name="ce3">
            <text:p>4,55522</text:p>
          </table:table-cell>
          <table:table-cell office:value-type="float" office:value="4.4192400000000003" table:style-name="ce3">
            <text:p>4,41924</text:p>
          </table:table-cell>
          <table:table-cell office:value-type="float" office:value="4.4505499999999998" table:style-name="ce3">
            <text:p>4,45055</text:p>
          </table:table-cell>
          <table:table-cell office:value-type="float" office:value="4.4725028571428576" table:formula="of:=SUM([.B38:.H38])/7" table:style-name="ce3">
            <text:p>4,472502857</text:p>
          </table:table-cell>
          <table:table-cell table:number-columns-repeated="16375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8.026599999999998" table:style-name="ce3">
            <text:p>18,0266</text:p>
          </table:table-cell>
          <table:table-cell office:value-type="float" office:value="17.978999999999999" table:style-name="ce3">
            <text:p>17,979</text:p>
          </table:table-cell>
          <table:table-cell office:value-type="float" office:value="17.6798" table:style-name="ce3">
            <text:p>17,6798</text:p>
          </table:table-cell>
          <table:table-cell office:value-type="float" office:value="18.048999999999999" table:style-name="ce3">
            <text:p>18,049</text:p>
          </table:table-cell>
          <table:table-cell office:value-type="float" office:value="18.046800000000001" table:style-name="ce3">
            <text:p>18,0468</text:p>
          </table:table-cell>
          <table:table-cell office:value-type="float" office:value="18.045300000000001" table:style-name="ce3">
            <text:p>18,0453</text:p>
          </table:table-cell>
          <table:table-cell office:value-type="float" office:value="17.675799999999999" table:style-name="ce3">
            <text:p>17,6758</text:p>
          </table:table-cell>
          <table:table-cell office:value-type="float" office:value="17.928899999999999" table:formula="of:=SUM([.B39:.H39])/7" table:style-name="ce3">
            <text:p>17,9289</text:p>
          </table:table-cell>
          <table:table-cell table:number-columns-repeated="16375"/>
        </table:table-row>
        <table:table-row table:number-rows-repeated="1048537" table:style-name="ro2">
          <table:table-cell table:number-columns-repeated="16384"/>
        </table:table-row>
      </table:table>
      <table:table table:name="Parallel_OMP" table:style-name="ta1">
        <table:table-column table:style-name="co5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6" table:default-cell-style-name="ce3"/>
        <table:table-column table:style-name="co2" table:number-columns-repeated="16374" table:default-cell-style-name="ce3"/>
        <table:table-row table:style-name="ro1">
          <table:table-cell office:value-type="string" table:number-columns-spanned="5" table:number-rows-spanned="1" table:style-name="ce19">
            <text:p>Zeitmessungen OpenMP-parallelisierte Ausführung</text:p>
          </table:table-cell>
          <table:covered-table-cell table:number-columns-repeated="4"/>
          <table:table-cell table:number-columns-repeated="16379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4" table:number-rows-spanned="1" table:style-name="ce6">
            <text:p>Messwerte Thinkpad P15 Gen 2 (Tomke)</text:p>
          </table:table-cell>
          <table:covered-table-cell table:number-columns-repeated="3"/>
          <table:table-cell table:number-columns-repeated="16380" table:style-name="ce3"/>
        </table:table-row>
        <table:table-row table:style-name="ro2">
          <table:table-cell office:value-type="string" table:style-name="ce4">
            <text:p>Baumtiefe (Ebenen)</text:p>
          </table:table-cell>
          <table:table-cell office:value-type="string" table:number-columns-spanned="3" table:number-rows-spanned="1" table:style-name="ce7">
            <text:p>Aufgezeichnete Laufzeiten</text:p>
          </table:table-cell>
          <table:covered-table-cell table:number-columns-repeated="2"/>
          <table:table-cell table:number-columns-repeated="4" table:style-name="ce4"/>
          <table:table-cell office:value-type="string" table:style-name="ce4">
            <text:p>Mittelwert Laufzeit</text:p>
          </table:table-cell>
          <table:table-cell table:style-name="ce4"/>
          <table:table-cell table:number-columns-repeated="1637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2E-3" table:style-name="ce3">
            <text:p>0,002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2E-3" table:style-name="ce3">
            <text:p>0,002</text:p>
          </table:table-cell>
          <table:table-cell office:value-type="float" office:value="1E-3" table:style-name="ce3">
            <text:p>0,001</text:p>
          </table:table-cell>
          <table:table-cell office:value-type="float" office:value="1.2857142857142859E-3" table:formula="of:=SUM([.B5:.H5])/7" table:style-name="ce3">
            <text:p>0,001285714</text:p>
          </table:table-cell>
          <table:table-cell table:number-columns-repeated="16375" table:style-name="ce3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1.7142857142857144E-3" table:formula="of:=SUM([.B6:.H6])/7" table:style-name="ce3">
            <text:p>0,001714286</text:p>
          </table:table-cell>
          <table:table-cell table:number-columns-repeated="16375" table:style-name="ce3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formula="of:=SUM([.B7:.H7])/7" table:style-name="ce3">
            <text:p>0,002</text:p>
          </table:table-cell>
          <table:table-cell table:number-columns-repeated="16375" table:style-name="ce3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3.5714285714285718E-3" table:formula="of:=SUM([.B8:.H8])/7" table:style-name="ce3">
            <text:p>0,003571429</text:p>
          </table:table-cell>
          <table:table-cell table:number-columns-repeated="16375" table:style-name="ce3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8.0000000000000002E-3" table:style-name="ce3">
            <text:p>0,008</text:p>
          </table:table-cell>
          <table:table-cell office:value-type="float" office:value="0.01" table:style-name="ce3">
            <text:p>0,01</text:p>
          </table:table-cell>
          <table:table-cell office:value-type="float" office:value="8.9999999999999993E-3" table:style-name="ce3">
            <text:p>0,009</text:p>
          </table:table-cell>
          <table:table-cell office:value-type="float" office:value="0.01" table:style-name="ce3">
            <text:p>0,01</text:p>
          </table:table-cell>
          <table:table-cell office:value-type="float" office:value="0.01" table:style-name="ce3">
            <text:p>0,01</text:p>
          </table:table-cell>
          <table:table-cell office:value-type="float" office:value="0.01" table:style-name="ce3">
            <text:p>0,01</text:p>
          </table:table-cell>
          <table:table-cell office:value-type="float" office:value="0.01" table:style-name="ce3">
            <text:p>0,01</text:p>
          </table:table-cell>
          <table:table-cell office:value-type="float" office:value="9.5714285714285727E-3" table:formula="of:=SUM([.B9:.H9])/7" table:style-name="ce3">
            <text:p>0,009571429</text:p>
          </table:table-cell>
          <table:table-cell table:number-columns-repeated="16375" table:style-name="ce3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.03" table:style-name="ce3">
            <text:p>0,03</text:p>
          </table:table-cell>
          <table:table-cell office:value-type="float" office:value="2.9000000000000001E-2" table:style-name="ce3">
            <text:p>0,029</text:p>
          </table:table-cell>
          <table:table-cell office:value-type="float" office:value="2.9000000000000001E-2" table:style-name="ce3">
            <text:p>0,029</text:p>
          </table:table-cell>
          <table:table-cell office:value-type="float" office:value="2.7E-2" table:style-name="ce3">
            <text:p>0,027</text:p>
          </table:table-cell>
          <table:table-cell office:value-type="float" office:value="2.8000000000000001E-2" table:style-name="ce3">
            <text:p>0,028</text:p>
          </table:table-cell>
          <table:table-cell office:value-type="float" office:value="2.7E-2" table:style-name="ce3">
            <text:p>0,027</text:p>
          </table:table-cell>
          <table:table-cell office:value-type="float" office:value="2.8000000000000001E-2" table:style-name="ce3">
            <text:p>0,028</text:p>
          </table:table-cell>
          <table:table-cell office:value-type="float" office:value="2.8285714285714282E-2" table:formula="of:=SUM([.B10:.H10])/7" table:style-name="ce3">
            <text:p>0,028285714</text:p>
          </table:table-cell>
          <table:table-cell table:number-columns-repeated="16375" table:style-name="ce3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0.105" table:style-name="ce3">
            <text:p>0,105</text:p>
          </table:table-cell>
          <table:table-cell office:value-type="float" office:value="9.9000000000000005E-2" table:style-name="ce3">
            <text:p>0,099</text:p>
          </table:table-cell>
          <table:table-cell office:value-type="float" office:value="9.4E-2" table:style-name="ce3">
            <text:p>0,094</text:p>
          </table:table-cell>
          <table:table-cell office:value-type="float" office:value="0.1" table:style-name="ce3">
            <text:p>0,1</text:p>
          </table:table-cell>
          <table:table-cell office:value-type="float" office:value="9.0999999999999998E-2" table:style-name="ce3">
            <text:p>0,091</text:p>
          </table:table-cell>
          <table:table-cell office:value-type="float" office:value="0.104" table:style-name="ce3">
            <text:p>0,104</text:p>
          </table:table-cell>
          <table:table-cell office:value-type="float" office:value="9.4E-2" table:style-name="ce3">
            <text:p>0,094</text:p>
          </table:table-cell>
          <table:table-cell office:value-type="float" office:value="9.8142857142857129E-2" table:formula="of:=SUM([.B11:.H11])/7" table:style-name="ce3">
            <text:p>0,098142857</text:p>
          </table:table-cell>
          <table:table-cell table:number-columns-repeated="16375" table:style-name="ce3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0.31900000000000001" table:style-name="ce3">
            <text:p>0,319</text:p>
          </table:table-cell>
          <table:table-cell office:value-type="float" office:value="0.32700000000000001" table:style-name="ce3">
            <text:p>0,327</text:p>
          </table:table-cell>
          <table:table-cell office:value-type="float" office:value="0.36599999999999999" table:style-name="ce3">
            <text:p>0,366</text:p>
          </table:table-cell>
          <table:table-cell office:value-type="float" office:value="0.39500000000000002" table:style-name="ce3">
            <text:p>0,395</text:p>
          </table:table-cell>
          <table:table-cell office:value-type="float" office:value="0.38" table:style-name="ce3">
            <text:p>0,38</text:p>
          </table:table-cell>
          <table:table-cell office:value-type="float" office:value="0.38600000000000001" table:style-name="ce3">
            <text:p>0,386</text:p>
          </table:table-cell>
          <table:table-cell office:value-type="float" office:value="0.38300000000000001" table:style-name="ce3">
            <text:p>0,383</text:p>
          </table:table-cell>
          <table:table-cell office:value-type="float" office:value="0.36514285714285716" table:formula="of:=SUM([.B12:.H12])/7" table:style-name="ce3">
            <text:p>0,365142857</text:p>
          </table:table-cell>
          <table:table-cell table:number-columns-repeated="16375" table:style-name="ce3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.3720000000000001" table:style-name="ce3">
            <text:p>1,372</text:p>
          </table:table-cell>
          <table:table-cell office:value-type="float" office:value="1.2709999999999999" table:style-name="ce3">
            <text:p>1,271</text:p>
          </table:table-cell>
          <table:table-cell office:value-type="float" office:value="1.302" table:style-name="ce3">
            <text:p>1,302</text:p>
          </table:table-cell>
          <table:table-cell office:value-type="float" office:value="1.3280000000000001" table:style-name="ce3">
            <text:p>1,328</text:p>
          </table:table-cell>
          <table:table-cell office:value-type="float" office:value="1.252" table:style-name="ce3">
            <text:p>1,252</text:p>
          </table:table-cell>
          <table:table-cell office:value-type="float" office:value="1.2949999999999999" table:style-name="ce3">
            <text:p>1,295</text:p>
          </table:table-cell>
          <table:table-cell office:value-type="float" office:value="1.3320000000000001" table:style-name="ce3">
            <text:p>1,332</text:p>
          </table:table-cell>
          <table:table-cell office:value-type="float" office:value="1.3074285714285714" table:formula="of:=SUM([.B13:.H13])/7" table:style-name="ce3">
            <text:p>1,307428571</text:p>
          </table:table-cell>
          <table:table-cell table:number-columns-repeated="16375" table:style-name="ce3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">
            <text:p>Messwerte ASUS ZenBook 13 (Sofie)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office:value-type="string" table:style-name="ce4">
            <text:p>Baumtiefe (Ebenen)</text:p>
          </table:table-cell>
          <table:table-cell office:value-type="string" table:style-name="ce4">
            <text:p>Aufgezeichnete Laufzeiten</text:p>
          </table:table-cell>
          <table:table-cell table:number-columns-repeated="6" table:style-name="ce4"/>
          <table:table-cell office:value-type="string" table:style-name="ce4">
            <text:p>Mittelwert Laufzeit</text:p>
          </table:table-cell>
          <table:table-cell table:style-name="ce4"/>
          <table:table-cell table:number-columns-repeated="1637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8.5714285714285721E-4" table:formula="of:=SUM([.B18:.H18])/7" table:style-name="ce3">
            <text:p>0,000857143</text:p>
          </table:table-cell>
          <table:table-cell table:number-columns-repeated="16375" table:style-name="ce3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formula="of:=SUM([.B19:.H19])/7" table:style-name="ce3">
            <text:p>0,001</text:p>
          </table:table-cell>
          <table:table-cell table:number-columns-repeated="16375" table:style-name="ce3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1E-3" table:style-name="ce3">
            <text:p>0,001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1E-3" table:style-name="ce3">
            <text:p>0,001</text:p>
          </table:table-cell>
          <table:table-cell office:value-type="float" office:value="1.7142857142857144E-3" table:formula="of:=SUM([.B20:.H20])/7" table:style-name="ce3">
            <text:p>0,001714286</text:p>
          </table:table-cell>
          <table:table-cell table:number-columns-repeated="16375" table:style-name="ce3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2E-3" table:style-name="ce3">
            <text:p>0,002</text:p>
          </table:table-cell>
          <table:table-cell office:value-type="float" office:value="2.8571428571428567E-3" table:formula="of:=SUM([.B21:.H21])/7" table:style-name="ce3">
            <text:p>0,002857143</text:p>
          </table:table-cell>
          <table:table-cell table:number-columns-repeated="16375" table:style-name="ce3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8.0000000000000002E-3" table:style-name="ce3">
            <text:p>0,008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8.0000000000000002E-3" table:style-name="ce3">
            <text:p>0,008</text:p>
          </table:table-cell>
          <table:table-cell office:value-type="float" office:value="8.0000000000000002E-3" table:style-name="ce3">
            <text:p>0,008</text:p>
          </table:table-cell>
          <table:table-cell office:value-type="float" office:value="7.4285714285714285E-3" table:formula="of:=SUM([.B22:.H22])/7" table:style-name="ce3">
            <text:p>0,007428571</text:p>
          </table:table-cell>
          <table:table-cell table:number-columns-repeated="16375" table:style-name="ce3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.4E-2" table:style-name="ce3">
            <text:p>0,024</text:p>
          </table:table-cell>
          <table:table-cell office:value-type="float" office:value="2.3999999999999998E-3" table:style-name="ce3">
            <text:p>0,0024</text:p>
          </table:table-cell>
          <table:table-cell office:value-type="float" office:value="2.3E-2" table:style-name="ce3">
            <text:p>0,023</text:p>
          </table:table-cell>
          <table:table-cell office:value-type="float" office:value="2.4E-2" table:style-name="ce3">
            <text:p>0,024</text:p>
          </table:table-cell>
          <table:table-cell office:value-type="float" office:value="2.4E-2" table:style-name="ce3">
            <text:p>0,024</text:p>
          </table:table-cell>
          <table:table-cell office:value-type="float" office:value="2.3E-2" table:style-name="ce3">
            <text:p>0,023</text:p>
          </table:table-cell>
          <table:table-cell office:value-type="float" office:value="2.9000000000000001E-2" table:style-name="ce3">
            <text:p>0,029</text:p>
          </table:table-cell>
          <table:table-cell office:value-type="float" office:value="2.1342857142857139E-2" table:formula="of:=SUM([.B23:.H23])/7" table:style-name="ce3">
            <text:p>0,021342857</text:p>
          </table:table-cell>
          <table:table-cell table:number-columns-repeated="16375" table:style-name="ce3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8.3000000000000004E-2" table:style-name="ce3">
            <text:p>0,083</text:p>
          </table:table-cell>
          <table:table-cell office:value-type="float" office:value="8.2000000000000003E-2" table:style-name="ce3">
            <text:p>0,082</text:p>
          </table:table-cell>
          <table:table-cell office:value-type="float" office:value="8.8999999999999996E-2" table:style-name="ce3">
            <text:p>0,089</text:p>
          </table:table-cell>
          <table:table-cell office:value-type="float" office:value="8.3000000000000004E-2" table:style-name="ce3">
            <text:p>0,083</text:p>
          </table:table-cell>
          <table:table-cell office:value-type="float" office:value="8.1000000000000003E-2" table:style-name="ce3">
            <text:p>0,081</text:p>
          </table:table-cell>
          <table:table-cell office:value-type="float" office:value="0.10100000000000001" table:style-name="ce3">
            <text:p>0,101</text:p>
          </table:table-cell>
          <table:table-cell office:value-type="float" office:value="8.1000000000000003E-2" table:style-name="ce3">
            <text:p>0,081</text:p>
          </table:table-cell>
          <table:table-cell office:value-type="float" office:value="8.5714285714285715E-2" table:formula="of:=SUM([.B24:.H24])/7" table:style-name="ce3">
            <text:p>0,085714286</text:p>
          </table:table-cell>
          <table:table-cell table:number-columns-repeated="16375" table:style-name="ce3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0.33500000000000002" table:style-name="ce3">
            <text:p>0,335</text:p>
          </table:table-cell>
          <table:table-cell office:value-type="float" office:value="0.33500000000000002" table:style-name="ce3">
            <text:p>0,335</text:p>
          </table:table-cell>
          <table:table-cell office:value-type="float" office:value="0.34100000000000003" table:style-name="ce3">
            <text:p>0,341</text:p>
          </table:table-cell>
          <table:table-cell office:value-type="float" office:value="0.35099999999999998" table:style-name="ce3">
            <text:p>0,351</text:p>
          </table:table-cell>
          <table:table-cell office:value-type="float" office:value="0.34300000000000003" table:style-name="ce3">
            <text:p>0,343</text:p>
          </table:table-cell>
          <table:table-cell office:value-type="float" office:value="0.34799999999999998" table:style-name="ce3">
            <text:p>0,348</text:p>
          </table:table-cell>
          <table:table-cell office:value-type="float" office:value="0.32500000000000001" table:style-name="ce3">
            <text:p>0,325</text:p>
          </table:table-cell>
          <table:table-cell office:value-type="float" office:value="0.33971428571428575" table:formula="of:=SUM([.B25:.H25])/7" table:style-name="ce3">
            <text:p>0,339714286</text:p>
          </table:table-cell>
          <table:table-cell table:number-columns-repeated="16375" table:style-name="ce3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.244" table:style-name="ce3">
            <text:p>1,244</text:p>
          </table:table-cell>
          <table:table-cell office:value-type="float" office:value="1.292" table:style-name="ce3">
            <text:p>1,292</text:p>
          </table:table-cell>
          <table:table-cell office:value-type="float" office:value="1.264" table:style-name="ce3">
            <text:p>1,264</text:p>
          </table:table-cell>
          <table:table-cell office:value-type="float" office:value="1.2569999999999999" table:style-name="ce3">
            <text:p>1,257</text:p>
          </table:table-cell>
          <table:table-cell office:value-type="float" office:value="1.2490000000000001" table:style-name="ce3">
            <text:p>1,249</text:p>
          </table:table-cell>
          <table:table-cell office:value-type="float" office:value="1.238" table:style-name="ce3">
            <text:p>1,238</text:p>
          </table:table-cell>
          <table:table-cell office:value-type="float" office:value="1.2849999999999999" table:style-name="ce3">
            <text:p>1,285</text:p>
          </table:table-cell>
          <table:table-cell office:value-type="float" office:value="1.2612857142857141" table:formula="of:=SUM([.B26:.H26])/7" table:style-name="ce3">
            <text:p>1,261285714</text:p>
          </table:table-cell>
          <table:table-cell table:number-columns-repeated="16375" table:style-name="ce3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">
            <text:p>Messwerte Thinkpad P14s Gen 1 (Patrick)</text:p>
          </table:table-cell>
          <table:table-cell table:number-columns-repeated="3" table:style-name="ce2"/>
          <table:table-cell table:number-columns-repeated="16380" table:style-name="ce3"/>
        </table:table-row>
        <table:table-row table:style-name="ro2">
          <table:table-cell office:value-type="string" table:style-name="ce4">
            <text:p>Baumtiefe (Ebenen)</text:p>
          </table:table-cell>
          <table:table-cell office:value-type="string" table:style-name="ce4">
            <text:p>Aufgezeichnete Laufzeiten</text:p>
          </table:table-cell>
          <table:table-cell table:number-columns-repeated="6" table:style-name="ce4"/>
          <table:table-cell office:value-type="string" table:style-name="ce4">
            <text:p>Mittelwert Laufzeit</text:p>
          </table:table-cell>
          <table:table-cell table:style-name="ce4"/>
          <table:table-cell table:number-columns-repeated="1637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.294E-3" table:style-name="ce3">
            <text:p>0,001294</text:p>
          </table:table-cell>
          <table:table-cell office:value-type="float" office:value="1.335E-3" table:style-name="ce3">
            <text:p>0,001335</text:p>
          </table:table-cell>
          <table:table-cell office:value-type="float" office:value="1.4499999999999999E-3" table:style-name="ce3">
            <text:p>0,00145</text:p>
          </table:table-cell>
          <table:table-cell office:value-type="float" office:value="1.379E-3" table:style-name="ce3">
            <text:p>0,001379</text:p>
          </table:table-cell>
          <table:table-cell office:value-type="float" office:value="1.204E-3" table:style-name="ce3">
            <text:p>0,001204</text:p>
          </table:table-cell>
          <table:table-cell office:value-type="float" office:value="1.1130000000000001E-3" table:style-name="ce3">
            <text:p>0,001113</text:p>
          </table:table-cell>
          <table:table-cell office:value-type="float" office:value="1.444E-3" table:style-name="ce3">
            <text:p>0,001444</text:p>
          </table:table-cell>
          <table:table-cell office:value-type="float" office:value="1.3170000000000002E-3" table:formula="of:=SUM([.B31:.H31])/7" table:style-name="ce3">
            <text:p>0,001317</text:p>
          </table:table-cell>
          <table:table-cell table:number-columns-repeated="16375" table:style-name="ce3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.4959999999999999E-3" table:style-name="ce3">
            <text:p>0,001496</text:p>
          </table:table-cell>
          <table:table-cell office:value-type="float" office:value="1.549E-3" table:style-name="ce3">
            <text:p>0,001549</text:p>
          </table:table-cell>
          <table:table-cell office:value-type="float" office:value="1.7390000000000001E-3" table:style-name="ce3">
            <text:p>0,001739</text:p>
          </table:table-cell>
          <table:table-cell office:value-type="float" office:value="1.575E-3" table:style-name="ce3">
            <text:p>0,001575</text:p>
          </table:table-cell>
          <table:table-cell office:value-type="float" office:value="1.6609999999999999E-3" table:style-name="ce3">
            <text:p>0,001661</text:p>
          </table:table-cell>
          <table:table-cell office:value-type="float" office:value="1.0769000000000001E-2" table:style-name="ce3">
            <text:p>0,010769</text:p>
          </table:table-cell>
          <table:table-cell office:value-type="float" office:value="1.5806000000000001E-2" table:style-name="ce3">
            <text:p>0,015806</text:p>
          </table:table-cell>
          <table:table-cell office:value-type="float" office:value="4.9421428571428576E-3" table:formula="of:=SUM([.B32:.H32])/7" table:style-name="ce3">
            <text:p>0,004942143</text:p>
          </table:table-cell>
          <table:table-cell table:number-columns-repeated="16375" table:style-name="ce3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3.0279999999999999E-3" table:style-name="ce3">
            <text:p>0,003028</text:p>
          </table:table-cell>
          <table:table-cell office:value-type="float" office:value="2.7720000000000002E-3" table:style-name="ce3">
            <text:p>0,002772</text:p>
          </table:table-cell>
          <table:table-cell office:value-type="float" office:value="3.1449999999999998E-3" table:style-name="ce3">
            <text:p>0,003145</text:p>
          </table:table-cell>
          <table:table-cell office:value-type="float" office:value="3.1809999999999998E-3" table:style-name="ce3">
            <text:p>0,003181</text:p>
          </table:table-cell>
          <table:table-cell office:value-type="float" office:value="2.7560000000000002E-3" table:style-name="ce3">
            <text:p>0,002756</text:p>
          </table:table-cell>
          <table:table-cell office:value-type="float" office:value="2.7070000000000002E-3" table:style-name="ce3">
            <text:p>0,002707</text:p>
          </table:table-cell>
          <table:table-cell office:value-type="float" office:value="2.617E-3" table:style-name="ce3">
            <text:p>0,002617</text:p>
          </table:table-cell>
          <table:table-cell office:value-type="float" office:value="2.8865714285714289E-3" table:formula="of:=SUM([.B33:.H33])/7" table:style-name="ce3">
            <text:p>0,002886571</text:p>
          </table:table-cell>
          <table:table-cell table:number-columns-repeated="16375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.9599999999999999E-2" table:style-name="ce3">
            <text:p>0,0196</text:p>
          </table:table-cell>
          <table:table-cell office:value-type="float" office:value="7.9579999999999998E-3" table:style-name="ce3">
            <text:p>0,007958</text:p>
          </table:table-cell>
          <table:table-cell office:value-type="float" office:value="3.1983999999999999E-2" table:style-name="ce3">
            <text:p>0,031984</text:p>
          </table:table-cell>
          <table:table-cell office:value-type="float" office:value="7.2230000000000003E-3" table:style-name="ce3">
            <text:p>0,007223</text:p>
          </table:table-cell>
          <table:table-cell office:value-type="float" office:value="8.2389999999999998E-3" table:style-name="ce3">
            <text:p>0,008239</text:p>
          </table:table-cell>
          <table:table-cell office:value-type="float" office:value="8.5019999999999991E-3" table:style-name="ce3">
            <text:p>0,008502</text:p>
          </table:table-cell>
          <table:table-cell office:value-type="float" office:value="7.6670000000000002E-3" table:style-name="ce3">
            <text:p>0,007667</text:p>
          </table:table-cell>
          <table:table-cell office:value-type="float" office:value="1.3024714285714282E-2" table:formula="of:=SUM([.B34:.H34])/7" table:style-name="ce3">
            <text:p>0,013024714</text:p>
          </table:table-cell>
          <table:table-cell table:number-columns-repeated="16375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.5381000000000001E-2" table:style-name="ce3">
            <text:p>0,025381</text:p>
          </table:table-cell>
          <table:table-cell office:value-type="float" office:value="2.3261E-2" table:style-name="ce3">
            <text:p>0,023261</text:p>
          </table:table-cell>
          <table:table-cell office:value-type="float" office:value="2.4712999999999999E-2" table:style-name="ce3">
            <text:p>0,024713</text:p>
          </table:table-cell>
          <table:table-cell office:value-type="float" office:value="2.6098E-2" table:style-name="ce3">
            <text:p>0,026098</text:p>
          </table:table-cell>
          <table:table-cell office:value-type="float" office:value="2.5301000000000001E-2" table:style-name="ce3">
            <text:p>0,025301</text:p>
          </table:table-cell>
          <table:table-cell office:value-type="float" office:value="2.6040000000000001E-2" table:style-name="ce3">
            <text:p>0,02604</text:p>
          </table:table-cell>
          <table:table-cell office:value-type="float" office:value="2.5146000000000002E-2" table:style-name="ce3">
            <text:p>0,025146</text:p>
          </table:table-cell>
          <table:table-cell office:value-type="float" office:value="2.5134285714285717E-2" table:formula="of:=SUM([.B35:.H35])/7" table:style-name="ce3">
            <text:p>0,025134286</text:p>
          </table:table-cell>
          <table:table-cell table:number-columns-repeated="16375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7.8634999999999997E-2" table:style-name="ce3">
            <text:p>0,078635</text:p>
          </table:table-cell>
          <table:table-cell office:value-type="float" office:value="7.4359999999999996E-2" table:style-name="ce3">
            <text:p>0,07436</text:p>
          </table:table-cell>
          <table:table-cell office:value-type="float" office:value="7.7425999999999995E-2" table:style-name="ce3">
            <text:p>0,077426</text:p>
          </table:table-cell>
          <table:table-cell office:value-type="float" office:value="8.1356999999999999E-2" table:style-name="ce3">
            <text:p>0,081357</text:p>
          </table:table-cell>
          <table:table-cell office:value-type="float" office:value="7.9149999999999998E-2" table:style-name="ce3">
            <text:p>0,07915</text:p>
          </table:table-cell>
          <table:table-cell office:value-type="float" office:value="7.8803999999999999E-2" table:style-name="ce3">
            <text:p>0,078804</text:p>
          </table:table-cell>
          <table:table-cell office:value-type="float" office:value="7.5062000000000004E-2" table:style-name="ce3">
            <text:p>0,075062</text:p>
          </table:table-cell>
          <table:table-cell office:value-type="float" office:value="7.7827714285714292E-2" table:formula="of:=SUM([.B36:.H36])/7" table:style-name="ce3">
            <text:p>0,077827714</text:p>
          </table:table-cell>
          <table:table-cell table:number-columns-repeated="16375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0.28536800000000001" table:style-name="ce3">
            <text:p>0,285368</text:p>
          </table:table-cell>
          <table:table-cell office:value-type="float" office:value="0.28276299999999999" table:style-name="ce3">
            <text:p>0,282763</text:p>
          </table:table-cell>
          <table:table-cell office:value-type="float" office:value="0.26540599999999998" table:style-name="ce3">
            <text:p>0,265406</text:p>
          </table:table-cell>
          <table:table-cell office:value-type="float" office:value="0.270874" table:style-name="ce3">
            <text:p>0,270874</text:p>
          </table:table-cell>
          <table:table-cell office:value-type="float" office:value="0.26447900000000002" table:style-name="ce3">
            <text:p>0,264479</text:p>
          </table:table-cell>
          <table:table-cell office:value-type="float" office:value="0.26950600000000002" table:style-name="ce3">
            <text:p>0,269506</text:p>
          </table:table-cell>
          <table:table-cell office:value-type="float" office:value="0.27976699999999999" table:style-name="ce3">
            <text:p>0,279767</text:p>
          </table:table-cell>
          <table:table-cell office:value-type="float" office:value="0.27402328571428569" table:formula="of:=SUM([.B37:.H37])/7" table:style-name="ce3">
            <text:p>0,274023286</text:p>
          </table:table-cell>
          <table:table-cell table:number-columns-repeated="16375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0.98245800000000005" table:style-name="ce3">
            <text:p>0,982458</text:p>
          </table:table-cell>
          <table:table-cell office:value-type="float" office:value="0.98399800000000004" table:style-name="ce3">
            <text:p>0,983998</text:p>
          </table:table-cell>
          <table:table-cell office:value-type="float" office:value="0.99206000000000005" table:style-name="ce3">
            <text:p>0,99206</text:p>
          </table:table-cell>
          <table:table-cell office:value-type="float" office:value="0.98999000000000004" table:style-name="ce3">
            <text:p>0,98999</text:p>
          </table:table-cell>
          <table:table-cell office:value-type="float" office:value="0.98773200000000005" table:style-name="ce3">
            <text:p>0,987732</text:p>
          </table:table-cell>
          <table:table-cell office:value-type="float" office:value="0.99909700000000001" table:style-name="ce3">
            <text:p>0,999097</text:p>
          </table:table-cell>
          <table:table-cell office:value-type="float" office:value="1.0023599999999999" table:style-name="ce3">
            <text:p>1,00236</text:p>
          </table:table-cell>
          <table:table-cell office:value-type="float" office:value="0.99109928571428563" table:formula="of:=SUM([.B38:.H38])/7" table:style-name="ce3">
            <text:p>0,991099286</text:p>
          </table:table-cell>
          <table:table-cell table:number-columns-repeated="16375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3.8113700000000001" table:style-name="ce3">
            <text:p>3,81137</text:p>
          </table:table-cell>
          <table:table-cell office:value-type="float" office:value="3.7966199999999999" table:style-name="ce3">
            <text:p>3,79662</text:p>
          </table:table-cell>
          <table:table-cell office:value-type="float" office:value="3.81813" table:style-name="ce3">
            <text:p>3,81813</text:p>
          </table:table-cell>
          <table:table-cell office:value-type="float" office:value="3.83229" table:style-name="ce3">
            <text:p>3,83229</text:p>
          </table:table-cell>
          <table:table-cell office:value-type="float" office:value="3.8262900000000002" table:style-name="ce3">
            <text:p>3,82629</text:p>
          </table:table-cell>
          <table:table-cell office:value-type="float" office:value="3.8126899999999999" table:style-name="ce3">
            <text:p>3,81269</text:p>
          </table:table-cell>
          <table:table-cell office:value-type="float" office:value="3.8182299999999998" table:style-name="ce3">
            <text:p>3,81823</text:p>
          </table:table-cell>
          <table:table-cell office:value-type="float" office:value="3.8165171428571432" table:formula="of:=SUM([.B39:.H39])/7" table:style-name="ce3">
            <text:p>3,816517143</text:p>
          </table:table-cell>
          <table:table-cell table:number-columns-repeated="16375"/>
        </table:table-row>
        <table:table-row table:number-rows-repeated="1048537" table:style-name="ro2">
          <table:table-cell table:number-columns-repeated="16384"/>
        </table:table-row>
      </table:table>
      <table:table table:name="Parallel_OCL" table:style-name="ta2">
        <table:table-column table:style-name="co7" table:default-cell-style-name="ce3"/>
        <table:table-column table:style-name="co8" table:default-cell-style-name="ce3"/>
        <table:table-column table:style-name="co2" table:number-columns-repeated="6" table:default-cell-style-name="ce3"/>
        <table:table-column table:style-name="co9" table:default-cell-style-name="ce3"/>
        <table:table-column table:style-name="co10" table:default-cell-style-name="ce3"/>
        <table:table-column table:style-name="co2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2" table:number-columns-repeated="16369" table:default-cell-style-name="ce3"/>
        <table:table-row table:style-name="ro1">
          <table:table-cell office:value-type="string" table:number-columns-spanned="5" table:number-rows-spanned="1" table:style-name="ce19">
            <text:p>Zeitmessungen OpenCL-parallelisierte Ausführung</text:p>
          </table:table-cell>
          <table:covered-table-cell table:number-columns-repeated="4"/>
          <table:table-cell table:number-columns-repeated="16379" table:style-name="ce10"/>
        </table:table-row>
        <table:table-row table:style-name="ro2">
          <table:table-cell table:number-columns-repeated="16384" table:style-name="ce10"/>
        </table:table-row>
        <table:table-row table:style-name="ro3">
          <table:table-cell office:value-type="string" table:number-columns-spanned="4" table:number-rows-spanned="1" table:style-name="ce6">
            <text:p>Messwerte Thinkpad P15 Gen 2 (Tomke)</text:p>
          </table:table-cell>
          <table:covered-table-cell table:number-columns-repeated="3"/>
          <table:table-cell table:number-columns-repeated="4" table:style-name="ce3"/>
          <table:table-cell office:value-type="string" table:style-name="ce8">
            <text:p>buildtime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office:value-type="string" table:style-name="ce4">
            <text:p>Baumtiefe (Ebenen)</text:p>
          </table:table-cell>
          <table:table-cell office:value-type="string" table:number-columns-spanned="3" table:number-rows-spanned="1" table:style-name="ce7">
            <text:p>Aufgezeichnete Laufzeiten</text:p>
          </table:table-cell>
          <table:covered-table-cell table:number-columns-repeated="2"/>
          <table:table-cell table:number-columns-repeated="4" table:style-name="ce4"/>
          <table:table-cell office:value-type="string" table:style-name="ce4">
            <text:p>Mittelwert Laufzeit</text:p>
          </table:table-cell>
          <table:table-cell table:style-name="ce4"/>
          <table:table-cell table:number-columns-repeated="16374" table:style-name="ce1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0.27800000000000002" table:style-name="ce3">
            <text:p>0,278</text:p>
          </table:table-cell>
          <table:table-cell office:value-type="float" office:value="0.26400000000000001" table:style-name="ce3">
            <text:p>0,264</text:p>
          </table:table-cell>
          <table:table-cell office:value-type="float" office:value="0.25700000000000001" table:style-name="ce3">
            <text:p>0,257</text:p>
          </table:table-cell>
          <table:table-cell office:value-type="float" office:value="0.25800000000000001" table:style-name="ce3">
            <text:p>0,258</text:p>
          </table:table-cell>
          <table:table-cell office:value-type="float" office:value="0.26800000000000002" table:style-name="ce3">
            <text:p>0,268</text:p>
          </table:table-cell>
          <table:table-cell office:value-type="float" office:value="0.252" table:style-name="ce3">
            <text:p>0,252</text:p>
          </table:table-cell>
          <table:table-cell office:value-type="float" office:value="0.252" table:style-name="ce3">
            <text:p>0,252</text:p>
          </table:table-cell>
          <table:table-cell office:value-type="float" office:value="0.26128571428571429" table:formula="of:=SUM([.B5:.H5])/7" table:style-name="ce3">
            <text:p>0,261285714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1.4999999999999999E-2" table:style-name="ce8">
            <text:p>0,015</text:p>
          </table:table-cell>
          <table:table-cell office:value-type="float" office:value="1.4E-2" table:style-name="ce8">
            <text:p>0,014</text:p>
          </table:table-cell>
          <table:table-cell office:value-type="float" office:value="0.01" table:style-name="ce8">
            <text:p>0,01</text:p>
          </table:table-cell>
          <table:table-cell office:value-type="float" office:value="1.0999999999999999E-2" table:style-name="ce8">
            <text:p>0,011</text:p>
          </table:table-cell>
          <table:table-cell office:value-type="float" office:value="1.4999999999999999E-2" table:style-name="ce8">
            <text:p>0,015</text:p>
          </table:table-cell>
          <table:table-cell office:value-type="float" office:value="1.2E-2" table:style-name="ce8">
            <text:p>0,012</text:p>
          </table:table-cell>
          <table:table-cell office:value-type="float" office:value="0.01" table:style-name="ce8">
            <text:p>0,01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0.25700000000000001" table:style-name="ce3">
            <text:p>0,257</text:p>
          </table:table-cell>
          <table:table-cell office:value-type="float" office:value="0.26200000000000001" table:style-name="ce3">
            <text:p>0,262</text:p>
          </table:table-cell>
          <table:table-cell office:value-type="float" office:value="0.26900000000000002" table:style-name="ce3">
            <text:p>0,269</text:p>
          </table:table-cell>
          <table:table-cell office:value-type="float" office:value="0.26100000000000001" table:style-name="ce3">
            <text:p>0,261</text:p>
          </table:table-cell>
          <table:table-cell office:value-type="float" office:value="0.26800000000000002" table:style-name="ce3">
            <text:p>0,268</text:p>
          </table:table-cell>
          <table:table-cell office:value-type="float" office:value="0.252" table:style-name="ce3">
            <text:p>0,252</text:p>
          </table:table-cell>
          <table:table-cell office:value-type="float" office:value="0.25900000000000001" table:style-name="ce3">
            <text:p>0,259</text:p>
          </table:table-cell>
          <table:table-cell office:value-type="float" office:value="0.26114285714285712" table:formula="of:=SUM([.B7:.H7])/7" table:style-name="ce3">
            <text:p>0,261142857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0.01" table:style-name="ce8">
            <text:p>0,01</text:p>
          </table:table-cell>
          <table:table-cell office:value-type="float" office:value="1.6E-2" table:style-name="ce8">
            <text:p>0,016</text:p>
          </table:table-cell>
          <table:table-cell office:value-type="float" office:value="0.01" table:style-name="ce8">
            <text:p>0,01</text:p>
          </table:table-cell>
          <table:table-cell office:value-type="float" office:value="1.6E-2" table:style-name="ce8">
            <text:p>0,016</text:p>
          </table:table-cell>
          <table:table-cell office:value-type="float" office:value="1.4E-2" table:style-name="ce8">
            <text:p>0,014</text:p>
          </table:table-cell>
          <table:table-cell office:value-type="float" office:value="0.01" table:style-name="ce8">
            <text:p>0,01</text:p>
          </table:table-cell>
          <table:table-cell office:value-type="float" office:value="1.4E-2" table:style-name="ce8">
            <text:p>0,014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0.24199999999999999" table:style-name="ce3">
            <text:p>0,242</text:p>
          </table:table-cell>
          <table:table-cell office:value-type="float" office:value="0.24099999999999999" table:style-name="ce3">
            <text:p>0,241</text:p>
          </table:table-cell>
          <table:table-cell office:value-type="float" office:value="0.27200000000000002" table:style-name="ce3">
            <text:p>0,272</text:p>
          </table:table-cell>
          <table:table-cell office:value-type="float" office:value="0.26100000000000001" table:style-name="ce3">
            <text:p>0,261</text:p>
          </table:table-cell>
          <table:table-cell office:value-type="float" office:value="0.27600000000000002" table:style-name="ce3">
            <text:p>0,276</text:p>
          </table:table-cell>
          <table:table-cell office:value-type="float" office:value="0.24199999999999999" table:style-name="ce3">
            <text:p>0,242</text:p>
          </table:table-cell>
          <table:table-cell office:value-type="float" office:value="0.27200000000000002" table:style-name="ce3">
            <text:p>0,272</text:p>
          </table:table-cell>
          <table:table-cell office:value-type="float" office:value="0.25800000000000001" table:formula="of:=SUM([.B9:.H9])/7" table:style-name="ce3">
            <text:p>0,258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1.2999999999999999E-2" table:style-name="ce8">
            <text:p>0,013</text:p>
          </table:table-cell>
          <table:table-cell office:value-type="float" office:value="1.2999999999999999E-2" table:style-name="ce8">
            <text:p>0,013</text:p>
          </table:table-cell>
          <table:table-cell office:value-type="float" office:value="1.0999999999999999E-2" table:style-name="ce8">
            <text:p>0,011</text:p>
          </table:table-cell>
          <table:table-cell office:value-type="float" office:value="0.01" table:style-name="ce8">
            <text:p>0,01</text:p>
          </table:table-cell>
          <table:table-cell office:value-type="float" office:value="1.9E-2" table:style-name="ce8">
            <text:p>0,019</text:p>
          </table:table-cell>
          <table:table-cell office:value-type="float" office:value="8.9999999999999993E-3" table:style-name="ce8">
            <text:p>0,009</text:p>
          </table:table-cell>
          <table:table-cell office:value-type="float" office:value="1.4E-2" table:style-name="ce8">
            <text:p>0,014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0.27100000000000002" table:style-name="ce3">
            <text:p>0,271</text:p>
          </table:table-cell>
          <table:table-cell office:value-type="float" office:value="0.27200000000000002" table:style-name="ce3">
            <text:p>0,272</text:p>
          </table:table-cell>
          <table:table-cell office:value-type="float" office:value="0.25700000000000001" table:style-name="ce3">
            <text:p>0,257</text:p>
          </table:table-cell>
          <table:table-cell office:value-type="float" office:value="0.27700000000000002" table:style-name="ce3">
            <text:p>0,277</text:p>
          </table:table-cell>
          <table:table-cell office:value-type="float" office:value="0.26700000000000002" table:style-name="ce3">
            <text:p>0,267</text:p>
          </table:table-cell>
          <table:table-cell office:value-type="float" office:value="0.24299999999999999" table:style-name="ce3">
            <text:p>0,243</text:p>
          </table:table-cell>
          <table:table-cell office:value-type="float" office:value="0.27400000000000002" table:style-name="ce3">
            <text:p>0,274</text:p>
          </table:table-cell>
          <table:table-cell office:value-type="float" office:value="0.26585714285714285" table:formula="of:=SUM([.B11:.H11])/7" table:style-name="ce3">
            <text:p>0,265857143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1.2999999999999999E-2" table:style-name="ce8">
            <text:p>0,013</text:p>
          </table:table-cell>
          <table:table-cell office:value-type="float" office:value="1.2E-2" table:style-name="ce8">
            <text:p>0,012</text:p>
          </table:table-cell>
          <table:table-cell office:value-type="float" office:value="1.4E-2" table:style-name="ce8">
            <text:p>0,014</text:p>
          </table:table-cell>
          <table:table-cell office:value-type="float" office:value="1.2999999999999999E-2" table:style-name="ce8">
            <text:p>0,013</text:p>
          </table:table-cell>
          <table:table-cell office:value-type="float" office:value="1.0999999999999999E-2" table:style-name="ce8">
            <text:p>0,011</text:p>
          </table:table-cell>
          <table:table-cell office:value-type="float" office:value="1.0999999999999999E-2" table:style-name="ce8">
            <text:p>0,011</text:p>
          </table:table-cell>
          <table:table-cell office:value-type="float" office:value="1.4999999999999999E-2" table:style-name="ce8">
            <text:p>0,015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0.27700000000000002" table:style-name="ce3">
            <text:p>0,277</text:p>
          </table:table-cell>
          <table:table-cell office:value-type="float" office:value="0.28299999999999997" table:style-name="ce3">
            <text:p>0,283</text:p>
          </table:table-cell>
          <table:table-cell office:value-type="float" office:value="0.26700000000000002" table:style-name="ce3">
            <text:p>0,267</text:p>
          </table:table-cell>
          <table:table-cell office:value-type="float" office:value="0.27500000000000002" table:style-name="ce3">
            <text:p>0,275</text:p>
          </table:table-cell>
          <table:table-cell office:value-type="float" office:value="0.28699999999999998" table:style-name="ce3">
            <text:p>0,287</text:p>
          </table:table-cell>
          <table:table-cell office:value-type="float" office:value="0.27700000000000002" table:style-name="ce3">
            <text:p>0,277</text:p>
          </table:table-cell>
          <table:table-cell office:value-type="float" office:value="0.27900000000000003" table:style-name="ce3">
            <text:p>0,279</text:p>
          </table:table-cell>
          <table:table-cell office:value-type="float" office:value="0.27785714285714286" table:formula="of:=SUM([.B13:.H13])/7" table:style-name="ce3">
            <text:p>0,277857143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1.2999999999999999E-2" table:style-name="ce8">
            <text:p>0,013</text:p>
          </table:table-cell>
          <table:table-cell office:value-type="float" office:value="1.7999999999999999E-2" table:style-name="ce8">
            <text:p>0,018</text:p>
          </table:table-cell>
          <table:table-cell office:value-type="float" office:value="1.0999999999999999E-2" table:style-name="ce8">
            <text:p>0,011</text:p>
          </table:table-cell>
          <table:table-cell office:value-type="float" office:value="1.0999999999999999E-2" table:style-name="ce8">
            <text:p>0,011</text:p>
          </table:table-cell>
          <table:table-cell office:value-type="float" office:value="1.2999999999999999E-2" table:style-name="ce8">
            <text:p>0,013</text:p>
          </table:table-cell>
          <table:table-cell office:value-type="float" office:value="1.4E-2" table:style-name="ce8">
            <text:p>0,014</text:p>
          </table:table-cell>
          <table:table-cell office:value-type="float" office:value="1.6E-2" table:style-name="ce8">
            <text:p>0,016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.29299999999999998" table:style-name="ce3">
            <text:p>0,293</text:p>
          </table:table-cell>
          <table:table-cell office:value-type="float" office:value="0.27400000000000002" table:style-name="ce3">
            <text:p>0,274</text:p>
          </table:table-cell>
          <table:table-cell office:value-type="float" office:value="0.313" table:style-name="ce3">
            <text:p>0,313</text:p>
          </table:table-cell>
          <table:table-cell office:value-type="float" office:value="0.316" table:style-name="ce3">
            <text:p>0,316</text:p>
          </table:table-cell>
          <table:table-cell office:value-type="float" office:value="0.26500000000000001" table:style-name="ce3">
            <text:p>0,265</text:p>
          </table:table-cell>
          <table:table-cell office:value-type="float" office:value="0.26800000000000002" table:style-name="ce3">
            <text:p>0,268</text:p>
          </table:table-cell>
          <table:table-cell office:value-type="float" office:value="0.28799999999999998" table:style-name="ce3">
            <text:p>0,288</text:p>
          </table:table-cell>
          <table:table-cell office:value-type="float" office:value="0.28814285714285715" table:formula="of:=SUM([.B15:.H15])/7" table:style-name="ce3">
            <text:p>0,288142857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1.0999999999999999E-2" table:style-name="ce8">
            <text:p>0,011</text:p>
          </table:table-cell>
          <table:table-cell office:value-type="float" office:value="1.4E-2" table:style-name="ce8">
            <text:p>0,014</text:p>
          </table:table-cell>
          <table:table-cell office:value-type="float" office:value="3.4000000000000002E-2" table:style-name="ce8">
            <text:p>0,034</text:p>
          </table:table-cell>
          <table:table-cell office:value-type="float" office:value="1.6E-2" table:style-name="ce8">
            <text:p>0,016</text:p>
          </table:table-cell>
          <table:table-cell office:value-type="float" office:value="0.01" table:style-name="ce8">
            <text:p>0,01</text:p>
          </table:table-cell>
          <table:table-cell office:value-type="float" office:value="0.01" table:style-name="ce8">
            <text:p>0,01</text:p>
          </table:table-cell>
          <table:table-cell office:value-type="float" office:value="1.4999999999999999E-2" table:style-name="ce8">
            <text:p>0,015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0.36799999999999999" table:style-name="ce3">
            <text:p>0,368</text:p>
          </table:table-cell>
          <table:table-cell office:value-type="float" office:value="0.373" table:style-name="ce3">
            <text:p>0,373</text:p>
          </table:table-cell>
          <table:table-cell office:value-type="float" office:value="0.373" table:style-name="ce3">
            <text:p>0,373</text:p>
          </table:table-cell>
          <table:table-cell office:value-type="float" office:value="0.39300000000000002" table:style-name="ce3">
            <text:p>0,393</text:p>
          </table:table-cell>
          <table:table-cell office:value-type="float" office:value="0.35299999999999998" table:style-name="ce3">
            <text:p>0,353</text:p>
          </table:table-cell>
          <table:table-cell office:value-type="float" office:value="0.36" table:style-name="ce3">
            <text:p>0,36</text:p>
          </table:table-cell>
          <table:table-cell office:value-type="float" office:value="0.37" table:style-name="ce3">
            <text:p>0,37</text:p>
          </table:table-cell>
          <table:table-cell office:value-type="float" office:value="0.37" table:formula="of:=SUM([.B17:.H17])/7" table:style-name="ce3">
            <text:p>0,37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1.6E-2" table:style-name="ce8">
            <text:p>0,016</text:p>
          </table:table-cell>
          <table:table-cell office:value-type="float" office:value="0.01" table:style-name="ce8">
            <text:p>0,01</text:p>
          </table:table-cell>
          <table:table-cell office:value-type="float" office:value="0.01" table:style-name="ce8">
            <text:p>0,01</text:p>
          </table:table-cell>
          <table:table-cell office:value-type="float" office:value="1.4E-2" table:style-name="ce8">
            <text:p>0,014</text:p>
          </table:table-cell>
          <table:table-cell office:value-type="float" office:value="8.9999999999999993E-3" table:style-name="ce8">
            <text:p>0,009</text:p>
          </table:table-cell>
          <table:table-cell office:value-type="float" office:value="8.9999999999999993E-3" table:style-name="ce8">
            <text:p>0,009</text:p>
          </table:table-cell>
          <table:table-cell office:value-type="float" office:value="1.2999999999999999E-2" table:style-name="ce8">
            <text:p>0,013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0.81899999999999995" table:style-name="ce3">
            <text:p>0,819</text:p>
          </table:table-cell>
          <table:table-cell office:value-type="float" office:value="0.72399999999999998" table:style-name="ce3">
            <text:p>0,724</text:p>
          </table:table-cell>
          <table:table-cell office:value-type="float" office:value="0.79" table:style-name="ce3">
            <text:p>0,79</text:p>
          </table:table-cell>
          <table:table-cell office:value-type="float" office:value="0.71699999999999997" table:style-name="ce3">
            <text:p>0,717</text:p>
          </table:table-cell>
          <table:table-cell office:value-type="float" office:value="0.74" table:style-name="ce3">
            <text:p>0,74</text:p>
          </table:table-cell>
          <table:table-cell office:value-type="float" office:value="0.73499999999999999" table:style-name="ce3">
            <text:p>0,735</text:p>
          </table:table-cell>
          <table:table-cell office:value-type="float" office:value="0.73099999999999998" table:style-name="ce3">
            <text:p>0,731</text:p>
          </table:table-cell>
          <table:table-cell office:value-type="float" office:value="0.75085714285714289" table:formula="of:=SUM([.B19:.H19])/7" table:style-name="ce3">
            <text:p>0,750857143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1.2999999999999999E-2" table:style-name="ce8">
            <text:p>0,013</text:p>
          </table:table-cell>
          <table:table-cell office:value-type="float" office:value="0.01" table:style-name="ce8">
            <text:p>0,01</text:p>
          </table:table-cell>
          <table:table-cell office:value-type="float" office:value="8.9999999999999993E-3" table:style-name="ce8">
            <text:p>0,009</text:p>
          </table:table-cell>
          <table:table-cell office:value-type="float" office:value="1.0999999999999999E-2" table:style-name="ce8">
            <text:p>0,011</text:p>
          </table:table-cell>
          <table:table-cell office:value-type="float" office:value="0.01" table:style-name="ce8">
            <text:p>0,01</text:p>
          </table:table-cell>
          <table:table-cell office:value-type="float" office:value="1.2E-2" table:style-name="ce8">
            <text:p>0,012</text:p>
          </table:table-cell>
          <table:table-cell office:value-type="float" office:value="8.9999999999999993E-3" table:style-name="ce8">
            <text:p>0,009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.181" table:style-name="ce3">
            <text:p>2,181</text:p>
          </table:table-cell>
          <table:table-cell office:value-type="float" office:value="2.2719999999999998" table:style-name="ce3">
            <text:p>2,272</text:p>
          </table:table-cell>
          <table:table-cell office:value-type="float" office:value="2.766" table:style-name="ce3">
            <text:p>2,766</text:p>
          </table:table-cell>
          <table:table-cell office:value-type="float" office:value="2.323" table:style-name="ce3">
            <text:p>2,323</text:p>
          </table:table-cell>
          <table:table-cell office:value-type="float" office:value="2.3119999999999998" table:style-name="ce3">
            <text:p>2,312</text:p>
          </table:table-cell>
          <table:table-cell office:value-type="float" office:value="2.4569999999999999" table:style-name="ce3">
            <text:p>2,457</text:p>
          </table:table-cell>
          <table:table-cell office:value-type="float" office:value="2.39" table:style-name="ce3">
            <text:p>2,39</text:p>
          </table:table-cell>
          <table:table-cell office:value-type="float" office:value="2.3858571428571431" table:formula="of:=SUM([.B21:.H21])/7" table:style-name="ce3">
            <text:p>2,385857143</text:p>
          </table:table-cell>
          <table:table-cell table:number-columns-repeated="16375" table:style-name="ce3"/>
        </table:table-row>
        <table:table-row table:style-name="ro2">
          <table:table-cell table:style-name="ce5"/>
          <table:table-cell office:value-type="float" office:value="1.0999999999999999E-2" table:style-name="ce8">
            <text:p>0,011</text:p>
          </table:table-cell>
          <table:table-cell office:value-type="float" office:value="1.0999999999999999E-2" table:style-name="ce8">
            <text:p>0,011</text:p>
          </table:table-cell>
          <table:table-cell office:value-type="float" office:value="1.4E-2" table:style-name="ce8">
            <text:p>0,014</text:p>
          </table:table-cell>
          <table:table-cell office:value-type="float" office:value="1.0999999999999999E-2" table:style-name="ce8">
            <text:p>0,011</text:p>
          </table:table-cell>
          <table:table-cell office:value-type="float" office:value="0.01" table:style-name="ce8">
            <text:p>0,01</text:p>
          </table:table-cell>
          <table:table-cell office:value-type="float" office:value="1.4E-2" table:style-name="ce8">
            <text:p>0,014</text:p>
          </table:table-cell>
          <table:table-cell office:value-type="float" office:value="0.01" table:style-name="ce8">
            <text:p>0,01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table:number-columns-repeated="10" table:style-name="ce3"/>
          <table:table-cell table:number-columns-repeated="16374" table:style-name="ce10"/>
        </table:table-row>
        <table:table-row table:style-name="ro3">
          <table:table-cell office:value-type="string" table:style-name="ce2">
            <text:p>Messwerte ASUS ZenBook 13 (Sofie)</text:p>
          </table:table-cell>
          <table:table-cell table:number-columns-repeated="2" table:style-name="ce2"/>
          <table:table-cell table:number-columns-repeated="7" table:style-name="ce3"/>
          <table:table-cell table:number-columns-repeated="16374" table:style-name="ce10"/>
        </table:table-row>
        <table:table-row table:style-name="ro2">
          <table:table-cell office:value-type="string" table:style-name="ce4">
            <text:p>Baumtiefe (Ebenen)</text:p>
          </table:table-cell>
          <table:table-cell office:value-type="string" table:style-name="ce4">
            <text:p>Aufgezeichnete Laufzeiten</text:p>
          </table:table-cell>
          <table:table-cell table:number-columns-repeated="6" table:style-name="ce4"/>
          <table:table-cell office:value-type="string" table:style-name="ce4">
            <text:p>Mittelwert Laufzeit</text:p>
          </table:table-cell>
          <table:table-cell table:style-name="ce4"/>
          <table:table-cell table:number-columns-repeated="16374" table:style-name="ce1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0.56399999999999995" table:style-name="ce3">
            <text:p>0,564</text:p>
          </table:table-cell>
          <table:table-cell office:value-type="float" office:value="0.55100000000000005" table:style-name="ce3">
            <text:p>0,551</text:p>
          </table:table-cell>
          <table:table-cell office:value-type="float" office:value="0.54100000000000004" table:style-name="ce3">
            <text:p>0,541</text:p>
          </table:table-cell>
          <table:table-cell office:value-type="float" office:value="0.54100000000000004" table:style-name="ce3">
            <text:p>0,541</text:p>
          </table:table-cell>
          <table:table-cell office:value-type="float" office:value="0.53900000000000003" table:style-name="ce3">
            <text:p>0,539</text:p>
          </table:table-cell>
          <table:table-cell office:value-type="float" office:value="0.54500000000000004" table:style-name="ce3">
            <text:p>0,545</text:p>
          </table:table-cell>
          <table:table-cell office:value-type="float" office:value="0.54500000000000004" table:style-name="ce3">
            <text:p>0,545</text:p>
          </table:table-cell>
          <table:table-cell office:value-type="float" office:value="0.5465714285714286" table:formula="of:=SUM([.B26:.H26])/7" table:style-name="ce3">
            <text:p>0,546571429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0.28100000000000003" table:style-name="ce8">
            <text:p>0,281</text:p>
          </table:table-cell>
          <table:table-cell office:value-type="float" office:value="0.28199999999999997" table:style-name="ce8">
            <text:p>0,282</text:p>
          </table:table-cell>
          <table:table-cell office:value-type="float" office:value="0.27900000000000003" table:style-name="ce8">
            <text:p>0,279</text:p>
          </table:table-cell>
          <table:table-cell office:value-type="float" office:value="0.28000000000000003" table:style-name="ce8">
            <text:p>0,28</text:p>
          </table:table-cell>
          <table:table-cell office:value-type="float" office:value="0.28000000000000003" table:style-name="ce8">
            <text:p>0,28</text:p>
          </table:table-cell>
          <table:table-cell office:value-type="float" office:value="0.28000000000000003" table:style-name="ce8">
            <text:p>0,28</text:p>
          </table:table-cell>
          <table:table-cell office:value-type="float" office:value="0.28000000000000003" table:style-name="ce8">
            <text:p>0,28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0.54800000000000004" table:style-name="ce3">
            <text:p>0,548</text:p>
          </table:table-cell>
          <table:table-cell office:value-type="float" office:value="0.53300000000000003" table:style-name="ce3">
            <text:p>0,533</text:p>
          </table:table-cell>
          <table:table-cell office:value-type="float" office:value="0.54800000000000004" table:style-name="ce3">
            <text:p>0,548</text:p>
          </table:table-cell>
          <table:table-cell office:value-type="float" office:value="0.54900000000000004" table:style-name="ce3">
            <text:p>0,549</text:p>
          </table:table-cell>
          <table:table-cell office:value-type="float" office:value="0.53300000000000003" table:style-name="ce3">
            <text:p>0,533</text:p>
          </table:table-cell>
          <table:table-cell office:value-type="float" office:value="0.56100000000000005" table:style-name="ce3">
            <text:p>0,561</text:p>
          </table:table-cell>
          <table:table-cell office:value-type="float" office:value="0.54900000000000004" table:style-name="ce3">
            <text:p>0,549</text:p>
          </table:table-cell>
          <table:table-cell office:value-type="float" office:value="0.54585714285714282" table:formula="of:=SUM([.B28:.H28])/7" table:style-name="ce3">
            <text:p>0,545857143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0.28199999999999997" table:style-name="ce8">
            <text:p>0,282</text:p>
          </table:table-cell>
          <table:table-cell office:value-type="float" office:value="0.28000000000000003" table:style-name="ce8">
            <text:p>0,28</text:p>
          </table:table-cell>
          <table:table-cell office:value-type="float" office:value="0.27900000000000003" table:style-name="ce8">
            <text:p>0,279</text:p>
          </table:table-cell>
          <table:table-cell office:value-type="float" office:value="0.28100000000000003" table:style-name="ce8">
            <text:p>0,281</text:p>
          </table:table-cell>
          <table:table-cell office:value-type="float" office:value="0.27900000000000003" table:style-name="ce8">
            <text:p>0,279</text:p>
          </table:table-cell>
          <table:table-cell office:value-type="float" office:value="0.27800000000000002" table:style-name="ce8">
            <text:p>0,278</text:p>
          </table:table-cell>
          <table:table-cell office:value-type="float" office:value="0.28100000000000003" table:style-name="ce8">
            <text:p>0,281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0.53200000000000003" table:style-name="ce3">
            <text:p>0,532</text:p>
          </table:table-cell>
          <table:table-cell office:value-type="float" office:value="0.58399999999999996" table:style-name="ce3">
            <text:p>0,584</text:p>
          </table:table-cell>
          <table:table-cell office:value-type="float" office:value="0.54" table:style-name="ce3">
            <text:p>0,54</text:p>
          </table:table-cell>
          <table:table-cell office:value-type="float" office:value="0.55600000000000005" table:style-name="ce3">
            <text:p>0,556</text:p>
          </table:table-cell>
          <table:table-cell office:value-type="float" office:value="0.53600000000000003" table:style-name="ce3">
            <text:p>0,536</text:p>
          </table:table-cell>
          <table:table-cell office:value-type="float" office:value="0.59199999999999997" table:style-name="ce3">
            <text:p>0,592</text:p>
          </table:table-cell>
          <table:table-cell office:value-type="float" office:value="0.57399999999999995" table:style-name="ce3">
            <text:p>0,574</text:p>
          </table:table-cell>
          <table:table-cell office:value-type="float" office:value="0.55914285714285716" table:formula="of:=SUM([.B30:.H30])/7" table:style-name="ce3">
            <text:p>0,559142857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0.28000000000000003" table:style-name="ce8">
            <text:p>0,28</text:p>
          </table:table-cell>
          <table:table-cell office:value-type="float" office:value="0.28100000000000003" table:style-name="ce8">
            <text:p>0,281</text:p>
          </table:table-cell>
          <table:table-cell office:value-type="float" office:value="0.28100000000000003" table:style-name="ce8">
            <text:p>0,281</text:p>
          </table:table-cell>
          <table:table-cell office:value-type="float" office:value="0.29799999999999999" table:style-name="ce8">
            <text:p>0,298</text:p>
          </table:table-cell>
          <table:table-cell office:value-type="float" office:value="0.28000000000000003" table:style-name="ce8">
            <text:p>0,28</text:p>
          </table:table-cell>
          <table:table-cell office:value-type="float" office:value="0.309" table:style-name="ce8">
            <text:p>0,309</text:p>
          </table:table-cell>
          <table:table-cell office:value-type="float" office:value="0.28999999999999998" table:style-name="ce8">
            <text:p>0,29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0.59799999999999998" table:style-name="ce3">
            <text:p>0,598</text:p>
          </table:table-cell>
          <table:table-cell office:value-type="float" office:value="0.55800000000000005" table:style-name="ce3">
            <text:p>0,558</text:p>
          </table:table-cell>
          <table:table-cell office:value-type="float" office:value="0.56299999999999994" table:style-name="ce3">
            <text:p>0,563</text:p>
          </table:table-cell>
          <table:table-cell office:value-type="float" office:value="0.54300000000000004" table:style-name="ce3">
            <text:p>0,543</text:p>
          </table:table-cell>
          <table:table-cell office:value-type="float" office:value="0.55800000000000005" table:style-name="ce3">
            <text:p>0,558</text:p>
          </table:table-cell>
          <table:table-cell office:value-type="float" office:value="0.57199999999999995" table:style-name="ce3">
            <text:p>0,572</text:p>
          </table:table-cell>
          <table:table-cell office:value-type="float" office:value="0.57799999999999996" table:style-name="ce3">
            <text:p>0,578</text:p>
          </table:table-cell>
          <table:table-cell office:value-type="float" office:value="0.56714285714285717" table:formula="of:=SUM([.B32:.H32])/7" table:style-name="ce3">
            <text:p>0,567142857</text:p>
          </table:table-cell>
          <table:table-cell table:style-name="ce3"/>
          <table:table-cell table:number-columns-repeated="16374" table:style-name="ce10"/>
        </table:table-row>
        <table:table-row table:style-name="ro2">
          <table:table-cell table:style-name="ce5"/>
          <table:table-cell office:value-type="float" office:value="0.29099999999999998" table:style-name="ce8">
            <text:p>0,291</text:p>
          </table:table-cell>
          <table:table-cell office:value-type="float" office:value="0.27900000000000003" table:style-name="ce8">
            <text:p>0,279</text:p>
          </table:table-cell>
          <table:table-cell office:value-type="float" office:value="0.29099999999999998" table:style-name="ce8">
            <text:p>0,291</text:p>
          </table:table-cell>
          <table:table-cell office:value-type="float" office:value="0.28499999999999998" table:style-name="ce8">
            <text:p>0,285</text:p>
          </table:table-cell>
          <table:table-cell office:value-type="float" office:value="0.28999999999999998" table:style-name="ce8">
            <text:p>0,29</text:p>
          </table:table-cell>
          <table:table-cell office:value-type="float" office:value="0.28199999999999997" table:style-name="ce8">
            <text:p>0,282</text:p>
          </table:table-cell>
          <table:table-cell office:value-type="float" office:value="0.28399999999999997" table:style-name="ce8">
            <text:p>0,284</text:p>
          </table:table-cell>
          <table:table-cell table:style-name="ce10"/>
          <table:table-cell table:style-name="ce3"/>
          <table:table-cell table:number-columns-repeated="16374" table:style-name="ce1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0.58499999999999996" table:style-name="ce3">
            <text:p>0,585</text:p>
          </table:table-cell>
          <table:table-cell office:value-type="float" office:value="0.58599999999999997" table:style-name="ce3">
            <text:p>0,586</text:p>
          </table:table-cell>
          <table:table-cell office:value-type="float" office:value="0.58099999999999996" table:style-name="ce3">
            <text:p>0,581</text:p>
          </table:table-cell>
          <table:table-cell office:value-type="float" office:value="0.56299999999999994" table:style-name="ce3">
            <text:p>0,563</text:p>
          </table:table-cell>
          <table:table-cell office:value-type="float" office:value="0.55800000000000005" table:style-name="ce3">
            <text:p>0,558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57199999999999995" table:style-name="ce3">
            <text:p>0,572</text:p>
          </table:table-cell>
          <table:table-cell office:value-type="float" office:value="0.5735714285714284" table:formula="of:=SUM([.B34:.H34])/7" table:style-name="ce3">
            <text:p>0,573571429</text:p>
          </table:table-cell>
          <table:table-cell table:style-name="ce3"/>
          <table:table-cell table:number-columns-repeated="16374" table:style-name="ce10"/>
        </table:table-row>
        <table:table-row table:style-name="ro4">
          <table:table-cell table:style-name="ce5"/>
          <table:table-cell office:value-type="float" office:value="0.28399999999999997" table:style-name="ce8">
            <text:p>0,284</text:p>
          </table:table-cell>
          <table:table-cell office:value-type="float" office:value="0.28000000000000003" table:style-name="ce8">
            <text:p>0,28</text:p>
          </table:table-cell>
          <table:table-cell office:value-type="float" office:value="0.27900000000000003" table:style-name="ce8">
            <text:p>0,279</text:p>
          </table:table-cell>
          <table:table-cell office:value-type="float" office:value="0.28100000000000003" table:style-name="ce8">
            <text:p>0,281</text:p>
          </table:table-cell>
          <table:table-cell office:value-type="float" office:value="0.28000000000000003" table:style-name="ce8">
            <text:p>0,28</text:p>
          </table:table-cell>
          <table:table-cell office:value-type="float" office:value="0.27900000000000003" table:style-name="ce8">
            <text:p>0,279</text:p>
          </table:table-cell>
          <table:table-cell office:value-type="float" office:value="0.28100000000000003" table:style-name="ce8">
            <text:p>0,281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4">
          <table:table-cell office:value-type="float" office:value="15" table:style-name="ce5">
            <text:p>15</text:p>
          </table:table-cell>
          <table:table-cell office:value-type="float" office:value="0.63300000000000001" table:style-name="ce3">
            <text:p>0,633</text:p>
          </table:table-cell>
          <table:table-cell office:value-type="float" office:value="0.628" table:style-name="ce3">
            <text:p>0,628</text:p>
          </table:table-cell>
          <table:table-cell office:value-type="float" office:value="0.64700000000000002" table:style-name="ce3">
            <text:p>0,647</text:p>
          </table:table-cell>
          <table:table-cell office:value-type="float" office:value="0.69899999999999995" table:style-name="ce3">
            <text:p>0,699</text:p>
          </table:table-cell>
          <table:table-cell office:value-type="float" office:value="0.66100000000000003" table:style-name="ce3">
            <text:p>0,661</text:p>
          </table:table-cell>
          <table:table-cell office:value-type="float" office:value="0.66200000000000003" table:style-name="ce3">
            <text:p>0,662</text:p>
          </table:table-cell>
          <table:table-cell office:value-type="float" office:value="0.64100000000000001" table:style-name="ce3">
            <text:p>0,641</text:p>
          </table:table-cell>
          <table:table-cell office:value-type="float" office:value="0.65299999999999991" table:formula="of:=SUM([.B36:.H36])/7" table:style-name="ce3">
            <text:p>0,653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4">
          <table:table-cell table:style-name="ce5"/>
          <table:table-cell office:value-type="float" office:value="0.28000000000000003" table:style-name="ce8">
            <text:p>0,28</text:p>
          </table:table-cell>
          <table:table-cell office:value-type="float" office:value="0.27800000000000002" table:style-name="ce8">
            <text:p>0,278</text:p>
          </table:table-cell>
          <table:table-cell office:value-type="float" office:value="0.27800000000000002" table:style-name="ce8">
            <text:p>0,278</text:p>
          </table:table-cell>
          <table:table-cell office:value-type="float" office:value="0.312" table:style-name="ce8">
            <text:p>0,312</text:p>
          </table:table-cell>
          <table:table-cell office:value-type="float" office:value="0.29199999999999998" table:style-name="ce8">
            <text:p>0,292</text:p>
          </table:table-cell>
          <table:table-cell office:value-type="float" office:value="0.28999999999999998" table:style-name="ce8">
            <text:p>0,29</text:p>
          </table:table-cell>
          <table:table-cell office:value-type="float" office:value="0.28899999999999998" table:style-name="ce8">
            <text:p>0,289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4">
          <table:table-cell office:value-type="float" office:value="17" table:style-name="ce5">
            <text:p>17</text:p>
          </table:table-cell>
          <table:table-cell office:value-type="float" office:value="0.89200000000000002" table:style-name="ce3">
            <text:p>0,892</text:p>
          </table:table-cell>
          <table:table-cell office:value-type="float" office:value="0.90100000000000002" table:style-name="ce3">
            <text:p>0,901</text:p>
          </table:table-cell>
          <table:table-cell office:value-type="float" office:value="0.90700000000000003" table:style-name="ce3">
            <text:p>0,907</text:p>
          </table:table-cell>
          <table:table-cell office:value-type="float" office:value="0.89900000000000002" table:style-name="ce3">
            <text:p>0,899</text:p>
          </table:table-cell>
          <table:table-cell office:value-type="float" office:value="0.91600000000000004" table:style-name="ce3">
            <text:p>0,916</text:p>
          </table:table-cell>
          <table:table-cell office:value-type="float" office:value="0.90600000000000003" table:style-name="ce3">
            <text:p>0,906</text:p>
          </table:table-cell>
          <table:table-cell office:value-type="float" office:value="0.94" table:style-name="ce3">
            <text:p>0,94</text:p>
          </table:table-cell>
          <table:table-cell office:value-type="float" office:value="0.90871428571428581" table:formula="of:=SUM([.B38:.H38])/7" table:style-name="ce3">
            <text:p>0,908714286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4">
          <table:table-cell table:style-name="ce5"/>
          <table:table-cell office:value-type="float" office:value="0.27800000000000002" table:style-name="ce8">
            <text:p>0,278</text:p>
          </table:table-cell>
          <table:table-cell office:value-type="float" office:value="0.28199999999999997" table:style-name="ce8">
            <text:p>0,282</text:p>
          </table:table-cell>
          <table:table-cell office:value-type="float" office:value="0.27900000000000003" table:style-name="ce8">
            <text:p>0,279</text:p>
          </table:table-cell>
          <table:table-cell office:value-type="float" office:value="0.27800000000000002" table:style-name="ce8">
            <text:p>0,278</text:p>
          </table:table-cell>
          <table:table-cell office:value-type="float" office:value="0.28100000000000003" table:style-name="ce8">
            <text:p>0,281</text:p>
          </table:table-cell>
          <table:table-cell office:value-type="float" office:value="0.28599999999999998" table:style-name="ce8">
            <text:p>0,286</text:p>
          </table:table-cell>
          <table:table-cell office:value-type="float" office:value="0.315" table:style-name="ce8">
            <text:p>0,315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4">
          <table:table-cell office:value-type="float" office:value="19" table:style-name="ce5">
            <text:p>19</text:p>
          </table:table-cell>
          <table:table-cell office:value-type="float" office:value="1.718" table:style-name="ce3">
            <text:p>1,718</text:p>
          </table:table-cell>
          <table:table-cell office:value-type="float" office:value="1.6839999999999999" table:style-name="ce3">
            <text:p>1,684</text:p>
          </table:table-cell>
          <table:table-cell office:value-type="float" office:value="1.726" table:style-name="ce3">
            <text:p>1,726</text:p>
          </table:table-cell>
          <table:table-cell office:value-type="float" office:value="1.7350000000000001" table:style-name="ce3">
            <text:p>1,735</text:p>
          </table:table-cell>
          <table:table-cell office:value-type="float" office:value="1.7170000000000001" table:style-name="ce3">
            <text:p>1,717</text:p>
          </table:table-cell>
          <table:table-cell office:value-type="float" office:value="1.724" table:style-name="ce3">
            <text:p>1,724</text:p>
          </table:table-cell>
          <table:table-cell office:value-type="float" office:value="1.724" table:style-name="ce3">
            <text:p>1,724</text:p>
          </table:table-cell>
          <table:table-cell office:value-type="float" office:value="1.7182857142857144" table:formula="of:=SUM([.B40:.H40])/7" table:style-name="ce3">
            <text:p>1,718285714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4">
          <table:table-cell table:style-name="ce5"/>
          <table:table-cell office:value-type="float" office:value="0.28000000000000003" table:style-name="ce8">
            <text:p>0,28</text:p>
          </table:table-cell>
          <table:table-cell office:value-type="float" office:value="0.28699999999999998" table:style-name="ce8">
            <text:p>0,287</text:p>
          </table:table-cell>
          <table:table-cell office:value-type="float" office:value="0.315" table:style-name="ce8">
            <text:p>0,315</text:p>
          </table:table-cell>
          <table:table-cell office:value-type="float" office:value="0.28000000000000003" table:style-name="ce8">
            <text:p>0,28</text:p>
          </table:table-cell>
          <table:table-cell office:value-type="float" office:value="0.29899999999999999" table:style-name="ce8">
            <text:p>0,299</text:p>
          </table:table-cell>
          <table:table-cell office:value-type="float" office:value="0.28100000000000003" table:style-name="ce8">
            <text:p>0,281</text:p>
          </table:table-cell>
          <table:table-cell office:value-type="float" office:value="0.3" table:style-name="ce8">
            <text:p>0,3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4">
          <table:table-cell office:value-type="float" office:value="21" table:style-name="ce5">
            <text:p>21</text:p>
          </table:table-cell>
          <table:table-cell office:value-type="float" office:value="4.5259999999999998" table:style-name="ce3">
            <text:p>4,526</text:p>
          </table:table-cell>
          <table:table-cell office:value-type="float" office:value="4.5410000000000004" table:style-name="ce3">
            <text:p>4,541</text:p>
          </table:table-cell>
          <table:table-cell office:value-type="float" office:value="4.5510000000000002" table:style-name="ce3">
            <text:p>4,551</text:p>
          </table:table-cell>
          <table:table-cell office:value-type="float" office:value="4.54" table:style-name="ce3">
            <text:p>4,54</text:p>
          </table:table-cell>
          <table:table-cell office:value-type="float" office:value="4.5640000000000001" table:style-name="ce3">
            <text:p>4,564</text:p>
          </table:table-cell>
          <table:table-cell office:value-type="float" office:value="4.6420000000000003" table:style-name="ce3">
            <text:p>4,642</text:p>
          </table:table-cell>
          <table:table-cell office:value-type="float" office:value="4.6079999999999997" table:style-name="ce3">
            <text:p>4,608</text:p>
          </table:table-cell>
          <table:table-cell office:value-type="float" office:value="4.5674285714285716" table:formula="of:=SUM([.B42:.H42])/7" table:style-name="ce3">
            <text:p>4,567428571</text:p>
          </table:table-cell>
          <table:table-cell table:number-columns-repeated="16375" table:style-name="ce3"/>
        </table:table-row>
        <table:table-row table:style-name="ro4">
          <table:table-cell table:style-name="ce3"/>
          <table:table-cell office:value-type="float" office:value="0.27900000000000003" table:style-name="ce8">
            <text:p>0,279</text:p>
          </table:table-cell>
          <table:table-cell office:value-type="float" office:value="0.28699999999999998" table:style-name="ce8">
            <text:p>0,287</text:p>
          </table:table-cell>
          <table:table-cell office:value-type="float" office:value="0.32" table:style-name="ce8">
            <text:p>0,32</text:p>
          </table:table-cell>
          <table:table-cell office:value-type="float" office:value="0.27800000000000002" table:style-name="ce8">
            <text:p>0,278</text:p>
          </table:table-cell>
          <table:table-cell office:value-type="float" office:value="0.29499999999999998" table:style-name="ce8">
            <text:p>0,295</text:p>
          </table:table-cell>
          <table:table-cell office:value-type="float" office:value="0.32300000000000001" table:style-name="ce8">
            <text:p>0,323</text:p>
          </table:table-cell>
          <table:table-cell office:value-type="float" office:value="0.28000000000000003" table:style-name="ce8">
            <text:p>0,28</text:p>
          </table:table-cell>
          <table:table-cell table:style-name="ce10"/>
          <table:table-cell table:style-name="ce3"/>
          <table:table-cell table:style-name="ce10"/>
          <table:table-cell table:number-columns-repeated="2" table:style-name="ce3"/>
          <table:table-cell table:number-columns-repeated="16371" table:style-name="ce10"/>
        </table:table-row>
        <table:table-row table:style-name="ro2">
          <table:table-cell table:number-columns-repeated="10" table:style-name="ce3"/>
          <table:table-cell table:style-name="ce10"/>
          <table:table-cell table:style-name="ce3"/>
          <table:table-cell table:style-name="ce4"/>
          <table:table-cell table:number-columns-repeated="16371" table:style-name="ce10"/>
        </table:table-row>
        <table:table-row table:style-name="ro3">
          <table:table-cell office:value-type="string" table:style-name="ce2">
            <text:p>Messwerte Thinkpad P14s Gen 1 (Patrick)</text:p>
          </table:table-cell>
          <table:table-cell table:number-columns-repeated="3" table:style-name="ce2"/>
          <table:table-cell table:number-columns-repeated="6" table:style-name="ce3"/>
          <table:table-cell table:style-name="ce10"/>
          <table:table-cell table:number-columns-repeated="2" table:style-name="ce3"/>
          <table:table-cell table:number-columns-repeated="16371" table:style-name="ce10"/>
        </table:table-row>
        <table:table-row table:style-name="ro2">
          <table:table-cell office:value-type="string" table:style-name="ce4">
            <text:p>Baumtiefe (Ebenen)</text:p>
          </table:table-cell>
          <table:table-cell office:value-type="string" table:style-name="ce4">
            <text:p>Aufgezeichnete Laufzeiten</text:p>
          </table:table-cell>
          <table:table-cell table:number-columns-repeated="6" table:style-name="ce4"/>
          <table:table-cell office:value-type="string" table:style-name="ce4">
            <text:p>Mittelwert Laufzeit</text:p>
          </table:table-cell>
          <table:table-cell table:style-name="ce4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0.13839699999999999" table:style-name="ce3">
            <text:p>0,138397</text:p>
          </table:table-cell>
          <table:table-cell office:value-type="float" office:value="0.116217" table:style-name="ce3">
            <text:p>0,116217</text:p>
          </table:table-cell>
          <table:table-cell office:value-type="float" office:value="0.116331" table:style-name="ce3">
            <text:p>0,116331</text:p>
          </table:table-cell>
          <table:table-cell office:value-type="float" office:value="0.1119" table:style-name="ce3">
            <text:p>0,1119</text:p>
          </table:table-cell>
          <table:table-cell office:value-type="float" office:value="0.11418499999999999" table:style-name="ce3">
            <text:p>0,114185</text:p>
          </table:table-cell>
          <table:table-cell office:value-type="float" office:value="0.110679" table:style-name="ce3">
            <text:p>0,110679</text:p>
          </table:table-cell>
          <table:table-cell office:value-type="float" office:value="0.116393" table:style-name="ce3">
            <text:p>0,116393</text:p>
          </table:table-cell>
          <table:table-cell office:value-type="float" office:value="0.11772885714285715" table:formula="of:=SUM([.B47:.H47])/7" table:style-name="ce3">
            <text:p>0,117728857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table:style-name="ce5"/>
          <table:table-cell office:value-type="float" office:value="3.5046000000000001E-2" table:style-name="ce8">
            <text:p>0,035046</text:p>
          </table:table-cell>
          <table:table-cell office:value-type="float" office:value="3.5321999999999999E-2" table:style-name="ce8">
            <text:p>0,035322</text:p>
          </table:table-cell>
          <table:table-cell office:value-type="float" office:value="3.4779999999999998E-2" table:style-name="ce8">
            <text:p>0,03478</text:p>
          </table:table-cell>
          <table:table-cell office:value-type="float" office:value="3.5397999999999999E-2" table:style-name="ce8">
            <text:p>0,035398</text:p>
          </table:table-cell>
          <table:table-cell office:value-type="float" office:value="3.5111999999999997E-2" table:style-name="ce8">
            <text:p>0,035112</text:p>
          </table:table-cell>
          <table:table-cell office:value-type="float" office:value="3.4851E-2" table:style-name="ce8">
            <text:p>0,034851</text:p>
          </table:table-cell>
          <table:table-cell office:value-type="float" office:value="3.5742000000000003E-2" table:style-name="ce8">
            <text:p>0,035742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0.14999899999999999" table:style-name="ce3">
            <text:p>0,149999</text:p>
          </table:table-cell>
          <table:table-cell office:value-type="float" office:value="0.12789600000000001" table:style-name="ce3">
            <text:p>0,127896</text:p>
          </table:table-cell>
          <table:table-cell office:value-type="float" office:value="0.15324099999999999" table:style-name="ce3">
            <text:p>0,153241</text:p>
          </table:table-cell>
          <table:table-cell office:value-type="float" office:value="0.130939" table:style-name="ce3">
            <text:p>0,130939</text:p>
          </table:table-cell>
          <table:table-cell office:value-type="float" office:value="0.152923" table:style-name="ce3">
            <text:p>0,152923</text:p>
          </table:table-cell>
          <table:table-cell office:value-type="float" office:value="0.13222200000000001" table:style-name="ce3">
            <text:p>0,132222</text:p>
          </table:table-cell>
          <table:table-cell office:value-type="float" office:value="0.13372400000000001" table:style-name="ce3">
            <text:p>0,133724</text:p>
          </table:table-cell>
          <table:table-cell office:value-type="float" office:value="0.14013485714285714" table:formula="of:=SUM([.B49:.H49])/7" table:style-name="ce3">
            <text:p>0,140134857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table:style-name="ce5"/>
          <table:table-cell office:value-type="float" office:value="3.5263000000000003E-2" table:style-name="ce8">
            <text:p>0,035263</text:p>
          </table:table-cell>
          <table:table-cell office:value-type="float" office:value="3.5518000000000001E-2" table:style-name="ce8">
            <text:p>0,035518</text:p>
          </table:table-cell>
          <table:table-cell office:value-type="float" office:value="3.5229999999999997E-2" table:style-name="ce8">
            <text:p>0,03523</text:p>
          </table:table-cell>
          <table:table-cell office:value-type="float" office:value="3.5380000000000002E-2" table:style-name="ce8">
            <text:p>0,03538</text:p>
          </table:table-cell>
          <table:table-cell office:value-type="float" office:value="3.5137000000000002E-2" table:style-name="ce8">
            <text:p>0,035137</text:p>
          </table:table-cell>
          <table:table-cell office:value-type="float" office:value="3.5372000000000001E-2" table:style-name="ce8">
            <text:p>0,035372</text:p>
          </table:table-cell>
          <table:table-cell office:value-type="float" office:value="3.5567000000000001E-2" table:style-name="ce8">
            <text:p>0,035567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0.13897399999999999" table:style-name="ce3">
            <text:p>0,138974</text:p>
          </table:table-cell>
          <table:table-cell office:value-type="float" office:value="0.120741" table:style-name="ce3">
            <text:p>0,120741</text:p>
          </table:table-cell>
          <table:table-cell office:value-type="float" office:value="0.12049799999999999" table:style-name="ce3">
            <text:p>0,120498</text:p>
          </table:table-cell>
          <table:table-cell office:value-type="float" office:value="0.121549" table:style-name="ce3">
            <text:p>0,121549</text:p>
          </table:table-cell>
          <table:table-cell office:value-type="float" office:value="0.120273" table:style-name="ce3">
            <text:p>0,120273</text:p>
          </table:table-cell>
          <table:table-cell office:value-type="float" office:value="0.14441300000000001" table:style-name="ce3">
            <text:p>0,144413</text:p>
          </table:table-cell>
          <table:table-cell office:value-type="float" office:value="0.12581700000000001" table:style-name="ce3">
            <text:p>0,125817</text:p>
          </table:table-cell>
          <table:table-cell office:value-type="float" office:value="0.12746642857142856" table:formula="of:=SUM([.B51:.H51])/7" table:style-name="ce3">
            <text:p>0,127466429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table:style-name="ce5"/>
          <table:table-cell office:value-type="float" office:value="3.6547999999999997E-2" table:style-name="ce8">
            <text:p>0,036548</text:p>
          </table:table-cell>
          <table:table-cell office:value-type="float" office:value="3.5678000000000001E-2" table:style-name="ce8">
            <text:p>0,035678</text:p>
          </table:table-cell>
          <table:table-cell office:value-type="float" office:value="3.4660000000000003E-2" table:style-name="ce8">
            <text:p>0,03466</text:p>
          </table:table-cell>
          <table:table-cell office:value-type="float" office:value="3.5045E-2" table:style-name="ce8">
            <text:p>0,035045</text:p>
          </table:table-cell>
          <table:table-cell office:value-type="float" office:value="3.517E-2" table:style-name="ce8">
            <text:p>0,03517</text:p>
          </table:table-cell>
          <table:table-cell office:value-type="float" office:value="3.5173999999999997E-2" table:style-name="ce8">
            <text:p>0,035174</text:p>
          </table:table-cell>
          <table:table-cell office:value-type="float" office:value="3.4956000000000001E-2" table:style-name="ce8">
            <text:p>0,034956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0.12250800000000001" table:style-name="ce3">
            <text:p>0,122508</text:p>
          </table:table-cell>
          <table:table-cell office:value-type="float" office:value="0.124986" table:style-name="ce3">
            <text:p>0,124986</text:p>
          </table:table-cell>
          <table:table-cell office:value-type="float" office:value="0.14049200000000001" table:style-name="ce3">
            <text:p>0,140492</text:p>
          </table:table-cell>
          <table:table-cell office:value-type="float" office:value="0.12568499999999999" table:style-name="ce3">
            <text:p>0,125685</text:p>
          </table:table-cell>
          <table:table-cell office:value-type="float" office:value="0.13086400000000001" table:style-name="ce3">
            <text:p>0,130864</text:p>
          </table:table-cell>
          <table:table-cell office:value-type="float" office:value="0.12058000000000001" table:style-name="ce3">
            <text:p>0,12058</text:p>
          </table:table-cell>
          <table:table-cell office:value-type="float" office:value="0.116674" table:style-name="ce3">
            <text:p>0,116674</text:p>
          </table:table-cell>
          <table:table-cell office:value-type="float" office:value="0.12596985714285713" table:formula="of:=SUM([.B53:.H53])/7" table:style-name="ce3">
            <text:p>0,125969857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table:style-name="ce5"/>
          <table:table-cell office:value-type="float" office:value="3.5492000000000003E-2" table:style-name="ce8">
            <text:p>0,035492</text:p>
          </table:table-cell>
          <table:table-cell office:value-type="float" office:value="3.5212E-2" table:style-name="ce8">
            <text:p>0,035212</text:p>
          </table:table-cell>
          <table:table-cell office:value-type="float" office:value="3.5705000000000001E-2" table:style-name="ce8">
            <text:p>0,035705</text:p>
          </table:table-cell>
          <table:table-cell office:value-type="float" office:value="3.6534999999999998E-2" table:style-name="ce8">
            <text:p>0,036535</text:p>
          </table:table-cell>
          <table:table-cell office:value-type="float" office:value="3.4522999999999998E-2" table:style-name="ce8">
            <text:p>0,034523</text:p>
          </table:table-cell>
          <table:table-cell office:value-type="float" office:value="3.4811000000000002E-2" table:style-name="ce8">
            <text:p>0,034811</text:p>
          </table:table-cell>
          <table:table-cell office:value-type="float" office:value="3.5269000000000002E-2" table:style-name="ce8">
            <text:p>0,035269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0.15515599999999999" table:style-name="ce3">
            <text:p>0,155156</text:p>
          </table:table-cell>
          <table:table-cell office:value-type="float" office:value="0.166709" table:style-name="ce3">
            <text:p>0,166709</text:p>
          </table:table-cell>
          <table:table-cell office:value-type="float" office:value="0.14185700000000001" table:style-name="ce3">
            <text:p>0,141857</text:p>
          </table:table-cell>
          <table:table-cell office:value-type="float" office:value="0.15076500000000001" table:style-name="ce3">
            <text:p>0,150765</text:p>
          </table:table-cell>
          <table:table-cell office:value-type="float" office:value="0.14754800000000001" table:style-name="ce3">
            <text:p>0,147548</text:p>
          </table:table-cell>
          <table:table-cell office:value-type="float" office:value="0.149788" table:style-name="ce3">
            <text:p>0,149788</text:p>
          </table:table-cell>
          <table:table-cell office:value-type="float" office:value="0.12807499999999999" table:style-name="ce3">
            <text:p>0,128075</text:p>
          </table:table-cell>
          <table:table-cell office:value-type="float" office:value="0.14855685714285713" table:formula="of:=SUM([.B55:.H55])/7" table:style-name="ce3">
            <text:p>0,148556857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table:style-name="ce5"/>
          <table:table-cell office:value-type="float" office:value="3.4729999999999997E-2" table:style-name="ce8">
            <text:p>0,03473</text:p>
          </table:table-cell>
          <table:table-cell office:value-type="float" office:value="3.4867000000000002E-2" table:style-name="ce8">
            <text:p>0,034867</text:p>
          </table:table-cell>
          <table:table-cell office:value-type="float" office:value="3.6503000000000001E-2" table:style-name="ce8">
            <text:p>0,036503</text:p>
          </table:table-cell>
          <table:table-cell office:value-type="float" office:value="3.5201000000000003E-2" table:style-name="ce8">
            <text:p>0,035201</text:p>
          </table:table-cell>
          <table:table-cell office:value-type="float" office:value="3.5236000000000003E-2" table:style-name="ce8">
            <text:p>0,035236</text:p>
          </table:table-cell>
          <table:table-cell office:value-type="float" office:value="3.5548000000000003E-2" table:style-name="ce8">
            <text:p>0,035548</text:p>
          </table:table-cell>
          <table:table-cell office:value-type="float" office:value="3.6235000000000003E-2" table:style-name="ce8">
            <text:p>0,036235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.17605399999999999" table:style-name="ce3">
            <text:p>0,176054</text:p>
          </table:table-cell>
          <table:table-cell office:value-type="float" office:value="0.195018" table:style-name="ce3">
            <text:p>0,195018</text:p>
          </table:table-cell>
          <table:table-cell office:value-type="float" office:value="0.22147500000000001" table:style-name="ce3">
            <text:p>0,221475</text:p>
          </table:table-cell>
          <table:table-cell office:value-type="float" office:value="0.177837" table:style-name="ce3">
            <text:p>0,177837</text:p>
          </table:table-cell>
          <table:table-cell office:value-type="float" office:value="0.18306600000000001" table:style-name="ce3">
            <text:p>0,183066</text:p>
          </table:table-cell>
          <table:table-cell office:value-type="float" office:value="0.17233399999999999" table:style-name="ce3">
            <text:p>0,172334</text:p>
          </table:table-cell>
          <table:table-cell office:value-type="float" office:value="0.192223" table:style-name="ce3">
            <text:p>0,192223</text:p>
          </table:table-cell>
          <table:table-cell office:value-type="float" office:value="0.18828671428571428" table:formula="of:=SUM([.B57:.H57])/7" table:style-name="ce3">
            <text:p>0,188286714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table:style-name="ce5"/>
          <table:table-cell office:value-type="float" office:value="3.5916999999999998E-2" table:style-name="ce8">
            <text:p>0,035917</text:p>
          </table:table-cell>
          <table:table-cell office:value-type="float" office:value="3.5332000000000002E-2" table:style-name="ce8">
            <text:p>0,035332</text:p>
          </table:table-cell>
          <table:table-cell office:value-type="float" office:value="3.4819000000000003E-2" table:style-name="ce8">
            <text:p>0,034819</text:p>
          </table:table-cell>
          <table:table-cell office:value-type="float" office:value="3.5422000000000002E-2" table:style-name="ce8">
            <text:p>0,035422</text:p>
          </table:table-cell>
          <table:table-cell office:value-type="float" office:value="3.6262999999999997E-2" table:style-name="ce8">
            <text:p>0,036263</text:p>
          </table:table-cell>
          <table:table-cell office:value-type="float" office:value="3.6659999999999998E-2" table:style-name="ce8">
            <text:p>0,03666</text:p>
          </table:table-cell>
          <table:table-cell office:value-type="float" office:value="3.5546000000000001E-2" table:style-name="ce8">
            <text:p>0,035546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0.30475799999999997" table:style-name="ce3">
            <text:p>0,304758</text:p>
          </table:table-cell>
          <table:table-cell office:value-type="float" office:value="0.30980600000000003" table:style-name="ce3">
            <text:p>0,309806</text:p>
          </table:table-cell>
          <table:table-cell office:value-type="float" office:value="0.292904" table:style-name="ce3">
            <text:p>0,292904</text:p>
          </table:table-cell>
          <table:table-cell office:value-type="float" office:value="0.32301099999999999" table:style-name="ce3">
            <text:p>0,323011</text:p>
          </table:table-cell>
          <table:table-cell office:value-type="float" office:value="0.27582699999999999" table:style-name="ce3">
            <text:p>0,275827</text:p>
          </table:table-cell>
          <table:table-cell office:value-type="float" office:value="0.30632700000000002" table:style-name="ce3">
            <text:p>0,306327</text:p>
          </table:table-cell>
          <table:table-cell office:value-type="float" office:value="0.29691000000000001" table:style-name="ce3">
            <text:p>0,29691</text:p>
          </table:table-cell>
          <table:table-cell office:value-type="float" office:value="0.30136328571428572" table:formula="of:=SUM([.B59:.H59])/7" table:style-name="ce3">
            <text:p>0,301363286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table:style-name="ce5"/>
          <table:table-cell office:value-type="float" office:value="3.6422999999999997E-2" table:style-name="ce8">
            <text:p>0,036423</text:p>
          </table:table-cell>
          <table:table-cell office:value-type="float" office:value="3.619E-2" table:style-name="ce8">
            <text:p>0,03619</text:p>
          </table:table-cell>
          <table:table-cell office:value-type="float" office:value="3.5402000000000003E-2" table:style-name="ce8">
            <text:p>0,035402</text:p>
          </table:table-cell>
          <table:table-cell office:value-type="float" office:value="3.6770999999999998E-2" table:style-name="ce8">
            <text:p>0,036771</text:p>
          </table:table-cell>
          <table:table-cell office:value-type="float" office:value="3.5201999999999997E-2" table:style-name="ce8">
            <text:p>0,035202</text:p>
          </table:table-cell>
          <table:table-cell office:value-type="float" office:value="3.5248000000000002E-2" table:style-name="ce8">
            <text:p>0,035248</text:p>
          </table:table-cell>
          <table:table-cell office:value-type="float" office:value="3.5038E-2" table:style-name="ce8">
            <text:p>0,035038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0.72458699999999998" table:style-name="ce3">
            <text:p>0,724587</text:p>
          </table:table-cell>
          <table:table-cell office:value-type="float" office:value="0.67593700000000001" table:style-name="ce3">
            <text:p>0,675937</text:p>
          </table:table-cell>
          <table:table-cell office:value-type="float" office:value="0.691272" table:style-name="ce3">
            <text:p>0,691272</text:p>
          </table:table-cell>
          <table:table-cell office:value-type="float" office:value="0.68260500000000002" table:style-name="ce3">
            <text:p>0,682605</text:p>
          </table:table-cell>
          <table:table-cell office:value-type="float" office:value="0.66479299999999997" table:style-name="ce3">
            <text:p>0,664793</text:p>
          </table:table-cell>
          <table:table-cell office:value-type="float" office:value="0.70372800000000002" table:style-name="ce3">
            <text:p>0,703728</text:p>
          </table:table-cell>
          <table:table-cell office:value-type="float" office:value="0.69686499999999996" table:style-name="ce3">
            <text:p>0,696865</text:p>
          </table:table-cell>
          <table:table-cell office:value-type="float" office:value="0.69139814285714285" table:formula="of:=SUM([.B61:.H61])/7" table:style-name="ce3">
            <text:p>0,691398143</text:p>
          </table:table-cell>
          <table:table-cell table:style-name="ce3"/>
          <table:table-cell table:style-name="ce10"/>
          <table:table-cell table:style-name="ce3"/>
          <table:table-cell table:style-name="ce5"/>
          <table:table-cell table:number-columns-repeated="16371" table:style-name="ce10"/>
        </table:table-row>
        <table:table-row table:style-name="ro2">
          <table:table-cell table:style-name="ce5"/>
          <table:table-cell office:value-type="float" office:value="3.7141E-2" table:style-name="ce8">
            <text:p>0,037141</text:p>
          </table:table-cell>
          <table:table-cell office:value-type="float" office:value="3.5319000000000003E-2" table:style-name="ce8">
            <text:p>0,035319</text:p>
          </table:table-cell>
          <table:table-cell office:value-type="float" office:value="3.5262000000000002E-2" table:style-name="ce8">
            <text:p>0,035262</text:p>
          </table:table-cell>
          <table:table-cell office:value-type="float" office:value="3.6084999999999999E-2" table:style-name="ce8">
            <text:p>0,036085</text:p>
          </table:table-cell>
          <table:table-cell office:value-type="float" office:value="3.5735000000000003E-2" table:style-name="ce8">
            <text:p>0,035735</text:p>
          </table:table-cell>
          <table:table-cell office:value-type="float" office:value="3.6457000000000003E-2" table:style-name="ce8">
            <text:p>0,036457</text:p>
          </table:table-cell>
          <table:table-cell office:value-type="float" office:value="3.4884999999999999E-2" table:style-name="ce8">
            <text:p>0,034885</text:p>
          </table:table-cell>
          <table:table-cell table:style-name="ce10"/>
          <table:table-cell table:number-columns-repeated="3" table:style-name="ce3"/>
          <table:table-cell table:style-name="ce5"/>
          <table:table-cell table:number-columns-repeated="16371" table:style-name="ce1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.16107" table:style-name="ce3">
            <text:p>2,16107</text:p>
          </table:table-cell>
          <table:table-cell office:value-type="float" office:value="2.1703100000000002" table:style-name="ce3">
            <text:p>2,17031</text:p>
          </table:table-cell>
          <table:table-cell office:value-type="float" office:value="2.1786400000000001" table:style-name="ce3">
            <text:p>2,17864</text:p>
          </table:table-cell>
          <table:table-cell office:value-type="float" office:value="2.1879499999999998" table:style-name="ce3">
            <text:p>2,18795</text:p>
          </table:table-cell>
          <table:table-cell office:value-type="float" office:value="2.1660300000000001" table:style-name="ce3">
            <text:p>2,16603</text:p>
          </table:table-cell>
          <table:table-cell office:value-type="float" office:value="2.1753399999999998" table:style-name="ce3">
            <text:p>2,17534</text:p>
          </table:table-cell>
          <table:table-cell office:value-type="float" office:value="2.1628599999999998" table:style-name="ce3">
            <text:p>2,16286</text:p>
          </table:table-cell>
          <table:table-cell office:value-type="float" office:value="2.1717428571428572" table:formula="of:=SUM([.B63:.H63])/7" table:style-name="ce3">
            <text:p>2,171742857</text:p>
          </table:table-cell>
          <table:table-cell table:number-columns-repeated="16375" table:style-name="ce3"/>
        </table:table-row>
        <table:table-row table:style-name="ro2">
          <table:table-cell table:style-name="ce5"/>
          <table:table-cell office:value-type="float" office:value="3.5497000000000001E-2" table:style-name="ce8">
            <text:p>0,035497</text:p>
          </table:table-cell>
          <table:table-cell office:value-type="float" office:value="3.5334999999999998E-2" table:style-name="ce8">
            <text:p>0,035335</text:p>
          </table:table-cell>
          <table:table-cell office:value-type="float" office:value="3.4122E-2" table:style-name="ce8">
            <text:p>0,034122</text:p>
          </table:table-cell>
          <table:table-cell office:value-type="float" office:value="3.5893000000000001E-2" table:style-name="ce8">
            <text:p>0,035893</text:p>
          </table:table-cell>
          <table:table-cell office:value-type="float" office:value="3.5639999999999998E-2" table:style-name="ce8">
            <text:p>0,03564</text:p>
          </table:table-cell>
          <table:table-cell office:value-type="float" office:value="3.5255000000000002E-2" table:style-name="ce8">
            <text:p>0,035255</text:p>
          </table:table-cell>
          <table:table-cell office:value-type="float" office:value="3.5046000000000001E-2" table:style-name="ce8">
            <text:p>0,035046</text:p>
          </table:table-cell>
          <table:table-cell table:style-name="ce8"/>
          <table:table-cell table:style-name="ce10"/>
          <table:table-cell table:number-columns-repeated="16374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9">
            <text:p>Buildtime</text:p>
          </table:table-cell>
          <table:table-cell table:number-columns-repeated="3" table:style-name="ce3"/>
          <table:table-cell table:style-name="ce10"/>
          <table:table-cell table:style-name="ce10">
            <draw:frame draw:z-index="1" draw:id="id0" draw:style-name="a0" draw:name="Diagramm 3" svg:x="0.03738in" svg:y="0.19914in" svg:width="4.05637in" svg:height="2.4258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4">
            <text:p>Ebenen</text:p>
          </table:table-cell>
          <table:table-cell office:value-type="string" table:style-name="ce4">
            <text:p>Thinkpad P15</text:p>
          </table:table-cell>
          <table:table-cell office:value-type="string" table:style-name="ce4">
            <text:p>ASUS ZenBook</text:p>
          </table:table-cell>
          <table:table-cell office:value-type="string" table:style-name="ce4">
            <text:p>Thinkpad P14s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.2428571428571428E-2" table:formula="of:=SUM([.B6:.H6])/7" table:style-name="ce8">
            <text:p>0,012428571</text:p>
          </table:table-cell>
          <table:table-cell office:value-type="float" office:value="0.2802857142857143" table:formula="of:=SUM([.B27:.H27])/7" table:style-name="ce8">
            <text:p>0,280285714</text:p>
          </table:table-cell>
          <table:table-cell office:value-type="float" office:value="3.5178714285714285E-2" table:formula="of:=SUM([.B48:.H48])/7" table:style-name="ce8">
            <text:p>0,035178714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.2857142857142857E-2" table:formula="of:=SUM([.B8:.H8])/7" table:style-name="ce8">
            <text:p>0,012857143</text:p>
          </table:table-cell>
          <table:table-cell office:value-type="float" office:value="0.28000000000000008" table:formula="of:=SUM([.B29:.H29])/7" table:style-name="ce8">
            <text:p>0,28</text:p>
          </table:table-cell>
          <table:table-cell office:value-type="float" office:value="3.5352428571428576E-2" table:formula="of:=SUM([.B50:.H50])/7" table:style-name="ce8">
            <text:p>0,035352429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.2714285714285714E-2" table:formula="of:=SUM([.B10:.H10])/7" table:style-name="ce8">
            <text:p>0,012714286</text:p>
          </table:table-cell>
          <table:table-cell office:value-type="float" office:value="0.28842857142857142" table:formula="of:=SUM([.B31:.H31])/7" table:style-name="ce8">
            <text:p>0,288428571</text:p>
          </table:table-cell>
          <table:table-cell office:value-type="float" office:value="3.531871428571428E-2" table:formula="of:=SUM([.B52:.H52])/7" table:style-name="ce8">
            <text:p>0,035318714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.2714285714285714E-2" table:formula="of:=SUM([.B12:.H12])/7" table:style-name="ce8">
            <text:p>0,012714286</text:p>
          </table:table-cell>
          <table:table-cell office:value-type="float" office:value="0.28599999999999998" table:formula="of:=SUM([.B33:.H33])/7" table:style-name="ce8">
            <text:p>0,286</text:p>
          </table:table-cell>
          <table:table-cell office:value-type="float" office:value="3.5363857142857148E-2" table:formula="of:=SUM([.B54:.H54])/7" table:style-name="ce8">
            <text:p>0,035363857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.3714285714285712E-2" table:formula="of:=SUM([.B14:.H14])/7" table:style-name="ce8">
            <text:p>0,013714286</text:p>
          </table:table-cell>
          <table:table-cell office:value-type="float" office:value="0.28057142857142864" table:formula="of:=SUM([.B35:.H35])/7" table:style-name="ce8">
            <text:p>0,280571429</text:p>
          </table:table-cell>
          <table:table-cell office:value-type="float" office:value="3.5474285714285715E-2" table:formula="of:=SUM([.B56:.H56])/7" table:style-name="ce8">
            <text:p>0,035474286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.5714285714285715E-2" table:formula="of:=SUM([.B16:.H16])/7" table:style-name="ce8">
            <text:p>0,015714286</text:p>
          </table:table-cell>
          <table:table-cell office:value-type="float" office:value="0.28842857142857142" table:formula="of:=SUM([.B37:.H37])/7" table:style-name="ce8">
            <text:p>0,288428571</text:p>
          </table:table-cell>
          <table:table-cell office:value-type="float" office:value="3.5708428571428572E-2" table:formula="of:=SUM([.B58:.H58])/7" table:style-name="ce8">
            <text:p>0,035708429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.1571428571428571E-2" table:formula="of:=SUM([.B18:.H18])/7" table:style-name="ce8">
            <text:p>0,011571429</text:p>
          </table:table-cell>
          <table:table-cell office:value-type="float" office:value="0.28557142857142859" table:formula="of:=SUM([.B39:.H39])/7" table:style-name="ce8">
            <text:p>0,285571429</text:p>
          </table:table-cell>
          <table:table-cell office:value-type="float" office:value="3.5753428571428568E-2" table:formula="of:=SUM([.B60:.H60])/7" table:style-name="ce8">
            <text:p>0,035753429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.057142857142857E-2" table:formula="of:=SUM([.B20:.H20])/7" table:style-name="ce8">
            <text:p>0,010571429</text:p>
          </table:table-cell>
          <table:table-cell office:value-type="float" office:value="0.2917142857142857" table:formula="of:=SUM([.B41:.H41])/7" table:style-name="ce8">
            <text:p>0,291714286</text:p>
          </table:table-cell>
          <table:table-cell office:value-type="float" office:value="3.584057142857143E-2" table:formula="of:=SUM([.B62:.H62])/7" table:style-name="ce8">
            <text:p>0,035840571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.1571428571428571E-2" table:formula="of:=SUM([.B22:.H22])/7" table:style-name="ce8">
            <text:p>0,011571429</text:p>
          </table:table-cell>
          <table:table-cell office:value-type="float" office:value="0.2945714285714286" table:formula="of:=SUM([.B43:.H43])/7" table:style-name="ce8">
            <text:p>0,294571429</text:p>
          </table:table-cell>
          <table:table-cell office:value-type="float" office:value="3.525542857142857E-2" table:formula="of:=SUM([.B64:.H64])/7" table:style-name="ce8">
            <text:p>0,035255429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number-columns-repeated="4" table:style-name="ce3"/>
          <table:table-cell table:number-columns-repeated="2" table:style-name="ce10"/>
          <table:table-cell table:number-columns-repeated="16378"/>
        </table:table-row>
        <table:table-row table:style-name="ro2">
          <table:table-cell table:style-name="ce3"/>
          <table:table-cell table:style-name="ce5"/>
          <table:table-cell table:number-columns-repeated="2" table:style-name="ce3"/>
          <table:table-cell table:number-columns-repeated="2" table:style-name="ce10"/>
          <table:table-cell table:number-columns-repeated="16378"/>
        </table:table-row>
        <table:table-row table:style-name="ro2">
          <table:table-cell table:number-columns-repeated="4" table:style-name="ce3"/>
          <table:table-cell table:number-columns-repeated="2" table:style-name="ce10"/>
          <table:table-cell table:number-columns-repeated="16378"/>
        </table:table-row>
        <table:table-row table:style-name="ro2">
          <table:table-cell/>
          <table:table-cell table:style-name="ce5"/>
          <table:table-cell table:number-columns-repeated="2" table:style-name="ce3"/>
          <table:table-cell table:number-columns-repeated="2" table:style-name="ce10"/>
          <table:table-cell table:number-columns-repeated="16378"/>
        </table:table-row>
        <table:table-row table:style-name="ro2">
          <table:table-cell/>
          <table:table-cell table:number-columns-repeated="3" table:style-name="ce3"/>
          <table:table-cell table:number-columns-repeated="2" table:style-name="ce10"/>
          <table:table-cell table:number-columns-repeated="16378"/>
        </table:table-row>
        <table:table-row table:style-name="ro2">
          <table:table-cell/>
          <table:table-cell table:style-name="ce5"/>
          <table:table-cell table:number-columns-repeated="4" table:style-name="ce10"/>
          <table:table-cell table:number-columns-repeated="16378"/>
        </table:table-row>
        <table:table-row table:style-name="ro2">
          <table:table-cell/>
          <table:table-cell table:style-name="ce3"/>
          <table:table-cell table:number-columns-repeated="4" table:style-name="ce10"/>
          <table:table-cell table:number-columns-repeated="16378"/>
        </table:table-row>
        <table:table-row table:style-name="ro2">
          <table:table-cell/>
          <table:table-cell table:style-name="ce5"/>
          <table:table-cell table:number-columns-repeated="4" table:style-name="ce10"/>
          <table:table-cell table:number-columns-repeated="16378"/>
        </table:table-row>
        <table:table-row table:style-name="ro2">
          <table:table-cell/>
          <table:table-cell table:style-name="ce3"/>
          <table:table-cell table:number-columns-repeated="4" table:style-name="ce10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number-columns-repeated="4" table:style-name="ce10"/>
          <table:table-cell table:number-columns-repeated="16378"/>
        </table:table-row>
        <table:table-row table:style-name="ro2">
          <table:table-cell/>
          <table:table-cell table:style-name="ce4"/>
          <table:table-cell table:number-columns-repeated="4" table:style-name="ce10"/>
          <table:table-cell table:number-columns-repeated="16378"/>
        </table:table-row>
        <table:table-row table:style-name="ro2">
          <table:table-cell/>
          <table:table-cell table:style-name="ce3"/>
          <table:table-cell table:number-columns-repeated="4" table:style-name="ce10"/>
          <table:table-cell table:number-columns-repeated="16378"/>
        </table:table-row>
        <table:table-row table:number-rows-repeated="10" table:style-name="ro2">
          <table:table-cell/>
          <table:table-cell table:style-name="ce5"/>
          <table:table-cell table:number-columns-repeated="4" table:style-name="ce10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Vergleiche" table:style-name="ta3"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2" table:default-cell-style-name="ce3"/>
        <table:table-column table:style-name="co15" table:default-cell-style-name="ce3"/>
        <table:table-column table:style-name="co16" table:default-cell-style-name="ce3"/>
        <table:table-column table:style-name="co2" table:number-columns-repeated="16378" table:default-cell-style-name="ce3"/>
        <table:table-row table:style-name="ro1">
          <table:table-cell office:value-type="string" table:number-columns-spanned="3" table:number-rows-spanned="1" table:style-name="ce19">
            <text:p>Auswertung Zeitmessungen</text:p>
          </table:table-cell>
          <table:covered-table-cell table:number-columns-repeated="2"/>
          <table:table-cell table:style-name="ce18"/>
          <table:table-cell table:number-columns-repeated="16380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4" table:number-rows-spanned="1" table:style-name="ce6">
            <text:p>Thinkpad P15 Gen 2</text:p>
          </table:table-cell>
          <table:covered-table-cell table:number-columns-repeated="3"/>
          <table:table-cell table:number-columns-repeated="16380" table:style-name="ce3"/>
        </table:table-row>
        <table:table-row table:style-name="ro2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mp</text:p>
          </table:table-cell>
          <table:table-cell table:style-name="ce3"/>
          <table:table-cell office:value-type="string" table:style-name="ce4">
            <text:p>Beschleunigungsfaktor</text:p>
          </table:table-cell>
          <table:table-cell office:value-type="string" table:style-name="ce11">
            <text:p>in %</text:p>
          </table:table-cell>
          <table:table-cell table:style-name="ce3">
            <draw:frame draw:z-index="1" draw:id="id1" draw:style-name="a1" draw:name="Diagramm 5" svg:x="0.83128in" svg:y="0.00231in" svg:width="3.39567in" svg:height="2.430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3">
            <draw:frame draw:z-index="2" draw:id="id2" draw:style-name="a2" draw:name="Diagramm 6" svg:x="0.20346in" svg:y="0.00271in" svg:width="5.3126in" svg:height="2.4322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.28571E-3" table:style-name="ce12">
            <text:p>0,00128571</text:p>
          </table:table-cell>
          <table:table-cell table:number-columns-repeated="16381" table:style-name="ce3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7.1429000000000002E-4" table:style-name="ce13">
            <text:p>0,00071429</text:p>
          </table:table-cell>
          <table:table-cell office:value-type="float" office:value="1.71429E-3" table:style-name="ce12">
            <text:p>0,00171429</text:p>
          </table:table-cell>
          <table:table-cell table:style-name="ce3"/>
          <table:table-cell office:value-type="float" office:value="2.3999916000503996" table:formula="of:=[.C6]/[.B6]" table:style-name="ce3">
            <text:p>2,3999916</text:p>
          </table:table-cell>
          <table:table-cell office:value-type="float" office:value="239.99916000503995" table:formula="of:=[.E6]*100" table:style-name="ce3">
            <text:p>239,99916</text:p>
          </table:table-cell>
          <table:table-cell table:number-columns-repeated="16378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.1428599999999999E-3" table:style-name="ce13">
            <text:p>0,00214286</text:p>
          </table:table-cell>
          <table:table-cell office:value-type="float" office:value="2E-3" table:style-name="ce12">
            <text:p>0,002</text:p>
          </table:table-cell>
          <table:table-cell table:style-name="ce3"/>
          <table:table-cell office:value-type="float" office:value="0.93333208889054819" table:formula="of:=[.C7]/[.B7]" table:style-name="ce3">
            <text:p>0,933332089</text:p>
          </table:table-cell>
          <table:table-cell office:value-type="float" office:value="93.333208889054816" table:formula="of:=[.E7]*100" table:style-name="ce3">
            <text:p>93,33320889</text:p>
          </table:table-cell>
          <table:table-cell table:number-columns-repeated="1637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.4285699999999998E-3" table:style-name="ce13">
            <text:p>0,00742857</text:p>
          </table:table-cell>
          <table:table-cell office:value-type="float" office:value="3.57143E-3" table:style-name="ce12">
            <text:p>0,00357143</text:p>
          </table:table-cell>
          <table:table-cell table:style-name="ce3"/>
          <table:table-cell office:value-type="float" office:value="0.48076951553259917" table:formula="of:=[.C8]/[.B8]" table:style-name="ce3">
            <text:p>0,480769516</text:p>
          </table:table-cell>
          <table:table-cell office:value-type="float" office:value="48.076951553259917" table:formula="of:=[.E8]*100" table:style-name="ce3">
            <text:p>48,07695155</text:p>
          </table:table-cell>
          <table:table-cell table:number-columns-repeated="1637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3.457143E-2" table:style-name="ce13">
            <text:p>0,03457143</text:p>
          </table:table-cell>
          <table:table-cell office:value-type="float" office:value="9.5714300000000006E-3" table:style-name="ce12">
            <text:p>0,00957143</text:p>
          </table:table-cell>
          <table:table-cell table:style-name="ce3"/>
          <table:table-cell office:value-type="float" office:value="0.27685953401406888" table:formula="of:=[.C9]/[.B9]" table:style-name="ce3">
            <text:p>0,276859534</text:p>
          </table:table-cell>
          <table:table-cell office:value-type="float" office:value="27.685953401406888" table:formula="of:=[.E9]*100" table:style-name="ce3">
            <text:p>27,68595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mp</text:p>
          </table:table-cell>
          <table:table-cell table:number-columns-repeated="16381" table:style-name="ce3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.15585714000000001" table:style-name="ce13">
            <text:p>0,15585714</text:p>
          </table:table-cell>
          <table:table-cell office:value-type="float" office:value="2.8285709999999999E-2" table:style-name="ce12">
            <text:p>0,02828571</text:p>
          </table:table-cell>
          <table:table-cell table:style-name="ce3"/>
          <table:table-cell office:value-type="float" office:value="0.18148485208954815" table:formula="of:=[.C11]/[.B11]" table:style-name="ce3">
            <text:p>0,181484852</text:p>
          </table:table-cell>
          <table:table-cell office:value-type="float" office:value="18.148485208954813" table:formula="of:=[.E11]*100" table:style-name="ce3">
            <text:p>18,14848521</text:p>
          </table:table-cell>
          <table:table-cell table:number-columns-repeated="1637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0.63042856999999997" table:style-name="ce13">
            <text:p>0,63042857</text:p>
          </table:table-cell>
          <table:table-cell office:value-type="float" office:value="9.8142859999999998E-2" table:style-name="ce12">
            <text:p>0,09814286</text:p>
          </table:table-cell>
          <table:table-cell table:style-name="ce3"/>
          <table:table-cell office:value-type="float" office:value="0.15567641548986272" table:formula="of:=[.C12]/[.B12]" table:style-name="ce3">
            <text:p>0,155676415</text:p>
          </table:table-cell>
          <table:table-cell office:value-type="float" office:value="15.567641548986272" table:formula="of:=[.E12]*100" table:style-name="ce3">
            <text:p>15,56764155</text:p>
          </table:table-cell>
          <table:table-cell table:number-columns-repeated="1637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.4335714300000002" table:style-name="ce13">
            <text:p>2,43357143</text:p>
          </table:table-cell>
          <table:table-cell office:value-type="float" office:value="0.36514286000000001" table:style-name="ce12">
            <text:p>0,36514286</text:p>
          </table:table-cell>
          <table:table-cell table:style-name="ce3"/>
          <table:table-cell office:value-type="float" office:value="0.1500440280892022" table:formula="of:=[.C13]/[.B13]" table:style-name="ce3">
            <text:p>0,150044028</text:p>
          </table:table-cell>
          <table:table-cell office:value-type="float" office:value="15.00440280892022" table:formula="of:=[.E13]*100" table:style-name="ce3">
            <text:p>15,00440281</text:p>
          </table:table-cell>
          <table:table-cell table:number-columns-repeated="1637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7.516857099999999" table:style-name="ce13">
            <text:p>17,5168571</text:p>
          </table:table-cell>
          <table:table-cell office:value-type="float" office:value="1.3074285699999999" table:style-name="ce12">
            <text:p>1,30742857</text:p>
          </table:table-cell>
          <table:table-cell table:style-name="ce3"/>
          <table:table-cell office:value-type="float" office:value="7.4638307690481756E-2" table:formula="of:=[.C14]/[.B14]" table:style-name="ce3">
            <text:p>0,074638308</text:p>
          </table:table-cell>
          <table:table-cell office:value-type="float" office:value="7.463830769048176" table:formula="of:=[.E14]*100" table:style-name="ce3">
            <text:p>7,463830769</text:p>
          </table:table-cell>
          <table:table-cell table:number-columns-repeated="16378"/>
        </table:table-row>
        <table:table-row table:number-rows-repeated="3" table:style-name="ro2">
          <table:table-cell table:style-name="ce4"/>
          <table:table-cell table:number-columns-repeated="16383" table:style-name="ce3"/>
        </table:table-row>
        <table:table-row table:style-name="ro2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cl</text:p>
          </table:table-cell>
          <table:table-cell table:style-name="ce3"/>
          <table:table-cell office:value-type="string" table:style-name="ce4">
            <text:p>Beschleunigungsfaktor</text:p>
          </table:table-cell>
          <table:table-cell office:value-type="string" table:style-name="ce11">
            <text:p>in %</text:p>
          </table:table-cell>
          <table:table-cell/>
          <table:table-cell table:style-name="ce3">
            <draw:frame draw:z-index="3" draw:id="id3" draw:style-name="a3" draw:name="Diagramm 7" svg:x="0.01922in" svg:y="0.01058in" svg:width="3.4374in" svg:height="2.4708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3">
            <draw:frame draw:z-index="4" draw:id="id4" draw:style-name="a4" draw:name="Diagramm 8" svg:x="0.22749in" svg:y="0.01058in" svg:width="5.29173in" svg:height="2.481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.26128571" table:style-name="ce13">
            <text:p>0,26128571</text:p>
          </table:table-cell>
          <table:table-cell table:number-columns-repeated="16381" table:style-name="ce3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7.1429000000000002E-4" table:style-name="ce13">
            <text:p>0,00071429</text:p>
          </table:table-cell>
          <table:table-cell office:value-type="float" office:value="0.26114285999999998" table:style-name="ce13">
            <text:p>0,26114286</text:p>
          </table:table-cell>
          <table:table-cell table:style-name="ce3"/>
          <table:table-cell office:value-type="float" office:value="365.59781041313749" table:formula="of:=[.C20]/[.B20]" table:style-name="ce3">
            <text:p>365,5978104</text:p>
          </table:table-cell>
          <table:table-cell office:value-type="float" office:value="36559.781041313749" table:formula="of:=[.E20]*100" table:style-name="ce3">
            <text:p>36559,78104</text:p>
          </table:table-cell>
          <table:table-cell table:number-columns-repeated="16378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.1428599999999999E-3" table:style-name="ce13">
            <text:p>0,00214286</text:p>
          </table:table-cell>
          <table:table-cell office:value-type="float" office:value="0.25800000000000001" table:style-name="ce13">
            <text:p>0,258</text:p>
          </table:table-cell>
          <table:table-cell table:style-name="ce3"/>
          <table:table-cell office:value-type="float" office:value="120.39983946688072" table:formula="of:=[.C21]/[.B21]" table:style-name="ce3">
            <text:p>120,3998395</text:p>
          </table:table-cell>
          <table:table-cell office:value-type="float" office:value="12039.983946688071" table:formula="of:=[.E21]*100" table:style-name="ce3">
            <text:p>12039,98395</text:p>
          </table:table-cell>
          <table:table-cell table:number-columns-repeated="1637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.4285699999999998E-3" table:style-name="ce13">
            <text:p>0,00742857</text:p>
          </table:table-cell>
          <table:table-cell office:value-type="float" office:value="0.26585713999999999" table:style-name="ce13">
            <text:p>0,26585714</text:p>
          </table:table-cell>
          <table:table-cell table:style-name="ce3"/>
          <table:table-cell office:value-type="float" office:value="35.788468036243856" table:formula="of:=[.C22]/[.B22]" table:style-name="ce3">
            <text:p>35,78846804</text:p>
          </table:table-cell>
          <table:table-cell office:value-type="float" office:value="3578.8468036243858" table:formula="of:=[.E22]*100" table:style-name="ce3">
            <text:p>3578,846804</text:p>
          </table:table-cell>
          <table:table-cell table:number-columns-repeated="1637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3.457143E-2" table:style-name="ce13">
            <text:p>0,03457143</text:p>
          </table:table-cell>
          <table:table-cell office:value-type="float" office:value="0.27785714" table:style-name="ce13">
            <text:p>0,27785714</text:p>
          </table:table-cell>
          <table:table-cell table:style-name="ce3"/>
          <table:table-cell office:value-type="float" office:value="8.037189667884725" table:formula="of:=[.C23]/[.B23]" table:style-name="ce3">
            <text:p>8,037189668</text:p>
          </table:table-cell>
          <table:table-cell office:value-type="float" office:value="803.71896678847247" table:formula="of:=[.E23]*100" table:style-name="ce3">
            <text:p>803,718966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cl</text:p>
          </table:table-cell>
          <table:table-cell table:number-columns-repeated="16381" table:style-name="ce3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.15585714000000001" table:style-name="ce13">
            <text:p>0,15585714</text:p>
          </table:table-cell>
          <table:table-cell office:value-type="float" office:value="0.28814286" table:style-name="ce13">
            <text:p>0,28814286</text:p>
          </table:table-cell>
          <table:table-cell table:style-name="ce3"/>
          <table:table-cell office:value-type="float" office:value="1.8487626553393703" table:formula="of:=[.C25]/[.B25]" table:style-name="ce3">
            <text:p>1,848762655</text:p>
          </table:table-cell>
          <table:table-cell office:value-type="float" office:value="184.87626553393704" table:formula="of:=[.E25]*100" table:style-name="ce3">
            <text:p>184,8762655</text:p>
          </table:table-cell>
          <table:table-cell table:number-columns-repeated="16378"/>
        </table:table-row>
        <table:table-row table:style-name="ro4">
          <table:table-cell office:value-type="float" office:value="17" table:style-name="ce5">
            <text:p>17</text:p>
          </table:table-cell>
          <table:table-cell office:value-type="float" office:value="0.63042856999999997" table:style-name="ce13">
            <text:p>0,63042857</text:p>
          </table:table-cell>
          <table:table-cell office:value-type="float" office:value="0.37" table:style-name="ce13">
            <text:p>0,37</text:p>
          </table:table-cell>
          <table:table-cell table:style-name="ce3"/>
          <table:table-cell office:value-type="float" office:value="0.58690233534308256" table:formula="of:=[.C26]/[.B26]" table:style-name="ce3">
            <text:p>0,586902335</text:p>
          </table:table-cell>
          <table:table-cell office:value-type="float" office:value="58.690233534308256" table:formula="of:=[.E26]*100" table:style-name="ce3">
            <text:p>58,69023353</text:p>
          </table:table-cell>
          <table:table-cell table:number-columns-repeated="16378"/>
        </table:table-row>
        <table:table-row table:style-name="ro4">
          <table:table-cell office:value-type="float" office:value="19" table:style-name="ce5">
            <text:p>19</text:p>
          </table:table-cell>
          <table:table-cell office:value-type="float" office:value="2.4335714300000002" table:style-name="ce13">
            <text:p>2,43357143</text:p>
          </table:table-cell>
          <table:table-cell office:value-type="float" office:value="0.75085714000000003" table:style-name="ce13">
            <text:p>0,75085714</text:p>
          </table:table-cell>
          <table:table-cell table:style-name="ce3"/>
          <table:table-cell office:value-type="float" office:value="0.3085412372711821" table:formula="of:=[.C27]/[.B27]" table:style-name="ce3">
            <text:p>0,308541237</text:p>
          </table:table-cell>
          <table:table-cell office:value-type="float" office:value="30.85412372711821" table:formula="of:=[.E27]*100" table:style-name="ce3">
            <text:p>30,85412373</text:p>
          </table:table-cell>
          <table:table-cell table:number-columns-repeated="16378"/>
        </table:table-row>
        <table:table-row table:style-name="ro4">
          <table:table-cell office:value-type="float" office:value="21" table:style-name="ce5">
            <text:p>21</text:p>
          </table:table-cell>
          <table:table-cell office:value-type="float" office:value="17.516857099999999" table:style-name="ce13">
            <text:p>17,5168571</text:p>
          </table:table-cell>
          <table:table-cell office:value-type="float" office:value="2.3858571400000002" table:style-name="ce13">
            <text:p>2,38585714</text:p>
          </table:table-cell>
          <table:table-cell table:style-name="ce3"/>
          <table:table-cell office:value-type="float" office:value="0.13620349394755296" table:formula="of:=[.C28]/[.B28]" table:style-name="ce3">
            <text:p>0,136203494</text:p>
          </table:table-cell>
          <table:table-cell office:value-type="float" office:value="13.620349394755296" table:formula="of:=[.E28]*100" table:style-name="ce3">
            <text:p>13,62034939</text:p>
          </table:table-cell>
          <table:table-cell table:number-columns-repeated="16378"/>
        </table:table-row>
        <table:table-row table:style-name="ro4">
          <table:table-cell table:style-name="ce5"/>
          <table:table-cell table:number-columns-repeated="16383" table:style-name="ce3"/>
        </table:table-row>
        <table:table-row table:number-rows-repeated="2" table:style-name="ro4">
          <table:table-cell table:style-name="ce4"/>
          <table:table-cell table:number-columns-repeated="16383" table:style-name="ce3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parallel omp</text:p>
          </table:table-cell>
          <table:table-cell office:value-type="string" table:style-name="ce4">
            <text:p>parallel ocl</text:p>
          </table:table-cell>
          <table:table-cell table:style-name="ce3"/>
          <table:table-cell office:value-type="string" table:style-name="ce4">
            <text:p>Beschleunigungsfaktor</text:p>
          </table:table-cell>
          <table:table-cell office:value-type="string" table:style-name="ce11">
            <text:p>in %</text:p>
          </table:table-cell>
          <table:table-cell/>
          <table:table-cell table:style-name="ce3">
            <draw:frame draw:z-index="5" draw:id="id5" draw:style-name="a5" draw:name="Diagramm 9" svg:x="0.01414in" svg:y="0.00827in" svg:width="5.39567in" svg:height="2.50039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4">
          <table:table-cell office:value-type="float" office:value="5" table:style-name="ce5">
            <text:p>5</text:p>
          </table:table-cell>
          <table:table-cell office:value-type="float" office:value="1.28571E-3" table:style-name="ce12">
            <text:p>0,00128571</text:p>
          </table:table-cell>
          <table:table-cell office:value-type="float" office:value="0.26128571" table:style-name="ce13">
            <text:p>0,26128571</text:p>
          </table:table-cell>
          <table:table-cell table:style-name="ce3"/>
          <table:table-cell office:value-type="float" office:value="203.22289629854322" table:formula="of:=[.C33]/[.B33]" table:style-name="ce3">
            <text:p>203,2228963</text:p>
          </table:table-cell>
          <table:table-cell office:value-type="float" office:value="20322.28962985432" table:formula="of:=[.E33]*100" table:style-name="ce3">
            <text:p>20322,28963</text:p>
          </table:table-cell>
          <table:table-cell table:number-columns-repeated="16378"/>
        </table:table-row>
        <table:table-row table:style-name="ro4">
          <table:table-cell office:value-type="float" office:value="7" table:style-name="ce5">
            <text:p>7</text:p>
          </table:table-cell>
          <table:table-cell office:value-type="float" office:value="1.71429E-3" table:style-name="ce12">
            <text:p>0,00171429</text:p>
          </table:table-cell>
          <table:table-cell office:value-type="float" office:value="0.26114285999999998" table:style-name="ce13">
            <text:p>0,26114286</text:p>
          </table:table-cell>
          <table:table-cell table:style-name="ce3"/>
          <table:table-cell office:value-type="float" office:value="152.33295416761456" table:formula="of:=[.C34]/[.B34]" table:style-name="ce3">
            <text:p>152,3329542</text:p>
          </table:table-cell>
          <table:table-cell office:value-type="float" office:value="15233.295416761455" table:formula="of:=[.E34]*100" table:style-name="ce3">
            <text:p>15233,29542</text:p>
          </table:table-cell>
          <table:table-cell table:number-columns-repeated="16378"/>
        </table:table-row>
        <table:table-row table:style-name="ro4">
          <table:table-cell office:value-type="float" office:value="9" table:style-name="ce5">
            <text:p>9</text:p>
          </table:table-cell>
          <table:table-cell office:value-type="float" office:value="2E-3" table:style-name="ce12">
            <text:p>0,002</text:p>
          </table:table-cell>
          <table:table-cell office:value-type="float" office:value="0.25800000000000001" table:style-name="ce13">
            <text:p>0,258</text:p>
          </table:table-cell>
          <table:table-cell table:style-name="ce3"/>
          <table:table-cell office:value-type="float" office:value="129" table:formula="of:=[.C35]/[.B35]" table:style-name="ce3">
            <text:p>129</text:p>
          </table:table-cell>
          <table:table-cell office:value-type="float" office:value="12900" table:formula="of:=[.E35]*100" table:style-name="ce3">
            <text:p>12900</text:p>
          </table:table-cell>
          <table:table-cell table:number-columns-repeated="16378"/>
        </table:table-row>
        <table:table-row table:style-name="ro4">
          <table:table-cell office:value-type="float" office:value="11" table:style-name="ce5">
            <text:p>11</text:p>
          </table:table-cell>
          <table:table-cell office:value-type="float" office:value="3.57143E-3" table:style-name="ce12">
            <text:p>0,00357143</text:p>
          </table:table-cell>
          <table:table-cell office:value-type="float" office:value="0.26585713999999999" table:style-name="ce13">
            <text:p>0,26585714</text:p>
          </table:table-cell>
          <table:table-cell table:style-name="ce3"/>
          <table:table-cell office:value-type="float" office:value="74.439969424012233" table:formula="of:=[.C36]/[.B36]" table:style-name="ce3">
            <text:p>74,43996942</text:p>
          </table:table-cell>
          <table:table-cell office:value-type="float" office:value="7443.9969424012234" table:formula="of:=[.E36]*100" table:style-name="ce3">
            <text:p>7443,996942</text:p>
          </table:table-cell>
          <table:table-cell table:number-columns-repeated="16378"/>
        </table:table-row>
        <table:table-row table:style-name="ro4">
          <table:table-cell office:value-type="float" office:value="13" table:style-name="ce5">
            <text:p>13</text:p>
          </table:table-cell>
          <table:table-cell office:value-type="float" office:value="9.5714300000000006E-3" table:style-name="ce12">
            <text:p>0,00957143</text:p>
          </table:table-cell>
          <table:table-cell office:value-type="float" office:value="0.27785714" table:style-name="ce13">
            <text:p>0,27785714</text:p>
          </table:table-cell>
          <table:table-cell table:style-name="ce3"/>
          <table:table-cell office:value-type="float" office:value="29.029846114948338" table:formula="of:=[.C37]/[.B37]" table:style-name="ce3">
            <text:p>29,02984611</text:p>
          </table:table-cell>
          <table:table-cell office:value-type="float" office:value="2902.9846114948336" table:formula="of:=[.E37]*100" table:style-name="ce3">
            <text:p>2902,984611</text:p>
          </table:table-cell>
          <table:table-cell table:number-columns-repeated="16378"/>
        </table:table-row>
        <table:table-row table:style-name="ro4">
          <table:table-cell office:value-type="float" office:value="15" table:style-name="ce5">
            <text:p>15</text:p>
          </table:table-cell>
          <table:table-cell office:value-type="float" office:value="2.8285709999999999E-2" table:style-name="ce12">
            <text:p>0,02828571</text:p>
          </table:table-cell>
          <table:table-cell office:value-type="float" office:value="0.28814286" table:style-name="ce13">
            <text:p>0,28814286</text:p>
          </table:table-cell>
          <table:table-cell table:style-name="ce3"/>
          <table:table-cell office:value-type="float" office:value="10.186870331343989" table:formula="of:=[.C38]/[.B38]" table:style-name="ce3">
            <text:p>10,18687033</text:p>
          </table:table-cell>
          <table:table-cell office:value-type="float" office:value="1018.6870331343989" table:formula="of:=[.E38]*100" table:style-name="ce3">
            <text:p>1018,687033</text:p>
          </table:table-cell>
          <table:table-cell table:number-columns-repeated="16378"/>
        </table:table-row>
        <table:table-row table:style-name="ro4">
          <table:table-cell office:value-type="float" office:value="17" table:style-name="ce5">
            <text:p>17</text:p>
          </table:table-cell>
          <table:table-cell office:value-type="float" office:value="9.8142859999999998E-2" table:style-name="ce12">
            <text:p>0,09814286</text:p>
          </table:table-cell>
          <table:table-cell office:value-type="float" office:value="0.37" table:style-name="ce13">
            <text:p>0,37</text:p>
          </table:table-cell>
          <table:table-cell table:style-name="ce3"/>
          <table:table-cell office:value-type="float" office:value="3.7700144462877891" table:formula="of:=[.C39]/[.B39]" table:style-name="ce3">
            <text:p>3,770014446</text:p>
          </table:table-cell>
          <table:table-cell office:value-type="float" office:value="377.00144462877893" table:formula="of:=[.E39]*100" table:style-name="ce3">
            <text:p>377,0014446</text:p>
          </table:table-cell>
          <table:table-cell table:number-columns-repeated="16378"/>
        </table:table-row>
        <table:table-row table:style-name="ro4">
          <table:table-cell office:value-type="float" office:value="19" table:style-name="ce5">
            <text:p>19</text:p>
          </table:table-cell>
          <table:table-cell office:value-type="float" office:value="0.36514286000000001" table:style-name="ce12">
            <text:p>0,36514286</text:p>
          </table:table-cell>
          <table:table-cell office:value-type="float" office:value="0.75085714000000003" table:style-name="ce13">
            <text:p>0,75085714</text:p>
          </table:table-cell>
          <table:table-cell table:style-name="ce3"/>
          <table:table-cell office:value-type="float" office:value="2.0563380042540063" table:formula="of:=[.C40]/[.B40]" table:style-name="ce3">
            <text:p>2,056338004</text:p>
          </table:table-cell>
          <table:table-cell office:value-type="float" office:value="205.63380042540064" table:formula="of:=[.E40]*100" table:style-name="ce3">
            <text:p>205,6338004</text:p>
          </table:table-cell>
          <table:table-cell table:number-columns-repeated="16378"/>
        </table:table-row>
        <table:table-row table:style-name="ro4">
          <table:table-cell office:value-type="float" office:value="21" table:style-name="ce5">
            <text:p>21</text:p>
          </table:table-cell>
          <table:table-cell office:value-type="float" office:value="1.3074285699999999" table:style-name="ce12">
            <text:p>1,30742857</text:p>
          </table:table-cell>
          <table:table-cell office:value-type="float" office:value="2.3858571400000002" table:style-name="ce13">
            <text:p>2,38585714</text:p>
          </table:table-cell>
          <table:table-cell table:style-name="ce3"/>
          <table:table-cell office:value-type="float" office:value="1.8248470277806461" table:formula="of:=[.C41]/[.B41]" table:style-name="ce3">
            <text:p>1,824847028</text:p>
          </table:table-cell>
          <table:table-cell office:value-type="float" office:value="182.48470277806462" table:formula="of:=[.E41]*100" table:style-name="ce3">
            <text:p>182,4847028</text:p>
          </table:table-cell>
          <table:table-cell table:number-columns-repeated="16378"/>
        </table:table-row>
        <table:table-row table:number-rows-repeated="4" table:style-name="ro4">
          <table:table-cell table:number-columns-repeated="16384" table:style-name="ce3"/>
        </table:table-row>
        <table:table-row table:style-name="ro4">
          <table:table-cell office:value-type="string" table:style-name="ce2">
            <text:p>ASUS ZenBook 13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mp</text:p>
          </table:table-cell>
          <table:table-cell table:number-columns-repeated="4" table:style-name="ce3"/>
          <table:table-cell table:style-name="ce3">
            <draw:frame draw:z-index="6" draw:id="id6" draw:style-name="a6" draw:name="Diagramm 6" svg:x="0.02052in" svg:y="0.055in" svg:width="3.42717in" svg:height="2.4531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3">
            <draw:frame draw:z-index="7" draw:id="id7" draw:style-name="a7" draw:name="Diagramm 7" svg:x="0.22052in" svg:y="0.055in" svg:width="5.35433in" svg:height="2.46299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float" office:value="1.4286E-4" table:style-name="ce12">
            <text:p>0,00014286</text:p>
          </table:table-cell>
          <table:table-cell office:value-type="float" office:value="8.5714000000000005E-4" table:style-name="ce12">
            <text:p>0,00085714</text:p>
          </table:table-cell>
          <table:table-cell table:style-name="ce3"/>
          <table:table-cell office:value-type="float" office:value="5.9998600027999442" table:formula="of:=[.C48]/[.B48]" table:style-name="ce3">
            <text:p>5,999860003</text:p>
          </table:table-cell>
          <table:table-cell office:value-type="float" office:value="599.98600027999441" table:formula="of:=[.E48]*100" table:style-name="ce3">
            <text:p>599,9860003</text:p>
          </table:table-cell>
          <table:table-cell table:number-columns-repeated="16378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float" office:value="5.7143000000000005E-4" table:style-name="ce12">
            <text:p>0,00057143</text:p>
          </table:table-cell>
          <table:table-cell office:value-type="float" office:value="1E-3" table:style-name="ce12">
            <text:p>0,001</text:p>
          </table:table-cell>
          <table:table-cell table:style-name="ce3"/>
          <table:table-cell office:value-type="float" office:value="1.7499956250109374" table:formula="of:=[.C49]/[.B49]" table:style-name="ce3">
            <text:p>1,749995625</text:p>
          </table:table-cell>
          <table:table-cell office:value-type="float" office:value="174.99956250109375" table:formula="of:=[.E49]*100" table:style-name="ce3">
            <text:p>174,9995625</text:p>
          </table:table-cell>
          <table:table-cell table:number-columns-repeated="16378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float" office:value="1.85714E-3" table:style-name="ce12">
            <text:p>0,00185714</text:p>
          </table:table-cell>
          <table:table-cell office:value-type="float" office:value="1.71429E-3" table:style-name="ce12">
            <text:p>0,00171429</text:p>
          </table:table-cell>
          <table:table-cell table:style-name="ce3"/>
          <table:table-cell office:value-type="float" office:value="0.92308065089330915" table:formula="of:=[.C50]/[.B50]" table:style-name="ce3">
            <text:p>0,923080651</text:p>
          </table:table-cell>
          <table:table-cell office:value-type="float" office:value="92.30806508933091" table:formula="of:=[.E50]*100" table:style-name="ce3">
            <text:p>92,30806509</text:p>
          </table:table-cell>
          <table:table-cell table:number-columns-repeated="16378"/>
        </table:table-row>
        <table:table-row table:style-name="ro4">
          <table:table-cell office:value-type="float" office:value="11" table:style-name="ce4">
            <text:p>11</text:p>
          </table:table-cell>
          <table:table-cell office:value-type="float" office:value="6.5714299999999996E-3" table:style-name="ce12">
            <text:p>0,00657143</text:p>
          </table:table-cell>
          <table:table-cell office:value-type="float" office:value="2.8571400000000002E-3" table:style-name="ce12">
            <text:p>0,00285714</text:p>
          </table:table-cell>
          <table:table-cell table:style-name="ce3"/>
          <table:table-cell office:value-type="float" office:value="0.43478207939520019" table:formula="of:=[.C51]/[.B51]" table:style-name="ce3">
            <text:p>0,434782079</text:p>
          </table:table-cell>
          <table:table-cell office:value-type="float" office:value="43.478207939520018" table:formula="of:=[.E51]*100" table:style-name="ce3">
            <text:p>43,47820794</text:p>
          </table:table-cell>
          <table:table-cell table:number-columns-repeated="16378"/>
        </table:table-row>
        <table:table-row table:style-name="ro4">
          <table:table-cell office:value-type="float" office:value="13" table:style-name="ce4">
            <text:p>13</text:p>
          </table:table-cell>
          <table:table-cell office:value-type="float" office:value="2.4285709999999999E-2" table:style-name="ce12">
            <text:p>0,02428571</text:p>
          </table:table-cell>
          <table:table-cell office:value-type="float" office:value="7.4285699999999998E-3" table:style-name="ce12">
            <text:p>0,00742857</text:p>
          </table:table-cell>
          <table:table-cell table:style-name="ce3"/>
          <table:table-cell office:value-type="float" office:value="0.30588234809688497" table:formula="of:=[.C52]/[.B52]" table:style-name="ce3">
            <text:p>0,305882348</text:p>
          </table:table-cell>
          <table:table-cell office:value-type="float" office:value="30.588234809688498" table:formula="of:=[.E52]*100" table:style-name="ce3">
            <text:p>30,58823481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mp</text:p>
          </table:table-cell>
          <table:table-cell table:number-columns-repeated="2" table:style-name="ce3"/>
          <table:table-cell office:value-type="float" office:value="0" table:formula="of:=[.E53]*100" table:style-name="ce3">
            <text:p>0</text:p>
          </table:table-cell>
          <table:table-cell table:number-columns-repeated="16378"/>
        </table:table-row>
        <table:table-row table:style-name="ro4">
          <table:table-cell office:value-type="float" office:value="15" table:style-name="ce4">
            <text:p>15</text:p>
          </table:table-cell>
          <table:table-cell office:value-type="float" office:value="9.5285709999999996E-2" table:style-name="ce12">
            <text:p>0,09528571</text:p>
          </table:table-cell>
          <table:table-cell office:value-type="float" office:value="2.1342860000000002E-2" table:style-name="ce12">
            <text:p>0,02134286</text:p>
          </table:table-cell>
          <table:table-cell table:style-name="ce3"/>
          <table:table-cell office:value-type="float" office:value="0.22398804605643388" table:formula="of:=[.C54]/[.B54]" table:style-name="ce3">
            <text:p>0,223988046</text:p>
          </table:table-cell>
          <table:table-cell office:value-type="float" office:value="22.398804605643388" table:formula="of:=[.E54]*100" table:style-name="ce3">
            <text:p>22,39880461</text:p>
          </table:table-cell>
          <table:table-cell table:number-columns-repeated="16378"/>
        </table:table-row>
        <table:table-row table:style-name="ro4">
          <table:table-cell office:value-type="float" office:value="17" table:style-name="ce4">
            <text:p>17</text:p>
          </table:table-cell>
          <table:table-cell office:value-type="float" office:value="0.37685713999999998" table:style-name="ce12">
            <text:p>0,37685714</text:p>
          </table:table-cell>
          <table:table-cell office:value-type="float" office:value="8.5714289999999999E-2" table:style-name="ce12">
            <text:p>0,08571429</text:p>
          </table:table-cell>
          <table:table-cell table:style-name="ce3"/>
          <table:table-cell office:value-type="float" office:value="0.22744504721338171" table:formula="of:=[.C55]/[.B55]" table:style-name="ce3">
            <text:p>0,227445047</text:p>
          </table:table-cell>
          <table:table-cell office:value-type="float" office:value="22.744504721338171" table:formula="of:=[.E55]*100" table:style-name="ce3">
            <text:p>22,74450472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float" office:value="1.53842857" table:style-name="ce12">
            <text:p>1,53842857</text:p>
          </table:table-cell>
          <table:table-cell office:value-type="float" office:value="0.33971428999999997" table:style-name="ce12">
            <text:p>0,33971429</text:p>
          </table:table-cell>
          <table:table-cell table:style-name="ce3"/>
          <table:table-cell office:value-type="float" office:value="0.22081902054120067" table:formula="of:=[.C56]/[.B56]" table:style-name="ce3">
            <text:p>0,220819021</text:p>
          </table:table-cell>
          <table:table-cell office:value-type="float" office:value="22.081902054120068" table:formula="of:=[.E56]*100" table:style-name="ce3">
            <text:p>22,08190205</text:p>
          </table:table-cell>
          <table:table-cell table:number-columns-repeated="16378"/>
        </table:table-row>
        <table:table-row table:style-name="ro4">
          <table:table-cell office:value-type="float" office:value="21" table:style-name="ce4">
            <text:p>21</text:p>
          </table:table-cell>
          <table:table-cell office:value-type="float" office:value="6.0212857099999999" table:style-name="ce12">
            <text:p>6,02128571</text:p>
          </table:table-cell>
          <table:table-cell office:value-type="float" office:value="1.2612857099999999" table:style-name="ce12">
            <text:p>1,26128571</text:p>
          </table:table-cell>
          <table:table-cell table:style-name="ce3"/>
          <table:table-cell office:value-type="float" office:value="0.20947116126798107" table:formula="of:=[.C57]/[.B57]" table:style-name="ce3">
            <text:p>0,209471161</text:p>
          </table:table-cell>
          <table:table-cell office:value-type="float" office:value="20.947116126798107" table:formula="of:=[.E57]*100" table:style-name="ce3">
            <text:p>20,94711613</text:p>
          </table:table-cell>
          <table:table-cell table:number-columns-repeated="16378"/>
        </table:table-row>
        <table:table-row table:number-rows-repeated="3" table:style-name="ro4">
          <table:table-cell table:style-name="ce4"/>
          <table:table-cell table:number-columns-repeated="16383" table:style-name="ce3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cl</text:p>
          </table:table-cell>
          <table:table-cell table:number-columns-repeated="3" table:style-name="ce3"/>
          <table:table-cell table:style-name="ce3">
            <draw:frame draw:z-index="8" draw:id="id8" draw:style-name="a8" draw:name="Diagramm 8" svg:x="0.83318in" svg:y="0.02436in" svg:width="3.39055in" svg:height="2.47402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3">
            <draw:frame draw:z-index="9" draw:id="id9" draw:style-name="a9" draw:name="Diagramm 9" svg:x="0.20182in" svg:y="0.02436in" svg:width="5.46339in" svg:height="2.4838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float" office:value="1.4286E-4" table:style-name="ce12">
            <text:p>0,00014286</text:p>
          </table:table-cell>
          <table:table-cell office:value-type="float" office:value="0.54657142999999997" table:style-name="ce13">
            <text:p>0,54657143</text:p>
          </table:table-cell>
          <table:table-cell table:style-name="ce3"/>
          <table:table-cell office:value-type="float" office:value="3825.923491530169" table:formula="of:=[.C62]/[.B62]" table:style-name="ce3">
            <text:p>3825,923492</text:p>
          </table:table-cell>
          <table:table-cell office:value-type="float" office:value="382592.34915301693" table:formula="of:=[.E62]*100" table:style-name="ce3">
            <text:p>382592,3492</text:p>
          </table:table-cell>
          <table:table-cell table:number-columns-repeated="16378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float" office:value="5.7143000000000005E-4" table:style-name="ce12">
            <text:p>0,00057143</text:p>
          </table:table-cell>
          <table:table-cell office:value-type="float" office:value="0.54585713999999996" table:style-name="ce13">
            <text:p>0,54585714</text:p>
          </table:table-cell>
          <table:table-cell table:style-name="ce3"/>
          <table:table-cell office:value-type="float" office:value="955.24760688098263" table:formula="of:=[.C63]/[.B63]" table:style-name="ce3">
            <text:p>955,2476069</text:p>
          </table:table-cell>
          <table:table-cell office:value-type="float" office:value="95524.760688098264" table:formula="of:=[.E63]*100" table:style-name="ce3">
            <text:p>95524,76069</text:p>
          </table:table-cell>
          <table:table-cell table:number-columns-repeated="16378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float" office:value="1.85714E-3" table:style-name="ce12">
            <text:p>0,00185714</text:p>
          </table:table-cell>
          <table:table-cell office:value-type="float" office:value="0.55914286000000002" table:style-name="ce13">
            <text:p>0,55914286</text:p>
          </table:table-cell>
          <table:table-cell table:style-name="ce3"/>
          <table:table-cell office:value-type="float" office:value="301.0773878113659" table:formula="of:=[.C64]/[.B64]" table:style-name="ce3">
            <text:p>301,0773878</text:p>
          </table:table-cell>
          <table:table-cell office:value-type="float" office:value="30107.738781136588" table:formula="of:=[.E64]*100" table:style-name="ce3">
            <text:p>30107,73878</text:p>
          </table:table-cell>
          <table:table-cell table:number-columns-repeated="16378"/>
        </table:table-row>
        <table:table-row table:style-name="ro4">
          <table:table-cell office:value-type="float" office:value="11" table:style-name="ce4">
            <text:p>11</text:p>
          </table:table-cell>
          <table:table-cell office:value-type="float" office:value="6.5714299999999996E-3" table:style-name="ce12">
            <text:p>0,00657143</text:p>
          </table:table-cell>
          <table:table-cell office:value-type="float" office:value="0.56714286000000003" table:style-name="ce13">
            <text:p>0,56714286</text:p>
          </table:table-cell>
          <table:table-cell table:style-name="ce3"/>
          <table:table-cell office:value-type="float" office:value="86.304329499058809" table:formula="of:=[.C65]/[.B65]" table:style-name="ce3">
            <text:p>86,3043295</text:p>
          </table:table-cell>
          <table:table-cell office:value-type="float" office:value="8630.4329499058804" table:formula="of:=[.E65]*100" table:style-name="ce3">
            <text:p>8630,43295</text:p>
          </table:table-cell>
          <table:table-cell table:number-columns-repeated="16378"/>
        </table:table-row>
        <table:table-row table:style-name="ro4">
          <table:table-cell office:value-type="float" office:value="13" table:style-name="ce4">
            <text:p>13</text:p>
          </table:table-cell>
          <table:table-cell office:value-type="float" office:value="2.4285709999999999E-2" table:style-name="ce12">
            <text:p>0,02428571</text:p>
          </table:table-cell>
          <table:table-cell office:value-type="float" office:value="0.57357142999999999" table:style-name="ce13">
            <text:p>0,57357143</text:p>
          </table:table-cell>
          <table:table-cell table:style-name="ce3"/>
          <table:table-cell office:value-type="float" office:value="23.617651285467876" table:formula="of:=[.C66]/[.B66]" table:style-name="ce3">
            <text:p>23,61765129</text:p>
          </table:table-cell>
          <table:table-cell office:value-type="float" office:value="2361.7651285467878" table:formula="of:=[.E66]*100" table:style-name="ce3">
            <text:p>2361,765129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cl</text:p>
          </table:table-cell>
          <table:table-cell table:number-columns-repeated="2" table:style-name="ce3"/>
          <table:table-cell office:value-type="float" office:value="0" table:formula="of:=[.E67]*100" table:style-name="ce3">
            <text:p>0</text:p>
          </table:table-cell>
          <table:table-cell table:number-columns-repeated="16378"/>
        </table:table-row>
        <table:table-row table:style-name="ro4">
          <table:table-cell office:value-type="float" office:value="15" table:style-name="ce4">
            <text:p>15</text:p>
          </table:table-cell>
          <table:table-cell office:value-type="float" office:value="9.5285709999999996E-2" table:style-name="ce12">
            <text:p>0,09528571</text:p>
          </table:table-cell>
          <table:table-cell office:value-type="float" office:value="0.65300000000000002" table:style-name="ce13">
            <text:p>0,653</text:p>
          </table:table-cell>
          <table:table-cell table:style-name="ce3"/>
          <table:table-cell office:value-type="float" office:value="6.8530737715025687" table:formula="of:=[.C68]/[.B68]" table:style-name="ce3">
            <text:p>6,853073772</text:p>
          </table:table-cell>
          <table:table-cell office:value-type="float" office:value="685.30737715025691" table:formula="of:=[.E68]*100" table:style-name="ce3">
            <text:p>685,3073772</text:p>
          </table:table-cell>
          <table:table-cell table:number-columns-repeated="16378"/>
        </table:table-row>
        <table:table-row table:style-name="ro4">
          <table:table-cell office:value-type="float" office:value="17" table:style-name="ce4">
            <text:p>17</text:p>
          </table:table-cell>
          <table:table-cell office:value-type="float" office:value="0.37685713999999998" table:style-name="ce12">
            <text:p>0,37685714</text:p>
          </table:table-cell>
          <table:table-cell office:value-type="float" office:value="0.90871429000000004" table:style-name="ce13">
            <text:p>0,90871429</text:p>
          </table:table-cell>
          <table:table-cell table:style-name="ce3"/>
          <table:table-cell office:value-type="float" office:value="2.4112964663479644" table:formula="of:=[.C69]/[.B69]" table:style-name="ce3">
            <text:p>2,411296466</text:p>
          </table:table-cell>
          <table:table-cell office:value-type="float" office:value="241.12964663479644" table:formula="of:=[.E69]*100" table:style-name="ce3">
            <text:p>241,1296466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float" office:value="1.53842857" table:style-name="ce12">
            <text:p>1,53842857</text:p>
          </table:table-cell>
          <table:table-cell office:value-type="float" office:value="1.71828571" table:style-name="ce13">
            <text:p>1,71828571</text:p>
          </table:table-cell>
          <table:table-cell table:style-name="ce3"/>
          <table:table-cell office:value-type="float" office:value="1.1169096463152657" table:formula="of:=[.C70]/[.B70]" table:style-name="ce3">
            <text:p>1,116909646</text:p>
          </table:table-cell>
          <table:table-cell office:value-type="float" office:value="111.69096463152657" table:formula="of:=[.E70]*100" table:style-name="ce3">
            <text:p>111,6909646</text:p>
          </table:table-cell>
          <table:table-cell table:number-columns-repeated="16378"/>
        </table:table-row>
        <table:table-row table:style-name="ro4">
          <table:table-cell office:value-type="float" office:value="21" table:style-name="ce4">
            <text:p>21</text:p>
          </table:table-cell>
          <table:table-cell office:value-type="float" office:value="6.0212857099999999" table:style-name="ce12">
            <text:p>6,02128571</text:p>
          </table:table-cell>
          <table:table-cell office:value-type="float" office:value="4.5674285699999997" table:style-name="ce13">
            <text:p>4,56742857</text:p>
          </table:table-cell>
          <table:table-cell table:style-name="ce3"/>
          <table:table-cell office:value-type="float" office:value="0.75854705954486257" table:formula="of:=[.C71]/[.B71]" table:style-name="ce3">
            <text:p>0,75854706</text:p>
          </table:table-cell>
          <table:table-cell office:value-type="float" office:value="75.854705954486263" table:formula="of:=[.E71]*100" table:style-name="ce3">
            <text:p>75,85470595</text:p>
          </table:table-cell>
          <table:table-cell table:number-columns-repeated="16378"/>
        </table:table-row>
        <table:table-row table:number-rows-repeated="3" table:style-name="ro4">
          <table:table-cell table:style-name="ce4"/>
          <table:table-cell table:number-columns-repeated="16383" table:style-name="ce3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parallel omp</text:p>
          </table:table-cell>
          <table:table-cell office:value-type="string" table:style-name="ce4">
            <text:p>parallel ocl</text:p>
          </table:table-cell>
          <table:table-cell table:number-columns-repeated="4" table:style-name="ce3"/>
          <table:table-cell table:style-name="ce3">
            <draw:frame draw:z-index="10" draw:id="id10" draw:style-name="a10" draw:name="Diagramm 10" svg:x="0.02008in" svg:y="0.01806in" svg:width="5.56772in" svg:height="2.46339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float" office:value="8.5714000000000005E-4" table:style-name="ce12">
            <text:p>0,00085714</text:p>
          </table:table-cell>
          <table:table-cell office:value-type="float" office:value="0.54657142999999997" table:style-name="ce13">
            <text:p>0,54657143</text:p>
          </table:table-cell>
          <table:table-cell table:style-name="ce3"/>
          <table:table-cell office:value-type="float" office:value="637.66879389597955" table:formula="of:=[.C76]/[.B76]" table:style-name="ce3">
            <text:p>637,6687939</text:p>
          </table:table-cell>
          <table:table-cell office:value-type="float" office:value="63766.879389597954" table:formula="of:=[.E76]*100" table:style-name="ce3">
            <text:p>63766,87939</text:p>
          </table:table-cell>
          <table:table-cell table:number-columns-repeated="16378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float" office:value="1E-3" table:style-name="ce12">
            <text:p>0,001</text:p>
          </table:table-cell>
          <table:table-cell office:value-type="float" office:value="0.54585713999999996" table:style-name="ce13">
            <text:p>0,54585714</text:p>
          </table:table-cell>
          <table:table-cell table:style-name="ce3"/>
          <table:table-cell office:value-type="float" office:value="545.85713999999996" table:formula="of:=[.C77]/[.B77]" table:style-name="ce3">
            <text:p>545,85714</text:p>
          </table:table-cell>
          <table:table-cell office:value-type="float" office:value="54585.713999999993" table:formula="of:=[.E77]*100" table:style-name="ce3">
            <text:p>54585,714</text:p>
          </table:table-cell>
          <table:table-cell table:number-columns-repeated="16378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float" office:value="1.71429E-3" table:style-name="ce12">
            <text:p>0,00171429</text:p>
          </table:table-cell>
          <table:table-cell office:value-type="float" office:value="0.55914286000000002" table:style-name="ce13">
            <text:p>0,55914286</text:p>
          </table:table-cell>
          <table:table-cell table:style-name="ce3"/>
          <table:table-cell office:value-type="float" office:value="326.16585291870103" table:formula="of:=[.C78]/[.B78]" table:style-name="ce3">
            <text:p>326,1658529</text:p>
          </table:table-cell>
          <table:table-cell office:value-type="float" office:value="32616.585291870102" table:formula="of:=[.E78]*100" table:style-name="ce3">
            <text:p>32616,58529</text:p>
          </table:table-cell>
          <table:table-cell table:number-columns-repeated="16378"/>
        </table:table-row>
        <table:table-row table:style-name="ro4">
          <table:table-cell office:value-type="float" office:value="11" table:style-name="ce4">
            <text:p>11</text:p>
          </table:table-cell>
          <table:table-cell office:value-type="float" office:value="2.8571400000000002E-3" table:style-name="ce12">
            <text:p>0,00285714</text:p>
          </table:table-cell>
          <table:table-cell office:value-type="float" office:value="0.56714286000000003" table:style-name="ce13">
            <text:p>0,56714286</text:p>
          </table:table-cell>
          <table:table-cell table:style-name="ce3"/>
          <table:table-cell office:value-type="float" office:value="198.5001995001995" table:formula="of:=[.C79]/[.B79]" table:style-name="ce3">
            <text:p>198,5001995</text:p>
          </table:table-cell>
          <table:table-cell office:value-type="float" office:value="19850.019950019949" table:formula="of:=[.E79]*100" table:style-name="ce3">
            <text:p>19850,01995</text:p>
          </table:table-cell>
          <table:table-cell table:number-columns-repeated="16378"/>
        </table:table-row>
        <table:table-row table:style-name="ro4">
          <table:table-cell office:value-type="float" office:value="13" table:style-name="ce4">
            <text:p>13</text:p>
          </table:table-cell>
          <table:table-cell office:value-type="float" office:value="7.4285699999999998E-3" table:style-name="ce12">
            <text:p>0,00742857</text:p>
          </table:table-cell>
          <table:table-cell office:value-type="float" office:value="0.57357142999999999" table:style-name="ce13">
            <text:p>0,57357143</text:p>
          </table:table-cell>
          <table:table-cell table:style-name="ce3"/>
          <table:table-cell office:value-type="float" office:value="77.211553502221832" table:formula="of:=[.C80]/[.B80]" table:style-name="ce3">
            <text:p>77,2115535</text:p>
          </table:table-cell>
          <table:table-cell office:value-type="float" office:value="7721.1553502221832" table:formula="of:=[.E80]*100" table:style-name="ce3">
            <text:p>7721,15535</text:p>
          </table:table-cell>
          <table:table-cell table:number-columns-repeated="16378"/>
        </table:table-row>
        <table:table-row table:style-name="ro4">
          <table:table-cell office:value-type="float" office:value="15" table:style-name="ce4">
            <text:p>15</text:p>
          </table:table-cell>
          <table:table-cell office:value-type="float" office:value="2.1342860000000002E-2" table:style-name="ce12">
            <text:p>0,02134286</text:p>
          </table:table-cell>
          <table:table-cell office:value-type="float" office:value="0.65300000000000002" table:style-name="ce13">
            <text:p>0,653</text:p>
          </table:table-cell>
          <table:table-cell table:style-name="ce3"/>
          <table:table-cell office:value-type="float" office:value="30.595712102314309" table:formula="of:=[.C81]/[.B81]" table:style-name="ce3">
            <text:p>30,5957121</text:p>
          </table:table-cell>
          <table:table-cell office:value-type="float" office:value="3059.571210231431" table:formula="of:=[.E81]*100" table:style-name="ce3">
            <text:p>3059,57121</text:p>
          </table:table-cell>
          <table:table-cell table:number-columns-repeated="16378"/>
        </table:table-row>
        <table:table-row table:style-name="ro4">
          <table:table-cell office:value-type="float" office:value="17" table:style-name="ce4">
            <text:p>17</text:p>
          </table:table-cell>
          <table:table-cell office:value-type="float" office:value="8.5714289999999999E-2" table:style-name="ce12">
            <text:p>0,08571429</text:p>
          </table:table-cell>
          <table:table-cell office:value-type="float" office:value="0.90871429000000004" table:style-name="ce13">
            <text:p>0,90871429</text:p>
          </table:table-cell>
          <table:table-cell table:style-name="ce3"/>
          <table:table-cell office:value-type="float" office:value="10.601666186583358" table:formula="of:=[.C82]/[.B82]" table:style-name="ce3">
            <text:p>10,60166619</text:p>
          </table:table-cell>
          <table:table-cell office:value-type="float" office:value="1060.1666186583359" table:formula="of:=[.E82]*100" table:style-name="ce3">
            <text:p>1060,166619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float" office:value="0.33971428999999997" table:style-name="ce12">
            <text:p>0,33971429</text:p>
          </table:table-cell>
          <table:table-cell office:value-type="float" office:value="1.71828571" table:style-name="ce13">
            <text:p>1,71828571</text:p>
          </table:table-cell>
          <table:table-cell table:style-name="ce3"/>
          <table:table-cell office:value-type="float" office:value="5.0580318832039719" table:formula="of:=[.C83]/[.B83]" table:style-name="ce3">
            <text:p>5,058031883</text:p>
          </table:table-cell>
          <table:table-cell office:value-type="float" office:value="505.80318832039717" table:formula="of:=[.E83]*100" table:style-name="ce3">
            <text:p>505,8031883</text:p>
          </table:table-cell>
          <table:table-cell table:number-columns-repeated="16378"/>
        </table:table-row>
        <table:table-row table:style-name="ro4">
          <table:table-cell office:value-type="float" office:value="21" table:style-name="ce4">
            <text:p>21</text:p>
          </table:table-cell>
          <table:table-cell office:value-type="float" office:value="1.2612857099999999" table:style-name="ce12">
            <text:p>1,26128571</text:p>
          </table:table-cell>
          <table:table-cell office:value-type="float" office:value="4.5674285699999997" table:style-name="ce13">
            <text:p>4,56742857</text:p>
          </table:table-cell>
          <table:table-cell table:style-name="ce3"/>
          <table:table-cell office:value-type="float" office:value="3.6212481706464432" table:formula="of:=[.C84]/[.B84]" table:style-name="ce3">
            <text:p>3,621248171</text:p>
          </table:table-cell>
          <table:table-cell office:value-type="float" office:value="362.12481706464433" table:formula="of:=[.E84]*100" table:style-name="ce3">
            <text:p>362,1248171</text:p>
          </table:table-cell>
          <table:table-cell table:number-columns-repeated="16378"/>
        </table:table-row>
        <table:table-row table:number-rows-repeated="4" table:style-name="ro4">
          <table:table-cell table:number-columns-repeated="16384" table:style-name="ce3"/>
        </table:table-row>
        <table:table-row table:style-name="ro4">
          <table:table-cell office:value-type="string" table:style-name="ce2">
            <text:p>Thinkpad P14s Gen 1</text:p>
          </table:table-cell>
          <table:table-cell table:number-columns-repeated="3" table:style-name="ce2"/>
          <table:table-cell table:number-columns-repeated="16380" table:style-name="ce3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mp</text:p>
          </table:table-cell>
          <table:table-cell table:number-columns-repeated="4" table:style-name="ce3"/>
          <table:table-cell table:style-name="ce3">
            <draw:frame draw:z-index="11" draw:id="id11" draw:style-name="a11" draw:name="Diagramm 11" svg:x="0.01722in" svg:y="0.0058in" svg:width="3.4063in" svg:height="2.66142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3">
            <draw:frame draw:z-index="12" draw:id="id12" draw:style-name="a12" draw:name="Diagramm 13" svg:x="0.20895in" svg:y="0.0058in" svg:width="5.51024in" svg:height="2.66142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float" office:value="4.2943000000000001E-4" table:style-name="ce13">
            <text:p>0,00042943</text:p>
          </table:table-cell>
          <table:table-cell office:value-type="float" office:value="1.3169999999999999E-2" table:style-name="ce13">
            <text:p>0,01317</text:p>
          </table:table-cell>
          <table:table-cell table:style-name="ce3"/>
          <table:table-cell office:value-type="float" office:value="30.668560650164167" table:formula="of:=[.C91]/[.B91]" table:style-name="ce3">
            <text:p>30,66856065</text:p>
          </table:table-cell>
          <table:table-cell office:value-type="float" office:value="3066.8560650164168" table:formula="of:=[.E91]*100" table:style-name="ce3">
            <text:p>3066,856065</text:p>
          </table:table-cell>
          <table:table-cell table:number-columns-repeated="16378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float" office:value="1.5664299999999999E-3" table:style-name="ce13">
            <text:p>0,00156643</text:p>
          </table:table-cell>
          <table:table-cell office:value-type="float" office:value="4.9421400000000002E-3" table:style-name="ce13">
            <text:p>0,00494214</text:p>
          </table:table-cell>
          <table:table-cell table:style-name="ce3"/>
          <table:table-cell office:value-type="float" office:value="3.1550340583364722" table:formula="of:=[.C92]/[.B92]" table:style-name="ce3">
            <text:p>3,155034058</text:p>
          </table:table-cell>
          <table:table-cell office:value-type="float" office:value="315.50340583364721" table:formula="of:=[.E92]*100" table:style-name="ce3">
            <text:p>315,5034058</text:p>
          </table:table-cell>
          <table:table-cell table:number-columns-repeated="16378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float" office:value="5.6612900000000002E-3" table:style-name="ce13">
            <text:p>0,00566129</text:p>
          </table:table-cell>
          <table:table-cell office:value-type="float" office:value="2.8865700000000002E-3" table:style-name="ce13">
            <text:p>0,00288657</text:p>
          </table:table-cell>
          <table:table-cell table:style-name="ce3"/>
          <table:table-cell office:value-type="float" office:value="0.50987849059136703" table:formula="of:=[.C93]/[.B93]" table:style-name="ce3">
            <text:p>0,509878491</text:p>
          </table:table-cell>
          <table:table-cell office:value-type="float" office:value="50.9878490591367" table:formula="of:=[.E93]*100" table:style-name="ce3">
            <text:p>50,98784906</text:p>
          </table:table-cell>
          <table:table-cell table:number-columns-repeated="16378"/>
        </table:table-row>
        <table:table-row table:style-name="ro4">
          <table:table-cell office:value-type="float" office:value="11" table:style-name="ce4">
            <text:p>11</text:p>
          </table:table-cell>
          <table:table-cell office:value-type="float" office:value="1.8936709999999999E-2" table:style-name="ce13">
            <text:p>0,01893671</text:p>
          </table:table-cell>
          <table:table-cell office:value-type="float" office:value="1.302471E-2" table:style-name="ce13">
            <text:p>0,01302471</text:p>
          </table:table-cell>
          <table:table-cell table:style-name="ce3"/>
          <table:table-cell office:value-type="float" office:value="0.68780215781938892" table:formula="of:=[.C94]/[.B94]" table:style-name="ce3">
            <text:p>0,687802158</text:p>
          </table:table-cell>
          <table:table-cell office:value-type="float" office:value="68.780215781938892" table:formula="of:=[.E94]*100" table:style-name="ce3">
            <text:p>68,78021578</text:p>
          </table:table-cell>
          <table:table-cell table:number-columns-repeated="16378"/>
        </table:table-row>
        <table:table-row table:style-name="ro4">
          <table:table-cell office:value-type="float" office:value="13" table:style-name="ce4">
            <text:p>13</text:p>
          </table:table-cell>
          <table:table-cell office:value-type="float" office:value="7.5842569999999998E-2" table:style-name="ce13">
            <text:p>0,07584257</text:p>
          </table:table-cell>
          <table:table-cell office:value-type="float" office:value="2.513429E-2" table:style-name="ce13">
            <text:p>0,02513429</text:p>
          </table:table-cell>
          <table:table-cell table:style-name="ce3"/>
          <table:table-cell office:value-type="float" office:value="0.33140082146477895" table:formula="of:=[.C95]/[.B95]" table:style-name="ce3">
            <text:p>0,331400821</text:p>
          </table:table-cell>
          <table:table-cell office:value-type="float" office:value="33.140082146477894" table:formula="of:=[.E95]*100" table:style-name="ce3">
            <text:p>33,14008215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mp</text:p>
          </table:table-cell>
          <table:table-cell table:number-columns-repeated="2" table:style-name="ce3"/>
          <table:table-cell office:value-type="float" office:value="0" table:formula="of:=[.E96]*100" table:style-name="ce3">
            <text:p>0</text:p>
          </table:table-cell>
          <table:table-cell table:number-columns-repeated="16378"/>
        </table:table-row>
        <table:table-row table:style-name="ro4">
          <table:table-cell office:value-type="float" office:value="15" table:style-name="ce4">
            <text:p>15</text:p>
          </table:table-cell>
          <table:table-cell office:value-type="float" office:value="0.29129485999999999" table:style-name="ce13">
            <text:p>0,29129486</text:p>
          </table:table-cell>
          <table:table-cell office:value-type="float" office:value="7.7827709999999994E-2" table:style-name="ce13">
            <text:p>0,07782771</text:p>
          </table:table-cell>
          <table:table-cell table:style-name="ce3"/>
          <table:table-cell office:value-type="float" office:value="0.26717845278835334" table:formula="of:=[.C97]/[.B97]" table:style-name="ce3">
            <text:p>0,267178453</text:p>
          </table:table-cell>
          <table:table-cell office:value-type="float" office:value="26.717845278835334" table:formula="of:=[.E97]*100" table:style-name="ce3">
            <text:p>26,71784528</text:p>
          </table:table-cell>
          <table:table-cell table:number-columns-repeated="16378"/>
        </table:table-row>
        <table:table-row table:style-name="ro4">
          <table:table-cell office:value-type="float" office:value="17" table:style-name="ce4">
            <text:p>17</text:p>
          </table:table-cell>
          <table:table-cell office:value-type="float" office:value="1.11979286" table:style-name="ce13">
            <text:p>1,11979286</text:p>
          </table:table-cell>
          <table:table-cell office:value-type="float" office:value="0.27402328999999997" table:style-name="ce13">
            <text:p>0,27402329</text:p>
          </table:table-cell>
          <table:table-cell table:style-name="ce3"/>
          <table:table-cell office:value-type="float" office:value="0.24470890982462593" table:formula="of:=[.C98]/[.B98]" table:style-name="ce3">
            <text:p>0,24470891</text:p>
          </table:table-cell>
          <table:table-cell office:value-type="float" office:value="24.470890982462592" table:formula="of:=[.E98]*100" table:style-name="ce3">
            <text:p>24,47089098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float" office:value="4.4725028599999996" table:style-name="ce13">
            <text:p>4,47250286</text:p>
          </table:table-cell>
          <table:table-cell office:value-type="float" office:value="0.99109928999999997" table:style-name="ce13">
            <text:p>0,99109929</text:p>
          </table:table-cell>
          <table:table-cell table:style-name="ce3"/>
          <table:table-cell office:value-type="float" office:value="0.22159835801647762" table:formula="of:=[.C99]/[.B99]" table:style-name="ce3">
            <text:p>0,221598358</text:p>
          </table:table-cell>
          <table:table-cell office:value-type="float" office:value="22.159835801647763" table:formula="of:=[.E99]*100" table:style-name="ce3">
            <text:p>22,1598358</text:p>
          </table:table-cell>
          <table:table-cell table:number-columns-repeated="16378"/>
        </table:table-row>
        <table:table-row table:style-name="ro4">
          <table:table-cell office:value-type="float" office:value="21" table:style-name="ce4">
            <text:p>21</text:p>
          </table:table-cell>
          <table:table-cell office:value-type="float" office:value="17.928899999999999" table:style-name="ce13">
            <text:p>17,9289</text:p>
          </table:table-cell>
          <table:table-cell office:value-type="float" office:value="3.8165171400000002" table:style-name="ce13">
            <text:p>3,81651714</text:p>
          </table:table-cell>
          <table:table-cell table:style-name="ce3"/>
          <table:table-cell office:value-type="float" office:value="0.21286956478088451" table:formula="of:=[.C100]/[.B100]" table:style-name="ce3">
            <text:p>0,212869565</text:p>
          </table:table-cell>
          <table:table-cell office:value-type="float" office:value="21.286956478088452" table:formula="of:=[.E100]*100" table:style-name="ce3">
            <text:p>21,28695648</text:p>
          </table:table-cell>
          <table:table-cell table:number-columns-repeated="16378"/>
        </table:table-row>
        <table:table-row table:number-rows-repeated="3" table:style-name="ro4">
          <table:table-cell table:style-name="ce4"/>
          <table:table-cell table:number-columns-repeated="16383" table:style-name="ce3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cl</text:p>
          </table:table-cell>
          <table:table-cell table:number-columns-repeated="4" table:style-name="ce3"/>
          <table:table-cell table:style-name="ce3">
            <draw:frame draw:z-index="13" draw:id="id13" draw:style-name="a13" draw:name="Diagramm 14" svg:x="0.00856in" svg:y="0.0121in" svg:width="3.42717in" svg:height="2.6303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3">
            <draw:frame draw:z-index="14" draw:id="id14" draw:style-name="a14" draw:name="Diagramm 15" svg:x="0.24557in" svg:y="0.00069in" svg:width="5.44252in" svg:height="2.656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float" office:value="4.2943000000000001E-4" table:style-name="ce13">
            <text:p>0,00042943</text:p>
          </table:table-cell>
          <table:table-cell office:value-type="float" office:value="0.11772886" table:style-name="ce13">
            <text:p>0,11772886</text:p>
          </table:table-cell>
          <table:table-cell table:style-name="ce3"/>
          <table:table-cell office:value-type="float" office:value="274.15145658198077" table:formula="of:=[.C105]/[.B105]" table:style-name="ce3">
            <text:p>274,1514566</text:p>
          </table:table-cell>
          <table:table-cell office:value-type="float" office:value="27415.145658198078" table:formula="of:=[.E105]*100" table:style-name="ce3">
            <text:p>27415,14566</text:p>
          </table:table-cell>
          <table:table-cell table:number-columns-repeated="16378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float" office:value="1.5664299999999999E-3" table:style-name="ce13">
            <text:p>0,00156643</text:p>
          </table:table-cell>
          <table:table-cell office:value-type="float" office:value="0.14013486" table:style-name="ce13">
            <text:p>0,14013486</text:p>
          </table:table-cell>
          <table:table-cell table:style-name="ce3"/>
          <table:table-cell office:value-type="float" office:value="89.461297344918066" table:formula="of:=[.C106]/[.B106]" table:style-name="ce3">
            <text:p>89,46129734</text:p>
          </table:table-cell>
          <table:table-cell office:value-type="float" office:value="8946.1297344918057" table:formula="of:=[.E106]*100" table:style-name="ce3">
            <text:p>8946,129734</text:p>
          </table:table-cell>
          <table:table-cell table:number-columns-repeated="16378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float" office:value="5.6612900000000002E-3" table:style-name="ce13">
            <text:p>0,00566129</text:p>
          </table:table-cell>
          <table:table-cell office:value-type="float" office:value="0.12746642999999999" table:style-name="ce13">
            <text:p>0,12746643</text:p>
          </table:table-cell>
          <table:table-cell table:style-name="ce3"/>
          <table:table-cell office:value-type="float" office:value="22.515439060708776" table:formula="of:=[.C107]/[.B107]" table:style-name="ce3">
            <text:p>22,51543906</text:p>
          </table:table-cell>
          <table:table-cell office:value-type="float" office:value="2251.5439060708777" table:formula="of:=[.E107]*100" table:style-name="ce3">
            <text:p>2251,543906</text:p>
          </table:table-cell>
          <table:table-cell table:number-columns-repeated="16378"/>
        </table:table-row>
        <table:table-row table:style-name="ro4">
          <table:table-cell office:value-type="float" office:value="11" table:style-name="ce4">
            <text:p>11</text:p>
          </table:table-cell>
          <table:table-cell office:value-type="float" office:value="1.8936709999999999E-2" table:style-name="ce13">
            <text:p>0,01893671</text:p>
          </table:table-cell>
          <table:table-cell office:value-type="float" office:value="0.12596985999999999" table:style-name="ce13">
            <text:p>0,12596986</text:p>
          </table:table-cell>
          <table:table-cell table:style-name="ce3"/>
          <table:table-cell office:value-type="float" office:value="6.6521512976646946" table:formula="of:=[.C108]/[.B108]" table:style-name="ce3">
            <text:p>6,652151298</text:p>
          </table:table-cell>
          <table:table-cell office:value-type="float" office:value="665.21512976646943" table:formula="of:=[.E108]*100" table:style-name="ce3">
            <text:p>665,2151298</text:p>
          </table:table-cell>
          <table:table-cell table:number-columns-repeated="16378"/>
        </table:table-row>
        <table:table-row table:style-name="ro4">
          <table:table-cell office:value-type="float" office:value="13" table:style-name="ce4">
            <text:p>13</text:p>
          </table:table-cell>
          <table:table-cell office:value-type="float" office:value="7.5842569999999998E-2" table:style-name="ce13">
            <text:p>0,07584257</text:p>
          </table:table-cell>
          <table:table-cell office:value-type="float" office:value="0.14855686000000001" table:style-name="ce13">
            <text:p>0,14855686</text:p>
          </table:table-cell>
          <table:table-cell table:style-name="ce3"/>
          <table:table-cell office:value-type="float" office:value="1.9587529800216423" table:formula="of:=[.C109]/[.B109]" table:style-name="ce3">
            <text:p>1,95875298</text:p>
          </table:table-cell>
          <table:table-cell office:value-type="float" office:value="195.87529800216424" table:formula="of:=[.E109]*100" table:style-name="ce3">
            <text:p>195,87529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seriell iterativ</text:p>
          </table:table-cell>
          <table:table-cell office:value-type="string" table:style-name="ce4">
            <text:p>parallel ocl</text:p>
          </table:table-cell>
          <table:table-cell table:number-columns-repeated="16381" table:style-name="ce3"/>
        </table:table-row>
        <table:table-row table:style-name="ro4">
          <table:table-cell office:value-type="float" office:value="15" table:style-name="ce4">
            <text:p>15</text:p>
          </table:table-cell>
          <table:table-cell office:value-type="float" office:value="0.29129485999999999" table:style-name="ce13">
            <text:p>0,29129486</text:p>
          </table:table-cell>
          <table:table-cell office:value-type="float" office:value="0.18828671" table:style-name="ce13">
            <text:p>0,18828671</text:p>
          </table:table-cell>
          <table:table-cell table:style-name="ce3"/>
          <table:table-cell office:value-type="float" office:value="0.64637841532802875" table:formula="of:=[.C111]/[.B111]" table:style-name="ce3">
            <text:p>0,646378415</text:p>
          </table:table-cell>
          <table:table-cell office:value-type="float" office:value="64.637841532802881" table:formula="of:=[.E111]*100" table:style-name="ce3">
            <text:p>64,63784153</text:p>
          </table:table-cell>
          <table:table-cell table:number-columns-repeated="16378"/>
        </table:table-row>
        <table:table-row table:style-name="ro4">
          <table:table-cell office:value-type="float" office:value="17" table:style-name="ce4">
            <text:p>17</text:p>
          </table:table-cell>
          <table:table-cell office:value-type="float" office:value="1.11979286" table:style-name="ce13">
            <text:p>1,11979286</text:p>
          </table:table-cell>
          <table:table-cell office:value-type="float" office:value="0.30136329000000001" table:style-name="ce13">
            <text:p>0,30136329</text:p>
          </table:table-cell>
          <table:table-cell table:style-name="ce3"/>
          <table:table-cell office:value-type="float" office:value="0.26912413961989362" table:formula="of:=[.C112]/[.B112]" table:style-name="ce3">
            <text:p>0,26912414</text:p>
          </table:table-cell>
          <table:table-cell office:value-type="float" office:value="26.912413961989362" table:formula="of:=[.E112]*100" table:style-name="ce3">
            <text:p>26,91241396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float" office:value="4.4725028599999996" table:style-name="ce13">
            <text:p>4,47250286</text:p>
          </table:table-cell>
          <table:table-cell office:value-type="float" office:value="0.69139813999999999" table:style-name="ce13">
            <text:p>0,69139814</text:p>
          </table:table-cell>
          <table:table-cell table:style-name="ce3"/>
          <table:table-cell office:value-type="float" office:value="0.15458864122447985" table:formula="of:=[.C113]/[.B113]" table:style-name="ce3">
            <text:p>0,154588641</text:p>
          </table:table-cell>
          <table:table-cell office:value-type="float" office:value="15.458864122447984" table:formula="of:=[.E113]*100" table:style-name="ce3">
            <text:p>15,45886412</text:p>
          </table:table-cell>
          <table:table-cell table:number-columns-repeated="16378"/>
        </table:table-row>
        <table:table-row table:style-name="ro4">
          <table:table-cell office:value-type="float" office:value="21" table:style-name="ce4">
            <text:p>21</text:p>
          </table:table-cell>
          <table:table-cell office:value-type="float" office:value="17.928899999999999" table:style-name="ce13">
            <text:p>17,9289</text:p>
          </table:table-cell>
          <table:table-cell office:value-type="float" office:value="2.1717428600000002" table:style-name="ce13">
            <text:p>2,17174286</text:p>
          </table:table-cell>
          <table:table-cell table:style-name="ce3"/>
          <table:table-cell office:value-type="float" office:value="0.12113084796055532" table:formula="of:=[.C114]/[.B114]" table:style-name="ce3">
            <text:p>0,121130848</text:p>
          </table:table-cell>
          <table:table-cell office:value-type="float" office:value="12.113084796055531" table:formula="of:=[.E114]*100" table:style-name="ce3">
            <text:p>12,1130848</text:p>
          </table:table-cell>
          <table:table-cell table:number-columns-repeated="16378"/>
        </table:table-row>
        <table:table-row table:style-name="ro4">
          <table:table-cell table:style-name="ce4"/>
          <table:table-cell table:number-columns-repeated="4" table:style-name="ce3"/>
          <table:table-cell office:value-type="float" office:value="0" table:formula="of:=[.E115]*100" table:style-name="ce3">
            <text:p>0</text:p>
          </table:table-cell>
          <table:table-cell table:number-columns-repeated="16378"/>
        </table:table-row>
        <table:table-row table:style-name="ro4">
          <table:table-cell table:style-name="ce4"/>
          <table:table-cell table:number-columns-repeated="4" table:style-name="ce3"/>
          <table:table-cell office:value-type="float" office:value="0" table:formula="of:=[.E116]*100" table:style-name="ce3">
            <text:p>0</text:p>
          </table:table-cell>
          <table:table-cell table:number-columns-repeated="16378"/>
        </table:table-row>
        <table:table-row table:style-name="ro4">
          <table:table-cell table:style-name="ce4"/>
          <table:table-cell table:number-columns-repeated="4" table:style-name="ce3"/>
          <table:table-cell office:value-type="float" office:value="0" table:formula="of:=[.E117]*100" table:style-name="ce3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epth</text:p>
          </table:table-cell>
          <table:table-cell office:value-type="string" table:style-name="ce4">
            <text:p>parallel omp</text:p>
          </table:table-cell>
          <table:table-cell office:value-type="string" table:style-name="ce4">
            <text:p>parallel ocl</text:p>
          </table:table-cell>
          <table:table-cell table:number-columns-repeated="3" table:style-name="ce3"/>
          <table:table-cell table:style-name="ce3">
            <draw:frame draw:z-index="15" draw:id="id15" draw:style-name="a15" draw:name="Diagramm 16" svg:x="0.83116in" svg:y="0.02008in" svg:width="5.59882in" svg:height="2.67205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float" office:value="1.3169999999999999E-2" table:style-name="ce13">
            <text:p>0,01317</text:p>
          </table:table-cell>
          <table:table-cell office:value-type="float" office:value="0.11772886" table:style-name="ce13">
            <text:p>0,11772886</text:p>
          </table:table-cell>
          <table:table-cell table:style-name="ce3"/>
          <table:table-cell office:value-type="float" office:value="8.9391693242217176" table:formula="of:=[.C119]/[.B119]" table:style-name="ce3">
            <text:p>8,939169324</text:p>
          </table:table-cell>
          <table:table-cell office:value-type="float" office:value="893.91693242217173" table:formula="of:=[.E119]*100" table:style-name="ce3">
            <text:p>893,9169324</text:p>
          </table:table-cell>
          <table:table-cell table:number-columns-repeated="16378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float" office:value="4.9421400000000002E-3" table:style-name="ce13">
            <text:p>0,00494214</text:p>
          </table:table-cell>
          <table:table-cell office:value-type="float" office:value="0.14013486" table:style-name="ce13">
            <text:p>0,14013486</text:p>
          </table:table-cell>
          <table:table-cell table:style-name="ce3"/>
          <table:table-cell office:value-type="float" office:value="28.355097184620426" table:formula="of:=[.C120]/[.B120]" table:style-name="ce3">
            <text:p>28,35509718</text:p>
          </table:table-cell>
          <table:table-cell office:value-type="float" office:value="2835.5097184620427" table:formula="of:=[.E120]*100" table:style-name="ce3">
            <text:p>2835,509718</text:p>
          </table:table-cell>
          <table:table-cell table:number-columns-repeated="16378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float" office:value="2.8865700000000002E-3" table:style-name="ce13">
            <text:p>0,00288657</text:p>
          </table:table-cell>
          <table:table-cell office:value-type="float" office:value="0.12746642999999999" table:style-name="ce13">
            <text:p>0,12746643</text:p>
          </table:table-cell>
          <table:table-cell table:style-name="ce3"/>
          <table:table-cell office:value-type="float" office:value="44.158440640621912" table:formula="of:=[.C121]/[.B121]" table:style-name="ce3">
            <text:p>44,15844064</text:p>
          </table:table-cell>
          <table:table-cell office:value-type="float" office:value="4415.8440640621911" table:formula="of:=[.E121]*100" table:style-name="ce3">
            <text:p>4415,844064</text:p>
          </table:table-cell>
          <table:table-cell table:number-columns-repeated="16378"/>
        </table:table-row>
        <table:table-row table:style-name="ro4">
          <table:table-cell office:value-type="float" office:value="11" table:style-name="ce4">
            <text:p>11</text:p>
          </table:table-cell>
          <table:table-cell office:value-type="float" office:value="1.302471E-2" table:style-name="ce13">
            <text:p>0,01302471</text:p>
          </table:table-cell>
          <table:table-cell office:value-type="float" office:value="0.12596985999999999" table:style-name="ce13">
            <text:p>0,12596986</text:p>
          </table:table-cell>
          <table:table-cell table:style-name="ce3"/>
          <table:table-cell office:value-type="float" office:value="9.671605740166191" table:formula="of:=[.C122]/[.B122]" table:style-name="ce3">
            <text:p>9,67160574</text:p>
          </table:table-cell>
          <table:table-cell office:value-type="float" office:value="967.16057401661908" table:formula="of:=[.E122]*100" table:style-name="ce3">
            <text:p>967,160574</text:p>
          </table:table-cell>
          <table:table-cell table:number-columns-repeated="16378"/>
        </table:table-row>
        <table:table-row table:style-name="ro4">
          <table:table-cell office:value-type="float" office:value="13" table:style-name="ce4">
            <text:p>13</text:p>
          </table:table-cell>
          <table:table-cell office:value-type="float" office:value="2.513429E-2" table:style-name="ce13">
            <text:p>0,02513429</text:p>
          </table:table-cell>
          <table:table-cell office:value-type="float" office:value="0.14855686000000001" table:style-name="ce13">
            <text:p>0,14855686</text:p>
          </table:table-cell>
          <table:table-cell table:style-name="ce3"/>
          <table:table-cell office:value-type="float" office:value="5.910525421645092" table:formula="of:=[.C123]/[.B123]" table:style-name="ce3">
            <text:p>5,910525422</text:p>
          </table:table-cell>
          <table:table-cell office:value-type="float" office:value="591.05254216450919" table:formula="of:=[.E123]*100" table:style-name="ce3">
            <text:p>591,0525422</text:p>
          </table:table-cell>
          <table:table-cell table:number-columns-repeated="16378"/>
        </table:table-row>
        <table:table-row table:style-name="ro4">
          <table:table-cell office:value-type="float" office:value="15" table:style-name="ce4">
            <text:p>15</text:p>
          </table:table-cell>
          <table:table-cell office:value-type="float" office:value="7.7827709999999994E-2" table:style-name="ce13">
            <text:p>0,07782771</text:p>
          </table:table-cell>
          <table:table-cell office:value-type="float" office:value="0.18828671" table:style-name="ce13">
            <text:p>0,18828671</text:p>
          </table:table-cell>
          <table:table-cell table:style-name="ce3"/>
          <table:table-cell office:value-type="float" office:value="2.4192759879482515" table:formula="of:=[.C124]/[.B124]" table:style-name="ce3">
            <text:p>2,419275988</text:p>
          </table:table-cell>
          <table:table-cell office:value-type="float" office:value="241.92759879482514" table:formula="of:=[.E124]*100" table:style-name="ce3">
            <text:p>241,9275988</text:p>
          </table:table-cell>
          <table:table-cell table:number-columns-repeated="16378"/>
        </table:table-row>
        <table:table-row table:style-name="ro4">
          <table:table-cell office:value-type="float" office:value="17" table:style-name="ce4">
            <text:p>17</text:p>
          </table:table-cell>
          <table:table-cell office:value-type="float" office:value="0.27402328999999997" table:style-name="ce13">
            <text:p>0,27402329</text:p>
          </table:table-cell>
          <table:table-cell office:value-type="float" office:value="0.30136329000000001" table:style-name="ce13">
            <text:p>0,30136329</text:p>
          </table:table-cell>
          <table:table-cell table:style-name="ce3"/>
          <table:table-cell office:value-type="float" office:value="1.0997725412318056" table:formula="of:=[.C125]/[.B125]" table:style-name="ce3">
            <text:p>1,099772541</text:p>
          </table:table-cell>
          <table:table-cell office:value-type="float" office:value="109.97725412318056" table:formula="of:=[.E125]*100" table:style-name="ce3">
            <text:p>109,9772541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float" office:value="0.99109928999999997" table:style-name="ce13">
            <text:p>0,99109929</text:p>
          </table:table-cell>
          <table:table-cell office:value-type="float" office:value="0.69139813999999999" table:style-name="ce13">
            <text:p>0,69139814</text:p>
          </table:table-cell>
          <table:table-cell table:style-name="ce3"/>
          <table:table-cell office:value-type="float" office:value="0.69760734063284413" table:formula="of:=[.C126]/[.B126]" table:style-name="ce3">
            <text:p>0,697607341</text:p>
          </table:table-cell>
          <table:table-cell office:value-type="float" office:value="69.760734063284417" table:formula="of:=[.E126]*100" table:style-name="ce3">
            <text:p>69,76073406</text:p>
          </table:table-cell>
          <table:table-cell table:number-columns-repeated="16378"/>
        </table:table-row>
        <table:table-row table:style-name="ro4">
          <table:table-cell office:value-type="float" office:value="21" table:style-name="ce4">
            <text:p>21</text:p>
          </table:table-cell>
          <table:table-cell office:value-type="float" office:value="3.8165171400000002" table:style-name="ce13">
            <text:p>3,81651714</text:p>
          </table:table-cell>
          <table:table-cell office:value-type="float" office:value="2.1717428600000002" table:style-name="ce13">
            <text:p>2,17174286</text:p>
          </table:table-cell>
          <table:table-cell table:style-name="ce3"/>
          <table:table-cell office:value-type="float" office:value="0.56903788987044879" table:formula="of:=[.C127]/[.B127]" table:style-name="ce3">
            <text:p>0,56903789</text:p>
          </table:table-cell>
          <table:table-cell office:value-type="float" office:value="56.903788987044877" table:formula="of:=[.E127]*100" table:style-name="ce3">
            <text:p>56,90378899</text:p>
          </table:table-cell>
          <table:table-cell table:number-columns-repeated="16378"/>
        </table:table-row>
        <table:table-row table:style-name="ro4">
          <table:table-cell table:number-columns-repeated="16384" table:style-name="ce3"/>
        </table:table-row>
        <table:table-row table:number-rows-repeated="1048448" table:style-name="ro2">
          <table:table-cell table:number-columns-repeated="16384"/>
        </table:table-row>
      </table:table>
      <table:table table:name="Amdahls_Law" table:style-name="ta4">
        <table:table-column table:style-name="co17" table:default-cell-style-name="ce5"/>
        <table:table-column table:style-name="co18" table:default-cell-style-name="ce3"/>
        <table:table-column table:style-name="co19" table:number-columns-repeated="3" table:default-cell-style-name="ce3"/>
        <table:table-column table:style-name="co20" table:default-cell-style-name="ce3"/>
        <table:table-column table:style-name="co19" table:number-columns-repeated="3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9" table:number-columns-repeated="2" table:default-cell-style-name="ce3"/>
        <table:table-column table:style-name="co22" table:default-cell-style-name="ce3"/>
        <table:table-column table:style-name="co24" table:default-cell-style-name="ce3"/>
        <table:table-column table:style-name="co25" table:default-cell-style-name="ce3"/>
        <table:table-column table:style-name="co19" table:number-columns-repeated="16" table:default-cell-style-name="ce3"/>
        <table:table-column table:style-name="co26" table:number-columns-repeated="16351" table:default-cell-style-name="ce3"/>
        <table:table-row table:style-name="ro3">
          <table:table-cell office:value-type="string" table:number-columns-spanned="3" table:number-rows-spanned="1" table:style-name="ce17">
            <text:p>Amdahl’s Law – Beschleunigungsfaktor</text:p>
          </table:table-cell>
          <table:covered-table-cell table:number-columns-repeated="2"/>
          <table:table-cell table:number-columns-repeated="9" table:style-name="ce3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table:number-columns-repeated="11" table:style-name="ce3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string" table:style-name="ce5">
            <text:p>Baumtiefe [Ebenen]</text:p>
          </table:table-cell>
          <table:table-cell office:value-type="string" table:number-columns-spanned="2" table:number-rows-spanned="1" table:style-name="ce7">
            <text:p>Aufgezeichnete Zeiten</text:p>
          </table:table-cell>
          <table:covered-table-cell/>
          <table:table-cell table:number-columns-repeated="6" table:style-name="ce4"/>
          <table:table-cell office:value-type="string" table:style-name="ce4">
            <text:p>Mittelwert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3">
            <text:p>SER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E-4" table:formula="of:=0.0001" table:style-name="ce3">
            <text:p>0,0001</text:p>
          </table:table-cell>
          <table:table-cell office:value-type="string" table:style-name="ce3">
            <text:p>DUMMYWERT</text:p>
          </table:table-cell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3">
            <text:p>DUMMYWERT</text:p>
          </table:table-cell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3">
            <text:p>SERT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.285714285714286E-4" table:formula="of:=SUM([.C6:.I6])/7" table:style-name="ce3">
            <text:p>0,000428571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0" table:style-name="ce15">
            <text:p>0</text:p>
          </table:table-cell>
          <table:table-cell office:value-type="float" office:value="1E-3" table:style-name="ce15">
            <text:p>0,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.4285714285714287E-4" table:formula="of:=SUM([.C7:.I7])/7" table:style-name="ce15">
            <text:p>0,000142857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3">
            <text:p>SER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4285714285714287E-4" table:formula="of:=SUM([.C8:.I8])/7" table:style-name="ce3">
            <text:p>0,000142857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E-3" table:style-name="ce15">
            <text:p>0,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.4285714285714287E-4" table:formula="of:=SUM([.C9:.I9])/7" table:style-name="ce15">
            <text:p>0,000142857</text:p>
          </table:table-cell>
          <table:table-cell table:style-name="ce3"/>
          <table:table-cell table:style-name="ce10"/>
          <table:table-cell table:style-name="ce16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3">
            <text:p>SER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4285714285714287E-4" table:formula="of:=SUM([.C10:.I10])/7" table:style-name="ce3">
            <text:p>0,000142857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E-4" table:style-name="ce15">
            <text:p>0,0001</text:p>
          </table:table-cell>
          <table:table-cell office:value-type="string" table:style-name="ce3">
            <text:p>DUMMYWERT</text:p>
          </table:table-cell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3">
            <text:p>SERT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,001</text:p>
          </table:table-cell>
          <table:table-cell office:value-type="float" office:value="5.7142857142857147E-4" table:formula="of:=SUM([.C12:.I12])/7" table:style-name="ce3">
            <text:p>0,000571429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1E-3" table:style-name="ce15">
            <text:p>0,001</text:p>
          </table:table-cell>
          <table:table-cell office:value-type="float" office:value="1E-3" table:style-name="ce15">
            <text:p>0,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E-3" table:style-name="ce15">
            <text:p>0,001</text:p>
          </table:table-cell>
          <table:table-cell office:value-type="float" office:value="4.285714285714286E-4" table:formula="of:=SUM([.C13:.I13])/7" table:style-name="ce15">
            <text:p>0,000428571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3">
            <text:p>SERT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style-name="ce3">
            <text:p>0,001</text:p>
          </table:table-cell>
          <table:table-cell office:value-type="float" office:value="1E-3" table:formula="of:=SUM([.C14:.I14])/7" table:style-name="ce3">
            <text:p>0,001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E-3" table:style-name="ce15">
            <text:p>0,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E-3" table:style-name="ce15">
            <text:p>0,001</text:p>
          </table:table-cell>
          <table:table-cell office:value-type="float" office:value="2.8571428571428574E-4" table:formula="of:=SUM([.C15:.I15])/7" table:style-name="ce15">
            <text:p>0,000285714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3">
            <text:p>SERT</text:p>
          </table:table-cell>
          <table:table-cell office:value-type="float" office:value="2E-3" table:style-name="ce3">
            <text:p>0,002</text:p>
          </table:table-cell>
          <table:table-cell office:value-type="float" office:value="1E-3" table:style-name="ce3">
            <text:p>0,001</text:p>
          </table:table-cell>
          <table:table-cell office:value-type="float" office:value="2E-3" table:style-name="ce3">
            <text:p>0,002</text:p>
          </table:table-cell>
          <table:table-cell office:value-type="float" office:value="1E-3" table:style-name="ce3">
            <text:p>0,001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2E-3" table:style-name="ce3">
            <text:p>0,002</text:p>
          </table:table-cell>
          <table:table-cell office:value-type="float" office:value="1.7142857142857144E-3" table:formula="of:=SUM([.C16:.I16])/7" table:style-name="ce3">
            <text:p>0,001714286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2E-3" table:style-name="ce15">
            <text:p>0,002</text:p>
          </table:table-cell>
          <table:table-cell office:value-type="float" office:value="1E-3" table:style-name="ce15">
            <text:p>0,001</text:p>
          </table:table-cell>
          <table:table-cell office:value-type="float" office:value="1E-3" table:style-name="ce15">
            <text:p>0,001</text:p>
          </table:table-cell>
          <table:table-cell office:value-type="float" office:value="1E-3" table:style-name="ce15">
            <text:p>0,001</text:p>
          </table:table-cell>
          <table:table-cell office:value-type="float" office:value="1E-3" table:style-name="ce15">
            <text:p>0,001</text:p>
          </table:table-cell>
          <table:table-cell office:value-type="float" office:value="2E-3" table:style-name="ce15">
            <text:p>0,002</text:p>
          </table:table-cell>
          <table:table-cell office:value-type="float" office:value="2E-3" table:style-name="ce15">
            <text:p>0,002</text:p>
          </table:table-cell>
          <table:table-cell office:value-type="float" office:value="1.4285714285714286E-3" table:formula="of:=SUM([.C17:.I17])/7" table:style-name="ce15">
            <text:p>0,001428571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3">
            <text:p>SERT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3.0000000000000001E-3" table:style-name="ce3">
            <text:p>0,003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3.2857142857142855E-3" table:formula="of:=SUM([.C18:.I18])/7" table:style-name="ce3">
            <text:p>0,003285714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3.0000000000000001E-3" table:style-name="ce15">
            <text:p>0,003</text:p>
          </table:table-cell>
          <table:table-cell office:value-type="float" office:value="3.0000000000000001E-3" table:style-name="ce15">
            <text:p>0,003</text:p>
          </table:table-cell>
          <table:table-cell office:value-type="float" office:value="3.0000000000000001E-3" table:style-name="ce15">
            <text:p>0,003</text:p>
          </table:table-cell>
          <table:table-cell office:value-type="float" office:value="2E-3" table:style-name="ce15">
            <text:p>0,002</text:p>
          </table:table-cell>
          <table:table-cell office:value-type="float" office:value="3.0000000000000001E-3" table:style-name="ce15">
            <text:p>0,003</text:p>
          </table:table-cell>
          <table:table-cell office:value-type="float" office:value="3.0000000000000001E-3" table:style-name="ce15">
            <text:p>0,003</text:p>
          </table:table-cell>
          <table:table-cell office:value-type="float" office:value="4.0000000000000001E-3" table:style-name="ce15">
            <text:p>0,004</text:p>
          </table:table-cell>
          <table:table-cell office:value-type="float" office:value="3.0000000000000001E-3" table:formula="of:=SUM([.C19:.I19])/7" table:style-name="ce15">
            <text:p>0,003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3">
            <text:p>SERT</text:p>
          </table:table-cell>
          <table:table-cell office:value-type="float" office:value="8.0000000000000002E-3" table:style-name="ce3">
            <text:p>0,008</text:p>
          </table:table-cell>
          <table:table-cell office:value-type="float" office:value="5.0000000000000001E-3" table:style-name="ce3">
            <text:p>0,005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5.0000000000000001E-3" table:style-name="ce3">
            <text:p>0,005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5.2857142857142868E-3" table:formula="of:=SUM([.C20:.I20])/7" table:style-name="ce3">
            <text:p>0,005285714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7.0000000000000001E-3" table:style-name="ce15">
            <text:p>0,007</text:p>
          </table:table-cell>
          <table:table-cell office:value-type="float" office:value="5.0000000000000001E-3" table:style-name="ce15">
            <text:p>0,005</text:p>
          </table:table-cell>
          <table:table-cell office:value-type="float" office:value="4.0000000000000001E-3" table:style-name="ce15">
            <text:p>0,004</text:p>
          </table:table-cell>
          <table:table-cell office:value-type="float" office:value="4.0000000000000001E-3" table:style-name="ce15">
            <text:p>0,004</text:p>
          </table:table-cell>
          <table:table-cell office:value-type="float" office:value="5.0000000000000001E-3" table:style-name="ce15">
            <text:p>0,005</text:p>
          </table:table-cell>
          <table:table-cell office:value-type="float" office:value="4.0000000000000001E-3" table:style-name="ce15">
            <text:p>0,004</text:p>
          </table:table-cell>
          <table:table-cell office:value-type="float" office:value="6.0000000000000001E-3" table:style-name="ce15">
            <text:p>0,006</text:p>
          </table:table-cell>
          <table:table-cell office:value-type="float" office:value="5.0000000000000001E-3" table:formula="of:=SUM([.C21:.I21])/7" table:style-name="ce15">
            <text:p>0,005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3">
            <text:p>SERT</text:p>
          </table:table-cell>
          <table:table-cell office:value-type="float" office:value="0.01" table:style-name="ce3">
            <text:p>0,01</text:p>
          </table:table-cell>
          <table:table-cell office:value-type="float" office:value="1.0999999999999999E-2" table:style-name="ce3">
            <text:p>0,011</text:p>
          </table:table-cell>
          <table:table-cell office:value-type="float" office:value="0.01" table:style-name="ce3">
            <text:p>0,01</text:p>
          </table:table-cell>
          <table:table-cell office:value-type="float" office:value="1.2E-2" table:style-name="ce3">
            <text:p>0,012</text:p>
          </table:table-cell>
          <table:table-cell office:value-type="float" office:value="0.01" table:style-name="ce3">
            <text:p>0,01</text:p>
          </table:table-cell>
          <table:table-cell office:value-type="float" office:value="8.0000000000000002E-3" table:style-name="ce3">
            <text:p>0,008</text:p>
          </table:table-cell>
          <table:table-cell office:value-type="float" office:value="7.0000000000000001E-3" table:style-name="ce3">
            <text:p>0,007</text:p>
          </table:table-cell>
          <table:table-cell office:value-type="float" office:value="9.7142857142857152E-3" table:formula="of:=SUM([.C22:.I22])/7" table:style-name="ce3">
            <text:p>0,009714286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8.9999999999999993E-3" table:style-name="ce15">
            <text:p>0,009</text:p>
          </table:table-cell>
          <table:table-cell office:value-type="float" office:value="8.9999999999999993E-3" table:style-name="ce15">
            <text:p>0,009</text:p>
          </table:table-cell>
          <table:table-cell office:value-type="float" office:value="8.9999999999999993E-3" table:style-name="ce15">
            <text:p>0,009</text:p>
          </table:table-cell>
          <table:table-cell office:value-type="float" office:value="8.9999999999999993E-3" table:style-name="ce15">
            <text:p>0,009</text:p>
          </table:table-cell>
          <table:table-cell office:value-type="float" office:value="8.9999999999999993E-3" table:style-name="ce15">
            <text:p>0,009</text:p>
          </table:table-cell>
          <table:table-cell office:value-type="float" office:value="6.0000000000000001E-3" table:style-name="ce15">
            <text:p>0,006</text:p>
          </table:table-cell>
          <table:table-cell office:value-type="float" office:value="6.0000000000000001E-3" table:style-name="ce15">
            <text:p>0,006</text:p>
          </table:table-cell>
          <table:table-cell office:value-type="float" office:value="8.1428571428571427E-3" table:formula="of:=SUM([.C23:.I23])/7" table:style-name="ce15">
            <text:p>0,008142857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3">
            <text:p>SERT</text:p>
          </table:table-cell>
          <table:table-cell office:value-type="float" office:value="1.9E-2" table:style-name="ce3">
            <text:p>0,019</text:p>
          </table:table-cell>
          <table:table-cell office:value-type="float" office:value="1.7000000000000001E-2" table:style-name="ce3">
            <text:p>0,017</text:p>
          </table:table-cell>
          <table:table-cell office:value-type="float" office:value="2.1000000000000001E-2" table:style-name="ce3">
            <text:p>0,021</text:p>
          </table:table-cell>
          <table:table-cell office:value-type="float" office:value="1.7000000000000001E-2" table:style-name="ce3">
            <text:p>0,017</text:p>
          </table:table-cell>
          <table:table-cell office:value-type="float" office:value="1.7000000000000001E-2" table:style-name="ce3">
            <text:p>0,017</text:p>
          </table:table-cell>
          <table:table-cell office:value-type="float" office:value="1.6E-2" table:style-name="ce3">
            <text:p>0,016</text:p>
          </table:table-cell>
          <table:table-cell office:value-type="float" office:value="1.7000000000000001E-2" table:style-name="ce3">
            <text:p>0,017</text:p>
          </table:table-cell>
          <table:table-cell office:value-type="float" office:value="1.7714285714285717E-2" table:formula="of:=SUM([.C24:.I24])/7" table:style-name="ce3">
            <text:p>0,017714286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1.7000000000000001E-2" table:style-name="ce15">
            <text:p>0,017</text:p>
          </table:table-cell>
          <table:table-cell office:value-type="float" office:value="1.4999999999999999E-2" table:style-name="ce15">
            <text:p>0,015</text:p>
          </table:table-cell>
          <table:table-cell office:value-type="float" office:value="1.9E-2" table:style-name="ce15">
            <text:p>0,019</text:p>
          </table:table-cell>
          <table:table-cell office:value-type="float" office:value="1.4999999999999999E-2" table:style-name="ce15">
            <text:p>0,015</text:p>
          </table:table-cell>
          <table:table-cell office:value-type="float" office:value="1.4999999999999999E-2" table:style-name="ce15">
            <text:p>0,015</text:p>
          </table:table-cell>
          <table:table-cell office:value-type="float" office:value="1.4999999999999999E-2" table:style-name="ce15">
            <text:p>0,015</text:p>
          </table:table-cell>
          <table:table-cell office:value-type="float" office:value="1.4999999999999999E-2" table:style-name="ce15">
            <text:p>0,015</text:p>
          </table:table-cell>
          <table:table-cell office:value-type="float" office:value="1.5857142857142858E-2" table:formula="of:=SUM([.C25:.I25])/7" table:style-name="ce15">
            <text:p>0,015857143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3">
            <text:p>SERT</text:p>
          </table:table-cell>
          <table:table-cell office:value-type="float" office:value="3.2000000000000001E-2" table:style-name="ce3">
            <text:p>0,032</text:p>
          </table:table-cell>
          <table:table-cell office:value-type="float" office:value="3.5999999999999997E-2" table:style-name="ce3">
            <text:p>0,036</text:p>
          </table:table-cell>
          <table:table-cell office:value-type="float" office:value="3.3000000000000002E-2" table:style-name="ce3">
            <text:p>0,033</text:p>
          </table:table-cell>
          <table:table-cell office:value-type="float" office:value="3.2000000000000001E-2" table:style-name="ce3">
            <text:p>0,032</text:p>
          </table:table-cell>
          <table:table-cell office:value-type="float" office:value="5.1999999999999998E-2" table:style-name="ce3">
            <text:p>0,052</text:p>
          </table:table-cell>
          <table:table-cell office:value-type="float" office:value="3.3000000000000002E-2" table:style-name="ce3">
            <text:p>0,033</text:p>
          </table:table-cell>
          <table:table-cell office:value-type="float" office:value="3.9E-2" table:style-name="ce3">
            <text:p>0,039</text:p>
          </table:table-cell>
          <table:table-cell office:value-type="float" office:value="3.6714285714285713E-2" table:formula="of:=SUM([.C26:.I26])/7" table:style-name="ce3">
            <text:p>0,036714286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2.9000000000000001E-2" table:style-name="ce15">
            <text:p>0,029</text:p>
          </table:table-cell>
          <table:table-cell office:value-type="float" office:value="3.2000000000000001E-2" table:style-name="ce15">
            <text:p>0,032</text:p>
          </table:table-cell>
          <table:table-cell office:value-type="float" office:value="0.03" table:style-name="ce15">
            <text:p>0,03</text:p>
          </table:table-cell>
          <table:table-cell office:value-type="float" office:value="2.8000000000000001E-2" table:style-name="ce15">
            <text:p>0,028</text:p>
          </table:table-cell>
          <table:table-cell office:value-type="float" office:value="4.7E-2" table:style-name="ce15">
            <text:p>0,047</text:p>
          </table:table-cell>
          <table:table-cell office:value-type="float" office:value="2.9000000000000001E-2" table:style-name="ce15">
            <text:p>0,029</text:p>
          </table:table-cell>
          <table:table-cell office:value-type="float" office:value="3.5000000000000003E-2" table:style-name="ce15">
            <text:p>0,035</text:p>
          </table:table-cell>
          <table:table-cell office:value-type="float" office:value="3.2857142857142856E-2" table:formula="of:=SUM([.C27:.I27])/7" table:style-name="ce15">
            <text:p>0,032857143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3">
            <text:p>SERT</text:p>
          </table:table-cell>
          <table:table-cell office:value-type="float" office:value="5.5E-2" table:style-name="ce3">
            <text:p>0,055</text:p>
          </table:table-cell>
          <table:table-cell office:value-type="float" office:value="5.5E-2" table:style-name="ce3">
            <text:p>0,055</text:p>
          </table:table-cell>
          <table:table-cell office:value-type="float" office:value="5.8999999999999997E-2" table:style-name="ce3">
            <text:p>0,059</text:p>
          </table:table-cell>
          <table:table-cell office:value-type="float" office:value="5.6000000000000001E-2" table:style-name="ce3">
            <text:p>0,056</text:p>
          </table:table-cell>
          <table:table-cell office:value-type="float" office:value="5.8000000000000003E-2" table:style-name="ce3">
            <text:p>0,058</text:p>
          </table:table-cell>
          <table:table-cell office:value-type="float" office:value="7.1999999999999995E-2" table:style-name="ce3">
            <text:p>0,072</text:p>
          </table:table-cell>
          <table:table-cell office:value-type="float" office:value="6.7000000000000004E-2" table:style-name="ce3">
            <text:p>0,067</text:p>
          </table:table-cell>
          <table:table-cell office:value-type="float" office:value="6.0285714285714283E-2" table:formula="of:=SUM([.C28:.I28])/7" table:style-name="ce3">
            <text:p>0,060285714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5.0999999999999997E-2" table:style-name="ce15">
            <text:p>0,051</text:p>
          </table:table-cell>
          <table:table-cell office:value-type="float" office:value="0.05" table:style-name="ce15">
            <text:p>0,05</text:p>
          </table:table-cell>
          <table:table-cell office:value-type="float" office:value="5.5E-2" table:style-name="ce15">
            <text:p>0,055</text:p>
          </table:table-cell>
          <table:table-cell office:value-type="float" office:value="5.0999999999999997E-2" table:style-name="ce15">
            <text:p>0,051</text:p>
          </table:table-cell>
          <table:table-cell office:value-type="float" office:value="5.2999999999999999E-2" table:style-name="ce15">
            <text:p>0,053</text:p>
          </table:table-cell>
          <table:table-cell office:value-type="float" office:value="6.7000000000000004E-2" table:style-name="ce15">
            <text:p>0,067</text:p>
          </table:table-cell>
          <table:table-cell office:value-type="float" office:value="6.2E-2" table:style-name="ce15">
            <text:p>0,062</text:p>
          </table:table-cell>
          <table:table-cell office:value-type="float" office:value="5.557142857142857E-2" table:formula="of:=SUM([.C29:.I29])/7" table:style-name="ce15">
            <text:p>0,055571429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2" table:style-name="ce3"/>
          <table:table-cell table:number-columns-repeated="10" table:style-name="ce14"/>
          <table:table-cell table:number-columns-repeated="16351" table:style-name="ce1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3">
            <text:p>SERT</text:p>
          </table:table-cell>
          <table:table-cell office:value-type="float" office:value="0.128" table:style-name="ce3">
            <text:p>0,128</text:p>
          </table:table-cell>
          <table:table-cell office:value-type="float" office:value="0.14399999999999999" table:style-name="ce3">
            <text:p>0,144</text:p>
          </table:table-cell>
          <table:table-cell office:value-type="float" office:value="0.11899999999999999" table:style-name="ce3">
            <text:p>0,119</text:p>
          </table:table-cell>
          <table:table-cell office:value-type="float" office:value="0.107" table:style-name="ce3">
            <text:p>0,107</text:p>
          </table:table-cell>
          <table:table-cell office:value-type="float" office:value="9.1999999999999998E-2" table:style-name="ce3">
            <text:p>0,092</text:p>
          </table:table-cell>
          <table:table-cell office:value-type="float" office:value="7.6999999999999999E-2" table:style-name="ce3">
            <text:p>0,077</text:p>
          </table:table-cell>
          <table:table-cell office:value-type="float" office:value="7.2999999999999995E-2" table:style-name="ce3">
            <text:p>0,073</text:p>
          </table:table-cell>
          <table:table-cell office:value-type="float" office:value="0.10571428571428569" table:formula="of:=SUM([.C30:.I30])/7" table:style-name="ce3">
            <text:p>0,105714286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0.111" table:style-name="ce15">
            <text:p>0,111</text:p>
          </table:table-cell>
          <table:table-cell office:value-type="float" office:value="0.13100000000000001" table:style-name="ce15">
            <text:p>0,131</text:p>
          </table:table-cell>
          <table:table-cell office:value-type="float" office:value="0.107" table:style-name="ce15">
            <text:p>0,107</text:p>
          </table:table-cell>
          <table:table-cell office:value-type="float" office:value="9.5000000000000001E-2" table:style-name="ce15">
            <text:p>0,095</text:p>
          </table:table-cell>
          <table:table-cell office:value-type="float" office:value="8.2000000000000003E-2" table:style-name="ce15">
            <text:p>0,082</text:p>
          </table:table-cell>
          <table:table-cell office:value-type="float" office:value="6.9000000000000006E-2" table:style-name="ce15">
            <text:p>0,069</text:p>
          </table:table-cell>
          <table:table-cell office:value-type="float" office:value="6.5000000000000002E-2" table:style-name="ce15">
            <text:p>0,065</text:p>
          </table:table-cell>
          <table:table-cell office:value-type="float" office:value="9.4285714285714278E-2" table:formula="of:=SUM([.C31:.I31])/7" table:style-name="ce15">
            <text:p>0,094285714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3">
            <text:p>SERT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151" table:style-name="ce3">
            <text:p>0,151</text:p>
          </table:table-cell>
          <table:table-cell office:value-type="float" office:value="0.14299999999999999" table:style-name="ce3">
            <text:p>0,143</text:p>
          </table:table-cell>
          <table:table-cell office:value-type="float" office:value="0.21199999999999999" table:style-name="ce3">
            <text:p>0,212</text:p>
          </table:table-cell>
          <table:table-cell office:value-type="float" office:value="0.156" table:style-name="ce3">
            <text:p>0,156</text:p>
          </table:table-cell>
          <table:table-cell office:value-type="float" office:value="0.20100000000000001" table:style-name="ce3">
            <text:p>0,201</text:p>
          </table:table-cell>
          <table:table-cell office:value-type="float" office:value="0.17699999999999999" table:style-name="ce3">
            <text:p>0,177</text:p>
          </table:table-cell>
          <table:table-cell office:value-type="float" office:value="0.16857142857142859" table:formula="of:=SUM([.C32:.I32])/7" table:style-name="ce3">
            <text:p>0,168571429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0.126" table:style-name="ce15">
            <text:p>0,126</text:p>
          </table:table-cell>
          <table:table-cell office:value-type="float" office:value="0.13600000000000001" table:style-name="ce15">
            <text:p>0,136</text:p>
          </table:table-cell>
          <table:table-cell office:value-type="float" office:value="0.128" table:style-name="ce15">
            <text:p>0,128</text:p>
          </table:table-cell>
          <table:table-cell office:value-type="float" office:value="0.18" table:style-name="ce15">
            <text:p>0,18</text:p>
          </table:table-cell>
          <table:table-cell office:value-type="float" office:value="0.13900000000000001" table:style-name="ce15">
            <text:p>0,139</text:p>
          </table:table-cell>
          <table:table-cell office:value-type="float" office:value="0.185" table:style-name="ce15">
            <text:p>0,185</text:p>
          </table:table-cell>
          <table:table-cell office:value-type="float" office:value="0.159" table:style-name="ce15">
            <text:p>0,159</text:p>
          </table:table-cell>
          <table:table-cell office:value-type="float" office:value="0.15042857142857144" table:formula="of:=SUM([.C33:.I33])/7" table:style-name="ce15">
            <text:p>0,150428571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3">
            <text:p>SERT</text:p>
          </table:table-cell>
          <table:table-cell office:value-type="float" office:value="0.37" table:style-name="ce3">
            <text:p>0,37</text:p>
          </table:table-cell>
          <table:table-cell office:value-type="float" office:value="0.35399999999999998" table:style-name="ce3">
            <text:p>0,354</text:p>
          </table:table-cell>
          <table:table-cell office:value-type="float" office:value="0.26800000000000002" table:style-name="ce3">
            <text:p>0,268</text:p>
          </table:table-cell>
          <table:table-cell office:value-type="float" office:value="0.307" table:style-name="ce3">
            <text:p>0,307</text:p>
          </table:table-cell>
          <table:table-cell office:value-type="float" office:value="0.374" table:style-name="ce3">
            <text:p>0,374</text:p>
          </table:table-cell>
          <table:table-cell office:value-type="float" office:value="0.54300000000000004" table:style-name="ce3">
            <text:p>0,543</text:p>
          </table:table-cell>
          <table:table-cell office:value-type="float" office:value="0.47299999999999998" table:style-name="ce3">
            <text:p>0,473</text:p>
          </table:table-cell>
          <table:table-cell office:value-type="float" office:value="0.38414285714285717" table:formula="of:=SUM([.C34:.I34])/7" table:style-name="ce3">
            <text:p>0,384142857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0.33300000000000002" table:style-name="ce15">
            <text:p>0,333</text:p>
          </table:table-cell>
          <table:table-cell office:value-type="float" office:value="0.30499999999999999" table:style-name="ce15">
            <text:p>0,305</text:p>
          </table:table-cell>
          <table:table-cell office:value-type="float" office:value="0.24199999999999999" table:style-name="ce15">
            <text:p>0,242</text:p>
          </table:table-cell>
          <table:table-cell office:value-type="float" office:value="0.28000000000000003" table:style-name="ce15">
            <text:p>0,28</text:p>
          </table:table-cell>
          <table:table-cell office:value-type="float" office:value="0.33100000000000002" table:style-name="ce15">
            <text:p>0,331</text:p>
          </table:table-cell>
          <table:table-cell office:value-type="float" office:value="0.47199999999999998" table:style-name="ce15">
            <text:p>0,472</text:p>
          </table:table-cell>
          <table:table-cell office:value-type="float" office:value="0.42399999999999999" table:style-name="ce15">
            <text:p>0,424</text:p>
          </table:table-cell>
          <table:table-cell office:value-type="float" office:value="0.34100000000000003" table:formula="of:=SUM([.C35:.I35])/7" table:style-name="ce15">
            <text:p>0,341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3">
            <text:p>SERT</text:p>
          </table:table-cell>
          <table:table-cell office:value-type="float" office:value="0.70599999999999996" table:style-name="ce3">
            <text:p>0,706</text:p>
          </table:table-cell>
          <table:table-cell office:value-type="float" office:value="0.68100000000000005" table:style-name="ce3">
            <text:p>0,681</text:p>
          </table:table-cell>
          <table:table-cell office:value-type="float" office:value="0.67800000000000005" table:style-name="ce3">
            <text:p>0,678</text:p>
          </table:table-cell>
          <table:table-cell office:value-type="float" office:value="0.77800000000000002" table:style-name="ce3">
            <text:p>0,778</text:p>
          </table:table-cell>
          <table:table-cell office:value-type="float" office:value="0.71599999999999997" table:style-name="ce3">
            <text:p>0,716</text:p>
          </table:table-cell>
          <table:table-cell office:value-type="float" office:value="0.7" table:style-name="ce3">
            <text:p>0,7</text:p>
          </table:table-cell>
          <table:table-cell office:value-type="float" office:value="0.68600000000000005" table:style-name="ce3">
            <text:p>0,686</text:p>
          </table:table-cell>
          <table:table-cell office:value-type="float" office:value="0.70642857142857152" table:formula="of:=SUM([.C36:.I36])/7" table:style-name="ce3">
            <text:p>0,706428571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0.61599999999999999" table:style-name="ce15">
            <text:p>0,616</text:p>
          </table:table-cell>
          <table:table-cell office:value-type="float" office:value="0.623" table:style-name="ce15">
            <text:p>0,623</text:p>
          </table:table-cell>
          <table:table-cell office:value-type="float" office:value="0.58799999999999997" table:style-name="ce15">
            <text:p>0,588</text:p>
          </table:table-cell>
          <table:table-cell office:value-type="float" office:value="0.71" table:style-name="ce15">
            <text:p>0,71</text:p>
          </table:table-cell>
          <table:table-cell office:value-type="float" office:value="0.65100000000000002" table:style-name="ce15">
            <text:p>0,651</text:p>
          </table:table-cell>
          <table:table-cell office:value-type="float" office:value="0.61499999999999999" table:style-name="ce15">
            <text:p>0,615</text:p>
          </table:table-cell>
          <table:table-cell office:value-type="float" office:value="0.61199999999999999" table:style-name="ce15">
            <text:p>0,612</text:p>
          </table:table-cell>
          <table:table-cell office:value-type="float" office:value="0.63071428571428567" table:formula="of:=SUM([.C37:.I37])/7" table:style-name="ce15">
            <text:p>0,630714286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3">
            <text:p>SERT</text:p>
          </table:table-cell>
          <table:table-cell office:value-type="float" office:value="1.3109999999999999" table:style-name="ce3">
            <text:p>1,311</text:p>
          </table:table-cell>
          <table:table-cell office:value-type="float" office:value="1.343" table:style-name="ce3">
            <text:p>1,343</text:p>
          </table:table-cell>
          <table:table-cell office:value-type="float" office:value="1.371" table:style-name="ce3">
            <text:p>1,371</text:p>
          </table:table-cell>
          <table:table-cell office:value-type="float" office:value="1.504" table:style-name="ce3">
            <text:p>1,504</text:p>
          </table:table-cell>
          <table:table-cell office:value-type="float" office:value="1.3740000000000001" table:style-name="ce3">
            <text:p>1,374</text:p>
          </table:table-cell>
          <table:table-cell office:value-type="float" office:value="1.431" table:style-name="ce3">
            <text:p>1,431</text:p>
          </table:table-cell>
          <table:table-cell office:value-type="float" office:value="1.4430000000000001" table:style-name="ce3">
            <text:p>1,443</text:p>
          </table:table-cell>
          <table:table-cell office:value-type="float" office:value="1.3967142857142856" table:formula="of:=SUM([.C38:.I38])/7" table:style-name="ce3">
            <text:p>1,396714286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1.1719999999999999" table:style-name="ce15">
            <text:p>1,172</text:p>
          </table:table-cell>
          <table:table-cell office:value-type="float" office:value="1.1839999999999999" table:style-name="ce15">
            <text:p>1,184</text:p>
          </table:table-cell>
          <table:table-cell office:value-type="float" office:value="1.173" table:style-name="ce15">
            <text:p>1,173</text:p>
          </table:table-cell>
          <table:table-cell office:value-type="float" office:value="1.3260000000000001" table:style-name="ce15">
            <text:p>1,326</text:p>
          </table:table-cell>
          <table:table-cell office:value-type="float" office:value="1.2050000000000001" table:style-name="ce15">
            <text:p>1,205</text:p>
          </table:table-cell>
          <table:table-cell office:value-type="float" office:value="1.3" table:style-name="ce15">
            <text:p>1,3</text:p>
          </table:table-cell>
          <table:table-cell office:value-type="float" office:value="1.302" table:style-name="ce15">
            <text:p>1,302</text:p>
          </table:table-cell>
          <table:table-cell office:value-type="float" office:value="1.2374285714285715" table:formula="of:=SUM([.C39:.I39])/7" table:style-name="ce15">
            <text:p>1,237428571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3">
            <text:p>SERT</text:p>
          </table:table-cell>
          <table:table-cell office:value-type="float" office:value="2.8439999999999999" table:style-name="ce3">
            <text:p>2,844</text:p>
          </table:table-cell>
          <table:table-cell office:value-type="float" office:value="3.4140000000000001" table:style-name="ce3">
            <text:p>3,414</text:p>
          </table:table-cell>
          <table:table-cell office:value-type="float" office:value="3.5569999999999999" table:style-name="ce3">
            <text:p>3,557</text:p>
          </table:table-cell>
          <table:table-cell office:value-type="float" office:value="4.117" table:style-name="ce3">
            <text:p>4,117</text:p>
          </table:table-cell>
          <table:table-cell office:value-type="float" office:value="4.7190000000000003" table:style-name="ce3">
            <text:p>4,719</text:p>
          </table:table-cell>
          <table:table-cell office:value-type="float" office:value="3.544" table:style-name="ce3">
            <text:p>3,544</text:p>
          </table:table-cell>
          <table:table-cell office:value-type="float" office:value="2.9119999999999999" table:style-name="ce3">
            <text:p>2,912</text:p>
          </table:table-cell>
          <table:table-cell office:value-type="float" office:value="3.5867142857142857" table:formula="of:=SUM([.C40:.I40])/7" table:style-name="ce3">
            <text:p>3,586714286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2.528" table:style-name="ce15">
            <text:p>2,528</text:p>
          </table:table-cell>
          <table:table-cell office:value-type="float" office:value="3.089" table:style-name="ce15">
            <text:p>3,089</text:p>
          </table:table-cell>
          <table:table-cell office:value-type="float" office:value="3.2189999999999999" table:style-name="ce15">
            <text:p>3,219</text:p>
          </table:table-cell>
          <table:table-cell office:value-type="float" office:value="3.7410000000000001" table:style-name="ce15">
            <text:p>3,741</text:p>
          </table:table-cell>
          <table:table-cell office:value-type="float" office:value="4.2670000000000003" table:style-name="ce15">
            <text:p>4,267</text:p>
          </table:table-cell>
          <table:table-cell office:value-type="float" office:value="3.2730000000000001" table:style-name="ce15">
            <text:p>3,273</text:p>
          </table:table-cell>
          <table:table-cell office:value-type="float" office:value="2.617" table:style-name="ce15">
            <text:p>2,617</text:p>
          </table:table-cell>
          <table:table-cell office:value-type="float" office:value="3.2477142857142858" table:formula="of:=SUM([.C41:.I41])/7" table:style-name="ce15">
            <text:p>3,247714286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3">
            <text:p>SERT</text:p>
          </table:table-cell>
          <table:table-cell office:value-type="float" office:value="7.2969999999999997" table:style-name="ce3">
            <text:p>7,297</text:p>
          </table:table-cell>
          <table:table-cell office:value-type="float" office:value="5.4969999999999999" table:style-name="ce3">
            <text:p>5,497</text:p>
          </table:table-cell>
          <table:table-cell office:value-type="float" office:value="6.54" table:style-name="ce3">
            <text:p>6,54</text:p>
          </table:table-cell>
          <table:table-cell office:value-type="float" office:value="5.8040000000000003" table:style-name="ce3">
            <text:p>5,804</text:p>
          </table:table-cell>
          <table:table-cell office:value-type="float" office:value="5.6790000000000003" table:style-name="ce3">
            <text:p>5,679</text:p>
          </table:table-cell>
          <table:table-cell office:value-type="float" office:value="4.49" table:style-name="ce3">
            <text:p>4,49</text:p>
          </table:table-cell>
          <table:table-cell office:value-type="float" office:value="4.5759999999999996" table:style-name="ce3">
            <text:p>4,576</text:p>
          </table:table-cell>
          <table:table-cell office:value-type="float" office:value="5.697571428571429" table:formula="of:=SUM([.C42:.I42])/7" table:style-name="ce3">
            <text:p>5,697571429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5.5380000000000003" table:style-name="ce15">
            <text:p>5,538</text:p>
          </table:table-cell>
          <table:table-cell office:value-type="float" office:value="4.9039999999999999" table:style-name="ce15">
            <text:p>4,904</text:p>
          </table:table-cell>
          <table:table-cell office:value-type="float" office:value="5.9980000000000002" table:style-name="ce15">
            <text:p>5,998</text:p>
          </table:table-cell>
          <table:table-cell office:value-type="float" office:value="5.2930000000000001" table:style-name="ce15">
            <text:p>5,293</text:p>
          </table:table-cell>
          <table:table-cell office:value-type="float" office:value="4.9790000000000001" table:style-name="ce15">
            <text:p>4,979</text:p>
          </table:table-cell>
          <table:table-cell office:value-type="float" office:value="4.0220000000000002" table:style-name="ce15">
            <text:p>4,022</text:p>
          </table:table-cell>
          <table:table-cell office:value-type="float" office:value="4.0640000000000001" table:style-name="ce15">
            <text:p>4,064</text:p>
          </table:table-cell>
          <table:table-cell office:value-type="float" office:value="4.9711428571428575" table:formula="of:=SUM([.C43:.I43])/7" table:style-name="ce15">
            <text:p>4,971142857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3">
            <text:p>SERT</text:p>
          </table:table-cell>
          <table:table-cell office:value-type="float" office:value="11.843" table:style-name="ce3">
            <text:p>11,843</text:p>
          </table:table-cell>
          <table:table-cell office:value-type="float" office:value="13.433" table:style-name="ce3">
            <text:p>13,433</text:p>
          </table:table-cell>
          <table:table-cell office:value-type="float" office:value="14.321999999999999" table:style-name="ce3">
            <text:p>14,322</text:p>
          </table:table-cell>
          <table:table-cell office:value-type="float" office:value="11.068" table:style-name="ce3">
            <text:p>11,068</text:p>
          </table:table-cell>
          <table:table-cell office:value-type="float" office:value="13.787000000000001" table:style-name="ce3">
            <text:p>13,787</text:p>
          </table:table-cell>
          <table:table-cell office:value-type="float" office:value="12.023" table:style-name="ce3">
            <text:p>12,023</text:p>
          </table:table-cell>
          <table:table-cell office:value-type="float" office:value="13.907" table:style-name="ce3">
            <text:p>13,907</text:p>
          </table:table-cell>
          <table:table-cell office:value-type="float" office:value="12.911857142857142" table:formula="of:=SUM([.C44:.I44])/7" table:style-name="ce3">
            <text:p>12,91185714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style-name="ce5"/>
          <table:table-cell office:value-type="string" table:style-name="ce15">
            <text:p>parallelisierbar</text:p>
          </table:table-cell>
          <table:table-cell office:value-type="float" office:value="9.3800000000000008" table:style-name="ce15">
            <text:p>9,38</text:p>
          </table:table-cell>
          <table:table-cell office:value-type="float" office:value="10.602" table:style-name="ce15">
            <text:p>10,602</text:p>
          </table:table-cell>
          <table:table-cell office:value-type="float" office:value="11.563000000000001" table:style-name="ce15">
            <text:p>11,563</text:p>
          </table:table-cell>
          <table:table-cell office:value-type="float" office:value="8.8439999999999994" table:style-name="ce15">
            <text:p>8,844</text:p>
          </table:table-cell>
          <table:table-cell office:value-type="float" office:value="11.32" table:style-name="ce15">
            <text:p>11,32</text:p>
          </table:table-cell>
          <table:table-cell office:value-type="float" office:value="9.8320000000000007" table:style-name="ce15">
            <text:p>9,832</text:p>
          </table:table-cell>
          <table:table-cell office:value-type="float" office:value="11.727" table:style-name="ce15">
            <text:p>11,727</text:p>
          </table:table-cell>
          <table:table-cell office:value-type="float" office:value="10.466857142857142" table:formula="of:=SUM([.C45:.I45])/7" table:style-name="ce15">
            <text:p>10,46685714</text:p>
          </table:table-cell>
          <table:table-cell table:style-name="ce3"/>
          <table:table-cell table:style-name="ce10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style-name="ce5"/>
          <table:table-cell table:number-columns-repeated="11" table:style-name="ce3"/>
          <table:table-cell table:style-name="ce14"/>
          <table:table-cell table:number-columns-repeated="8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number-columns-repeated="7" table:style-name="ce10"/>
          <table:table-cell table:style-name="ce3"/>
          <table:table-cell table:number-columns-repeated="13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3">
          <table:table-cell office:value-type="string" table:number-columns-spanned="2" table:number-rows-spanned="1" table:style-name="ce17">
            <text:p>Berechnungen Amdahl's Law</text:p>
          </table:table-cell>
          <table:covered-table-cell/>
          <table:table-cell office:value-type="float" office:value="4096" table:style-name="ce3">
            <text:p>4096</text:p>
          </table:table-cell>
          <table:table-cell office:value-type="string" table:style-name="ce3">
            <text:p>&lt;- max. GPU Kernanzahl (GraKa Thinkpad P15)</text:p>
          </table:table-cell>
          <table:table-cell table:number-columns-repeated="4" table:style-name="ce3"/>
          <table:table-cell table:number-columns-repeated="13" table:style-name="ce10"/>
          <table:table-cell table:number-columns-repeated="12" table:style-name="ce3"/>
          <table:table-cell table:number-columns-repeated="16351" table:style-name="ce10"/>
        </table:table-row>
        <table:table-row table:style-name="ro2">
          <table:table-cell table:number-columns-repeated="8" table:style-name="ce3"/>
          <table:table-cell table:number-columns-repeated="16376" table:style-name="ce10"/>
        </table:table-row>
        <table:table-row table:style-name="ro2">
          <table:table-cell office:value-type="string" table:style-name="ce5">
            <text:p>Baumtiefe [Ebenen]</text:p>
          </table:table-cell>
          <table:table-cell office:value-type="string" table:style-name="ce5">
            <text:p>P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</text:p>
          </table:table-cell>
          <table:table-cell table:style-name="ce4"/>
          <table:table-cell office:value-type="string" table:style-name="ce4">
            <text:p>Beschleunigungsfaktor</text:p>
          </table:table-cell>
          <table:table-cell table:style-name="ce4"/>
          <table:table-cell table:style-name="ce3"/>
          <table:table-cell table:number-columns-repeated="16376" table:style-name="ce1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0" table:formula="of:=[.J5]/[.J4]" table:style-name="ce3">
            <text:p>0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1" table:formula="of:=([.J4]-[.J5])/[.J4]" table:style-name="ce3">
            <text:p>1</text:p>
          </table:table-cell>
          <table:table-cell table:style-name="ce3"/>
          <table:table-cell office:value-type="float" office:value="1" table:formula="of:=1/([.B51]/[.C51]+[.D51])" table:style-name="ce3">
            <text:p>1</text:p>
          </table:table-cell>
          <table:table-cell table:style-name="ce10"/>
          <table:table-cell table:style-name="ce3"/>
          <table:table-cell table:number-columns-repeated="16376" table:style-name="ce1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0.33333333333333331" table:formula="of:=[.J7]/[.J6]" table:style-name="ce3">
            <text:p>0,333333333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66666666666666663" table:formula="of:=([.J6]-[.J7])/[.J6]" table:style-name="ce3">
            <text:p>0,666666667</text:p>
          </table:table-cell>
          <table:table-cell table:style-name="ce3"/>
          <table:table-cell office:value-type="float" office:value="1.4998169168802638" table:formula="of:=1/([.B52]/[.C52]+[.D52])" table:style-name="ce3">
            <text:p>1,499816917</text:p>
          </table:table-cell>
          <table:table-cell table:style-name="ce10"/>
          <table:table-cell table:style-name="ce3"/>
          <table:table-cell table:number-columns-repeated="16376" table:style-name="ce1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" table:formula="of:=[.J9]/[.J8]" table:style-name="ce3">
            <text:p>1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" table:formula="of:=([.J8]-[.J9])/[.J8]" table:style-name="ce3">
            <text:p>0</text:p>
          </table:table-cell>
          <table:table-cell table:style-name="ce3"/>
          <table:table-cell office:value-type="float" office:value="4096" table:formula="of:=1/([.B53]/[.C53]+[.D53])" table:style-name="ce3">
            <text:p>4096</text:p>
          </table:table-cell>
          <table:table-cell table:style-name="ce10"/>
          <table:table-cell table:number-columns-repeated="16377" table:style-name="ce3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0.7" table:formula="of:=[.J11]/[.J10]" table:style-name="ce3">
            <text:p>0,7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30000000000000004" table:formula="of:=([.J10]-[.J11])/[.J10]" table:style-name="ce3">
            <text:p>0,3</text:p>
          </table:table-cell>
          <table:table-cell table:style-name="ce3"/>
          <table:table-cell office:value-type="float" office:value="3.3314355429036189" table:formula="of:=1/([.B54]/[.C54]+[.D54])" table:style-name="ce3">
            <text:p>3,331435543</text:p>
          </table:table-cell>
          <table:table-cell table:number-columns-repeated="16378" table:style-name="ce3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0.75" table:formula="of:=[.J13]/[.J12]" table:style-name="ce3">
            <text:p>0,75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25" table:formula="of:=([.J12]-[.J13])/[.J12]" table:style-name="ce3">
            <text:p>0,25</text:p>
          </table:table-cell>
          <table:table-cell table:style-name="ce3"/>
          <table:table-cell office:value-type="float" office:value="3.9970724566967553" table:formula="of:=1/([.B55]/[.C55]+[.D55])" table:style-name="ce3">
            <text:p>3,997072457</text:p>
          </table:table-cell>
          <table:table-cell table:number-columns-repeated="16378" table:style-name="ce3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0.28571428571428575" table:formula="of:=[.J15]/[.J14]" table:style-name="ce3">
            <text:p>0,285714286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7142857142857143" table:formula="of:=([.J14]-[.J15])/[.J14]" table:style-name="ce3">
            <text:p>0,714285714</text:p>
          </table:table-cell>
          <table:table-cell table:style-name="ce3"/>
          <table:table-cell office:value-type="float" office:value="1.3998632946001368" table:formula="of:=1/([.B56]/[.C56]+[.D56])" table:style-name="ce3">
            <text:p>1,399863295</text:p>
          </table:table-cell>
          <table:table-cell table:number-columns-repeated="16378" table:style-name="ce3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0.83333333333333326" table:formula="of:=[.J17]/[.J16]" table:style-name="ce3">
            <text:p>0,833333333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6666666666666674" table:formula="of:=([.J16]-[.J17])/[.J16]" table:style-name="ce3">
            <text:p>0,166666667</text:p>
          </table:table-cell>
          <table:table-cell table:style-name="ce3"/>
          <table:table-cell office:value-type="float" office:value="5.992684711046083" table:formula="of:=1/([.B57]/[.C57]+[.D57])" table:style-name="ce3">
            <text:p>5,992684711</text:p>
          </table:table-cell>
          <table:table-cell table:number-columns-repeated="16378" table:style-name="ce3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0.91304347826086962" table:formula="of:=[.J19]/[.J18]" table:style-name="ce3">
            <text:p>0,913043478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8.6956521739130349E-2" table:formula="of:=([.J18]-[.J19])/[.J18]" table:style-name="ce3">
            <text:p>0,086956522</text:p>
          </table:table-cell>
          <table:table-cell table:style-name="ce3"/>
          <table:table-cell office:value-type="float" office:value="11.470595397540496" table:formula="of:=1/([.B58]/[.C58]+[.D58])" table:style-name="ce3">
            <text:p>11,4705954</text:p>
          </table:table-cell>
          <table:table-cell table:number-columns-repeated="16378" table:style-name="ce3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0.94594594594594572" table:formula="of:=[.J21]/[.J20]" table:style-name="ce3">
            <text:p>0,945945946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5.4054054054054231E-2" table:formula="of:=([.J20]-[.J21])/[.J20]" table:style-name="ce3">
            <text:p>0,054054054</text:p>
          </table:table-cell>
          <table:table-cell table:style-name="ce3"/>
          <table:table-cell office:value-type="float" office:value="18.421295733560168" table:formula="of:=1/([.B59]/[.C59]+[.D59])" table:style-name="ce3">
            <text:p>18,42129573</text:p>
          </table:table-cell>
          <table:table-cell table:number-columns-repeated="16378" table:style-name="ce3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0.83823529411764697" table:formula="of:=[.J23]/[.J22]" table:style-name="ce3">
            <text:p>0,838235294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6176470588235303" table:formula="of:=([.J22]-[.J23])/[.J22]" table:style-name="ce3">
            <text:p>0,161764706</text:p>
          </table:table-cell>
          <table:table-cell table:style-name="ce3"/>
          <table:table-cell office:value-type="float" office:value="6.1740074922971164" table:formula="of:=1/([.B60]/[.C60]+[.D60])" table:style-name="ce3">
            <text:p>6,174007492</text:p>
          </table:table-cell>
          <table:table-cell table:number-columns-repeated="16378" table:style-name="ce3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0.89516129032258052" table:formula="of:=[.J25]/[.J24]" table:style-name="ce3">
            <text:p>0,89516129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0483870967741946" table:formula="of:=([.J24]-[.J25])/[.J24]" table:style-name="ce3">
            <text:p>0,10483871</text:p>
          </table:table-cell>
          <table:table-cell table:style-name="ce3"/>
          <table:table-cell office:value-type="float" office:value="9.5186191645270632" table:formula="of:=1/([.B61]/[.C61]+[.D61])" table:style-name="ce3">
            <text:p>9,518619165</text:p>
          </table:table-cell>
          <table:table-cell table:number-columns-repeated="16378" table:style-name="ce3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0.89494163424124507" table:formula="of:=[.J27]/[.J26]" table:style-name="ce3">
            <text:p>0,894941634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0505836575875488" table:formula="of:=([.J26]-[.J27])/[.J26]" table:style-name="ce3">
            <text:p>0,105058366</text:p>
          </table:table-cell>
          <table:table-cell table:style-name="ce3"/>
          <table:table-cell office:value-type="float" office:value="9.4987637833643124" table:formula="of:=1/([.B62]/[.C62]+[.D62])" table:style-name="ce3">
            <text:p>9,498763783</text:p>
          </table:table-cell>
          <table:table-cell table:number-columns-repeated="16378" table:style-name="ce3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0.9218009478672986" table:formula="of:=[.J29]/[.J28]" table:style-name="ce3">
            <text:p>0,921800948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7.8199052132701397E-2" table:formula="of:=([.J28]-[.J29])/[.J28]" table:style-name="ce3">
            <text:p>0,078199052</text:p>
          </table:table-cell>
          <table:table-cell table:style-name="ce3"/>
          <table:table-cell office:value-type="float" office:value="12.751182159534368" table:formula="of:=1/([.B63]/[.C63]+[.D63])" table:style-name="ce3">
            <text:p>12,75118216</text:p>
          </table:table-cell>
          <table:table-cell table:number-columns-repeated="16378" table:style-name="ce3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0.891891891891892" table:formula="of:=[.J31]/[.J30]" table:style-name="ce3">
            <text:p>0,891891892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0810810810810799" table:formula="of:=([.J30]-[.J31])/[.J30]" table:style-name="ce3">
            <text:p>0,108108108</text:p>
          </table:table-cell>
          <table:table-cell table:style-name="ce3"/>
          <table:table-cell office:value-type="float" office:value="9.2314064689041953" table:formula="of:=1/([.B64]/[.C64]+[.D64])" table:style-name="ce3">
            <text:p>9,231406469</text:p>
          </table:table-cell>
          <table:table-cell table:number-columns-repeated="16378" table:style-name="ce3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.89237288135593218" table:formula="of:=[.J33]/[.J32]" table:style-name="ce3">
            <text:p>0,892372881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0762711864406785" table:formula="of:=([.J32]-[.J33])/[.J32]" table:style-name="ce3">
            <text:p>0,107627119</text:p>
          </table:table-cell>
          <table:table-cell table:style-name="ce3"/>
          <table:table-cell office:value-type="float" office:value="9.2725685618087414" table:formula="of:=1/([.B65]/[.C65]+[.D65])" table:style-name="ce3">
            <text:p>9,272568562</text:p>
          </table:table-cell>
          <table:table-cell table:number-columns-repeated="1637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0.88769059129788019" table:formula="of:=[.J35]/[.J34]" table:style-name="ce3">
            <text:p>0,887690591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1230940870211975" table:formula="of:=([.J34]-[.J35])/[.J34]" table:style-name="ce3">
            <text:p>0,112309409</text:p>
          </table:table-cell>
          <table:table-cell table:style-name="ce3"/>
          <table:table-cell office:value-type="float" office:value="8.8868247727289233" table:formula="of:=1/([.B66]/[.C66]+[.D66])" table:style-name="ce3">
            <text:p>8,886824773</text:p>
          </table:table-cell>
          <table:table-cell table:number-columns-repeated="1637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0.89282103134479252" table:formula="of:=[.J37]/[.J36]" table:style-name="ce3">
            <text:p>0,892821031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0717896865520746" table:formula="of:=([.J36]-[.J37])/[.J36]" table:style-name="ce3">
            <text:p>0,107178969</text:p>
          </table:table-cell>
          <table:table-cell table:style-name="ce3"/>
          <table:table-cell office:value-type="float" office:value="9.3112520370800134" table:formula="of:=1/([.B67]/[.C67]+[.D67])" table:style-name="ce3">
            <text:p>9,311252037</text:p>
          </table:table-cell>
          <table:table-cell table:number-columns-repeated="1637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0.88595683747570841" table:formula="of:=[.J39]/[.J38]" table:style-name="ce3">
            <text:p>0,885956837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1404316252429153" table:formula="of:=([.J38]-[.J39])/[.J38]" table:style-name="ce3">
            <text:p>0,114043163</text:p>
          </table:table-cell>
          <table:table-cell table:style-name="ce3"/>
          <table:table-cell office:value-type="float" office:value="8.7520105111740367" table:formula="of:=1/([.B68]/[.C68]+[.D68])" table:style-name="ce3">
            <text:p>8,752010511</text:p>
          </table:table-cell>
          <table:table-cell table:number-columns-repeated="16378"/>
        </table:table-row>
        <table:table-row table:style-name="ro4">
          <table:table-cell office:value-type="float" office:value="19" table:style-name="ce5">
            <text:p>19</text:p>
          </table:table-cell>
          <table:table-cell office:value-type="float" office:value="0.90548452622774522" table:formula="of:=[.J41]/[.J40]" table:style-name="ce3">
            <text:p>0,905484526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9.4515473772254735E-2" table:formula="of:=([.J40]-[.J41])/[.J40]" table:style-name="ce3">
            <text:p>0,094515474</text:p>
          </table:table-cell>
          <table:table-cell table:style-name="ce3"/>
          <table:table-cell office:value-type="float" office:value="10.555589290762105" table:formula="of:=1/([.B69]/[.C69]+[.D69])" table:style-name="ce3">
            <text:p>10,55558929</text:p>
          </table:table-cell>
          <table:table-cell table:number-columns-repeated="16378"/>
        </table:table-row>
        <table:table-row table:style-name="ro4">
          <table:table-cell office:value-type="float" office:value="20" table:style-name="ce5">
            <text:p>20</text:p>
          </table:table-cell>
          <table:table-cell office:value-type="float" office:value="0.87250206855051027" table:formula="of:=[.J43]/[.J42]" table:style-name="ce3">
            <text:p>0,872502069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2749793144948976" table:formula="of:=([.J42]-[.J43])/[.J42]" table:style-name="ce3">
            <text:p>0,127497931</text:p>
          </table:table-cell>
          <table:table-cell table:style-name="ce3"/>
          <table:table-cell office:value-type="float" office:value="7.8301824698108486" table:formula="of:=1/([.B70]/[.C70]+[.D70])" table:style-name="ce3">
            <text:p>7,83018247</text:p>
          </table:table-cell>
          <table:table-cell table:number-columns-repeated="16378"/>
        </table:table-row>
        <table:table-row table:style-name="ro4">
          <table:table-cell office:value-type="float" office:value="21" table:style-name="ce5">
            <text:p>21</text:p>
          </table:table-cell>
          <table:table-cell office:value-type="float" office:value="0.81063916887025211" table:formula="of:=[.J45]/[.J44]" table:style-name="ce3">
            <text:p>0,810639169</text:p>
          </table:table-cell>
          <table:table-cell office:value-type="float" office:value="4096" table:formula="of:=[.$C$48]" table:style-name="ce3">
            <text:p>4096</text:p>
          </table:table-cell>
          <table:table-cell office:value-type="float" office:value="0.18936083112974789" table:formula="of:=([.J44]-[.J45])/[.J44]" table:style-name="ce3">
            <text:p>0,189360831</text:p>
          </table:table-cell>
          <table:table-cell table:style-name="ce3"/>
          <table:table-cell office:value-type="float" office:value="5.2754095869506266" table:formula="of:=1/([.B71]/[.C71]+[.D71])" table:style-name="ce3">
            <text:p>5,275409587</text:p>
          </table:table-cell>
          <table:table-cell table:number-columns-repeated="16378"/>
        </table:table-row>
        <table:table-row table:style-name="ro4">
          <table:table-cell table:style-name="ce5"/>
          <table:table-cell table:number-columns-repeated="16383" table:style-name="ce3"/>
        </table:table-row>
        <table:table-row table:number-rows-repeated="9" table:style-name="ro2">
          <table:table-cell table:style-name="ce5"/>
          <table:table-cell table:number-columns-repeated="16383" table:style-name="ce3"/>
        </table:table-row>
        <table:table-row table:style-name="ro2">
          <table:table-cell office:value-type="string" table:style-name="ce5">
            <text:p>Baumtiefe [Ebenen]</text:p>
          </table:table-cell>
          <table:table-cell office:value-type="string" table:style-name="ce4">
            <text:p>Beschleunigungsfaktor</text:p>
          </table:table-cell>
          <table:table-cell table:number-columns-repeated="1638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" table:formula="of:=[.F51]" table:style-name="ce3">
            <text:p>1</text:p>
          </table:table-cell>
          <table:table-cell table:number-columns-repeated="1638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.4998169168802638" table:formula="of:=[.F52]" table:style-name="ce3">
            <text:p>1,499816917</text:p>
          </table:table-cell>
          <table:table-cell/>
          <table:table-cell table:style-name="ce3">
            <draw:frame draw:z-index="1" draw:id="id16" draw:style-name="a16" draw:name="Diagramm 1" svg:x="0.00584in" svg:y="0.04464in" svg:width="4.9644in" svg:height="2.66374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4096" table:formula="of:=[.F53]" table:style-name="ce3">
            <text:p>4096</text:p>
          </table:table-cell>
          <table:table-cell table:number-columns-repeated="1638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3.3314355429036189" table:formula="of:=[.F54]" table:style-name="ce3">
            <text:p>3,331435543</text:p>
          </table:table-cell>
          <table:table-cell table:number-columns-repeated="1638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3.9970724566967553" table:formula="of:=[.F55]" table:style-name="ce3">
            <text:p>3,997072457</text:p>
          </table:table-cell>
          <table:table-cell table:number-columns-repeated="1638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.3998632946001368" table:formula="of:=[.F56]" table:style-name="ce3">
            <text:p>1,399863295</text:p>
          </table:table-cell>
          <table:table-cell table:number-columns-repeated="1638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5.992684711046083" table:formula="of:=[.F57]" table:style-name="ce3">
            <text:p>5,992684711</text:p>
          </table:table-cell>
          <table:table-cell table:number-columns-repeated="1638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1.470595397540496" table:formula="of:=[.F58]" table:style-name="ce3">
            <text:p>11,4705954</text:p>
          </table:table-cell>
          <table:table-cell table:number-columns-repeated="1638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8.421295733560168" table:formula="of:=[.F59]" table:style-name="ce3">
            <text:p>18,42129573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6.1740074922971164" table:formula="of:=[.F60]" table:style-name="ce3">
            <text:p>6,174007492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9.5186191645270632" table:formula="of:=[.F61]" table:style-name="ce3">
            <text:p>9,518619165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9.4987637833643124" table:formula="of:=[.F62]" table:style-name="ce3">
            <text:p>9,498763783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2.751182159534368" table:formula="of:=[.F63]" table:style-name="ce3">
            <text:p>12,75118216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9.2314064689041953" table:formula="of:=[.F64]" table:style-name="ce3">
            <text:p>9,231406469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9.2725685618087414" table:formula="of:=[.F65]" table:style-name="ce3">
            <text:p>9,272568562</text:p>
          </table:table-cell>
          <table:table-cell table:number-columns-repeated="16382" table:style-name="ce3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8.8868247727289233" table:formula="of:=[.F66]" table:style-name="ce3">
            <text:p>8,886824773</text:p>
          </table:table-cell>
          <table:table-cell table:style-name="ce3"/>
          <table:table-cell office:value-type="string" table:style-name="ce3">
            <text:p>Beschleunigungsfaktor für verschiedene Baumtiefen</text:p>
          </table:table-cell>
          <table:table-cell table:number-columns-repeated="16380" table:style-name="ce3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9.3112520370800134" table:formula="of:=[.F67]" table:style-name="ce3">
            <text:p>9,311252037</text:p>
          </table:table-cell>
          <table:table-cell table:number-columns-repeated="9" table:style-name="ce3"/>
          <table:table-cell table:style-name="ce10"/>
          <table:table-cell table:number-columns-repeated="1637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8.7520105111740367" table:formula="of:=[.F68]" table:style-name="ce3">
            <text:p>8,752010511</text:p>
          </table:table-cell>
          <table:table-cell table:number-columns-repeated="9" table:style-name="ce3"/>
          <table:table-cell table:style-name="ce10"/>
          <table:table-cell table:number-columns-repeated="1637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0.555589290762105" table:formula="of:=[.F69]" table:style-name="ce3">
            <text:p>10,55558929</text:p>
          </table:table-cell>
          <table:table-cell table:number-columns-repeated="9" table:style-name="ce3"/>
          <table:table-cell table:style-name="ce10"/>
          <table:table-cell table:number-columns-repeated="1637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7.8301824698108486" table:formula="of:=[.F70]" table:style-name="ce3">
            <text:p>7,83018247</text:p>
          </table:table-cell>
          <table:table-cell table:number-columns-repeated="9" table:style-name="ce3"/>
          <table:table-cell table:style-name="ce10"/>
          <table:table-cell table:number-columns-repeated="1637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5.2754095869506266" table:formula="of:=[.F71]" table:style-name="ce3">
            <text:p>5,275409587</text:p>
          </table:table-cell>
          <table:table-cell table:number-columns-repeated="16382" table:style-name="ce3"/>
        </table:table-row>
        <table:table-row table:style-name="ro2">
          <table:table-cell table:style-name="ce5"/>
          <table:table-cell table:number-columns-repeated="16383" table:style-name="ce3"/>
        </table:table-row>
        <table:table-row table:style-name="ro2">
          <table:table-cell office:value-type="string" table:style-name="ce4">
            <text:p>Maximale Beschleunigung</text:p>
          </table:table-cell>
          <table:table-cell table:style-name="ce4"/>
          <table:table-cell table:number-columns-repeated="3" table:style-name="ce3"/>
          <table:table-cell table:number-columns-repeated="2" table:style-name="ce10"/>
          <table:table-cell table:style-name="ce10">
            <draw:frame draw:z-index="2" draw:id="id17" draw:style-name="a17" draw:name="Diagramm 2" svg:x="0.02976in" svg:y="0.11905in" svg:width="3.63095in" svg:height="2.38095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3" table:style-name="ce10"/>
          <table:table-cell table:number-columns-repeated="16373" table:style-name="ce3"/>
        </table:table-row>
        <table:table-row table:style-name="ro2">
          <table:table-cell office:value-type="string" table:style-name="ce4">
            <text:p>P</text:p>
          </table:table-cell>
          <table:table-cell office:value-type="string" table:style-name="ce4">
            <text:p>N</text:p>
          </table:table-cell>
          <table:table-cell office:value-type="string" table:style-name="ce4">
            <text:p>S</text:p>
          </table:table-cell>
          <table:table-cell table:style-name="ce10"/>
          <table:table-cell office:value-type="string" table:style-name="ce4">
            <text:p>N</text:p>
          </table:table-cell>
          <table:table-cell office:value-type="string" table:style-name="ce4">
            <text:p>Faktor</text:p>
          </table:table-cell>
          <table:table-cell table:number-columns-repeated="5" table:style-name="ce10"/>
          <table:table-cell table:number-columns-repeated="16373" table:style-name="ce3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32" table:style-name="ce3">
            <text:p>32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10"/>
          <table:table-cell office:value-type="float" office:value="32" table:style-name="ce4">
            <text:p>32</text:p>
          </table:table-cell>
          <table:table-cell office:value-type="float" office:value="11.959595959595935" table:formula="of:=1/([.A107]/[.B107]+[.C107])" table:style-name="ce3">
            <text:p>11,95959596</text:p>
          </table:table-cell>
          <table:table-cell table:number-columns-repeated="5" table:style-name="ce10"/>
          <table:table-cell table:number-columns-repeated="16373" table:style-name="ce3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64" table:style-name="ce3">
            <text:p>64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10"/>
          <table:table-cell office:value-type="float" office:value="64" table:style-name="ce4">
            <text:p>64</text:p>
          </table:table-cell>
          <table:table-cell office:value-type="float" office:value="14.527607361963152" table:formula="of:=1/([.A108]/[.B108]+[.C108])" table:style-name="ce3">
            <text:p>14,52760736</text:p>
          </table:table-cell>
          <table:table-cell table:number-columns-repeated="5" table:style-name="ce10"/>
          <table:table-cell table:number-columns-repeated="16373" table:style-name="ce3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128" table:style-name="ce3">
            <text:p>128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10"/>
          <table:table-cell office:value-type="float" office:value="128" table:style-name="ce4">
            <text:p>128</text:p>
          </table:table-cell>
          <table:table-cell office:value-type="float" office:value="16.274914089347032" table:formula="of:=1/([.A109]/[.B109]+[.C109])" table:style-name="ce3">
            <text:p>16,27491409</text:p>
          </table:table-cell>
          <table:table-cell table:number-columns-repeated="16378" table:style-name="ce3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256" table:style-name="ce3">
            <text:p>256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3"/>
          <table:table-cell office:value-type="float" office:value="256" table:style-name="ce4">
            <text:p>256</text:p>
          </table:table-cell>
          <table:table-cell office:value-type="float" office:value="17.316270566727553" table:formula="of:=1/([.A110]/[.B110]+[.C110])" table:style-name="ce3">
            <text:p>17,31627057</text:p>
          </table:table-cell>
          <table:table-cell table:number-columns-repeated="16378" table:style-name="ce3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512" table:style-name="ce3">
            <text:p>512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3"/>
          <table:table-cell office:value-type="float" office:value="512" table:style-name="ce4">
            <text:p>512</text:p>
          </table:table-cell>
          <table:table-cell office:value-type="float" office:value="17.888574126534408" table:formula="of:=1/([.A111]/[.B111]+[.C111])" table:style-name="ce3">
            <text:p>17,88857413</text:p>
          </table:table-cell>
          <table:table-cell table:number-columns-repeated="16378" table:style-name="ce3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1024" table:style-name="ce3">
            <text:p>1024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3"/>
          <table:table-cell office:value-type="float" office:value="1024" table:style-name="ce4">
            <text:p>1024</text:p>
          </table:table-cell>
          <table:table-cell office:value-type="float" office:value="18.18915026404219" table:formula="of:=1/([.A112]/[.B112]+[.C112])" table:style-name="ce3">
            <text:p>18,18915026</text:p>
          </table:table-cell>
          <table:table-cell table:number-columns-repeated="16378" table:style-name="ce3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2048" table:style-name="ce3">
            <text:p>2048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3"/>
          <table:table-cell office:value-type="float" office:value="2048" table:style-name="ce4">
            <text:p>2048</text:p>
          </table:table-cell>
          <table:table-cell office:value-type="float" office:value="18.343258290970649" table:formula="of:=1/([.A113]/[.B113]+[.C113])" table:style-name="ce3">
            <text:p>18,34325829</text:p>
          </table:table-cell>
          <table:table-cell table:number-columns-repeated="16378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4096" table:style-name="ce3">
            <text:p>4096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3"/>
          <table:table-cell office:value-type="float" office:value="4096" table:style-name="ce4">
            <text:p>4096</text:p>
          </table:table-cell>
          <table:table-cell office:value-type="float" office:value="18.421295733560168" table:formula="of:=1/([.A114]/[.B114]+[.C114])" table:style-name="ce3">
            <text:p>18,42129573</text:p>
          </table:table-cell>
          <table:table-cell table:number-columns-repeated="16378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8192" table:style-name="ce3">
            <text:p>8192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3"/>
          <table:table-cell office:value-type="float" office:value="8192" table:style-name="ce4">
            <text:p>8192</text:p>
          </table:table-cell>
          <table:table-cell office:value-type="float" office:value="18.460563980753946" table:formula="of:=1/([.A115]/[.B115]+[.C115])" table:style-name="ce3">
            <text:p>18,46056398</text:p>
          </table:table-cell>
          <table:table-cell table:number-columns-repeated="16378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16384" table:style-name="ce3">
            <text:p>16384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3"/>
          <table:table-cell office:value-type="float" office:value="16384" table:style-name="ce4">
            <text:p>16384</text:p>
          </table:table-cell>
          <table:table-cell office:value-type="float" office:value="18.48026095174216" table:formula="of:=1/([.A116]/[.B116]+[.C116])" table:style-name="ce3">
            <text:p>18,48026095</text:p>
          </table:table-cell>
          <table:table-cell table:number-columns-repeated="16378"/>
        </table:table-row>
        <table:table-row table:style-name="ro2">
          <table:table-cell office:value-type="float" office:value="0.94594594594594572" table:formula="of:=[.B59]" table:style-name="ce3">
            <text:p>0,945945946</text:p>
          </table:table-cell>
          <table:table-cell office:value-type="float" office:value="32768" table:style-name="ce3">
            <text:p>32768</text:p>
          </table:table-cell>
          <table:table-cell office:value-type="float" office:value="5.4054054054054231E-2" table:formula="of:=[.D59]" table:style-name="ce3">
            <text:p>0,054054054</text:p>
          </table:table-cell>
          <table:table-cell table:style-name="ce3"/>
          <table:table-cell office:value-type="float" office:value="32768" table:style-name="ce4">
            <text:p>32768</text:p>
          </table:table-cell>
          <table:table-cell office:value-type="float" office:value="18.490125207789969" table:formula="of:=1/([.A117]/[.B117]+[.C117])" table:style-name="ce3">
            <text:p>18,49012521</text:p>
          </table:table-cell>
          <table:table-cell table:number-columns-repeated="16378"/>
        </table:table-row>
        <table:table-row table:number-rows-repeated="3" table:style-name="ro2">
          <table:table-cell table:style-name="ce5"/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number-rows-repeated="7" table:style-name="ro2">
          <table:table-cell table:style-name="ce5"/>
          <table:table-cell table:number-columns-repeated="16383" table:style-name="ce3"/>
        </table:table-row>
        <table:table-row table:number-rows-repeated="104844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ptos Narrow" svg:font-family="&quot;Aptos Narrow&quot;"/>
    <style:font-face style:name="Liberation Sans" svg:font-family="&quot;Liberation Sans&quot;"/>
    <style:font-face style:name="Arial Unicode MS" svg:font-family="&quot;Arial Unicode M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ptos Narrow" style:font-name-asian="Aptos Narrow" style:font-name-complex="Aptos Narrow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ptos Narrow" style:font-name-asian="Aptos Narrow" style:font-name-complex="Aptos Narrow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Aptos Narrow" style:font-name-asian="Aptos Narrow" style:font-name-complex="Aptos Narrow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Aptos Narrow" style:font-name-asian="Aptos Narrow" style:font-name-complex="Aptos Narrow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Aptos Narrow" style:font-name-asian="Aptos Narrow" style:font-name-complex="Aptos Narrow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Aptos Narrow" style:font-name-asian="Aptos Narrow" style:font-name-complex="Aptos Narrow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Aptos Narrow" style:font-name-asian="Aptos Narrow" style:font-name-complex="Aptos Narrow" style:font-family-generic="swiss"/>
    </style:style>
    <style:style style:name="Heading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Aptos Narrow" style:font-name-asian="Aptos Narrow" style:font-name-complex="Aptos Narrow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Aptos Narrow" style:font-name-asian="Aptos Narrow" style:font-name-complex="Aptos Narrow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Aptos Narrow" style:font-name-asian="Aptos Narrow" style:font-name-complex="Aptos Narrow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Aptos Narrow" style:font-name-asian="Aptos Narrow" style:font-name-complex="Aptos Narrow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-X="1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-X="1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4">
      <style:page-layout-properties fo:margin-top="0.3in" fo:margin-bottom="0.3in" fo:margin-left="0.25in" fo:margin-right="0.25in" style:print-orientation="landscape" style:print-page-order="ttb" style:first-page-number="continue" style:scale-to-X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Tomke Velten</meta:initial-creator>
    <dc:creator>Tomke Velten</dc:creator>
    <meta:creation-date>2026-01-31T11:00:25Z</meta:creation-date>
    <dc:date>2026-02-05T13:19:46Z</dc:date>
    <meta:print-date>2026-02-05T13:19:26Z</meta:print-date>
    <meta:editing-cycles>2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4.6622047244094pt" svg:width="292.0586614173228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uildtime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Parallel_OCL.$A$69:.$A$77"/>
          </chart:axis>
          <chart:series chart:label-cell-address="Parallel_OCL.$B$68" chart:values-cell-range-address="Parallel_OCL.$B$69:.$B$77" chart:class="chart:line" chart:attached-axis="primary-y" chart:style-name="G0S0">
            <chart:data-point chart:repeated="9"/>
          </chart:series>
          <chart:series chart:label-cell-address="Parallel_OCL.$C$68" chart:values-cell-range-address="Parallel_OCL.$C$69:.$C$77" chart:class="chart:line" chart:attached-axis="primary-y" chart:style-name="G0S1">
            <chart:data-point chart:repeated="9"/>
          </chart:series>
          <chart:series chart:label-cell-address="Parallel_OCL.$D$68" chart:values-cell-range-address="Parallel_OCL.$D$69:.$D$77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8.837874015748pt" svg:width="393.364015748031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68:.$A$71"/>
          </chart:axis>
          <chart:series chart:label-cell-address="Vergleiche.$B$67" chart:values-cell-range-address="Vergleiche.$B$68:.$B$71" chart:class="chart:line" chart:attached-axis="primary-y" chart:style-name="G0S0">
            <chart:data-point chart:repeated="4"/>
          </chart:series>
          <chart:series chart:label-cell-address="Vergleiche.$C$67" chart:values-cell-range-address="Vergleiche.$C$68:.$C$71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e9713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7.3640157480315pt" svg:width="400.875826771653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76:.$A$84"/>
          </chart:axis>
          <chart:series chart:label-cell-address="Vergleiche.$B$75" chart:values-cell-range-address="Vergleiche.$B$76:.$B$84" chart:class="chart:line" chart:attached-axis="primary-y" chart:style-name="G0S0">
            <chart:data-point chart:repeated="9"/>
          </chart:series>
          <chart:series chart:label-cell-address="Vergleiche.$C$75" chart:values-cell-range-address="Vergleiche.$C$76:.$C$84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91.6222047244094pt" svg:width="245.253543307086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91:.$A$95"/>
          </chart:axis>
          <chart:series chart:label-cell-address="Vergleiche.$B$90" chart:values-cell-range-address="Vergleiche.$B$91:.$B$95" chart:class="chart:line" chart:attached-axis="primary-y" chart:style-name="G0S0">
            <chart:data-point chart:repeated="5"/>
          </chart:series>
          <chart:series chart:label-cell-address="Vergleiche.$C$90" chart:values-cell-range-address="Vergleiche.$C$91:.$C$95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91.6222047244094pt" svg:width="396.737244094488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97:.$A$100"/>
          </chart:axis>
          <chart:series chart:label-cell-address="Vergleiche.$B$96" chart:values-cell-range-address="Vergleiche.$B$97:.$B$100" chart:class="chart:line" chart:attached-axis="primary-y" chart:style-name="G0S0">
            <chart:data-point chart:repeated="4"/>
          </chart:series>
          <chart:series chart:label-cell-address="Vergleiche.$C$96" chart:values-cell-range-address="Vergleiche.$C$97:.$C$100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89.3822834645669pt" svg:width="246.756220472441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105:.$A$109"/>
          </chart:axis>
          <chart:series chart:label-cell-address="Vergleiche.$B$104" chart:values-cell-range-address="Vergleiche.$B$105:.$B$109" chart:class="chart:line" chart:attached-axis="primary-y" chart:style-name="G0S0">
            <chart:data-point chart:repeated="5"/>
          </chart:series>
          <chart:series chart:label-cell-address="Vergleiche.$C$104" chart:values-cell-range-address="Vergleiche.$C$105:.$C$109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91.2535433070866pt" svg:width="391.861417322834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111:.$A$114"/>
          </chart:axis>
          <chart:series chart:label-cell-address="Vergleiche.$B$110" chart:values-cell-range-address="Vergleiche.$B$111:.$B$114" chart:class="chart:line" chart:attached-axis="primary-y" chart:style-name="G0S0">
            <chart:data-point chart:repeated="4"/>
          </chart:series>
          <chart:series chart:label-cell-address="Vergleiche.$C$110" chart:values-cell-range-address="Vergleiche.$C$111:.$C$114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e9713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92.3875590551181pt" svg:width="403.115039370078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119:.$A$127"/>
          </chart:axis>
          <chart:series chart:label-cell-address="Vergleiche.$B$118" chart:values-cell-range-address="Vergleiche.$B$119:.$B$127" chart:class="chart:line" chart:attached-axis="primary-y" chart:style-name="G0S0">
            <chart:data-point chart:repeated="9"/>
          </chart:series>
          <chart:series chart:label-cell-address="Vergleiche.$C$118" chart:values-cell-range-address="Vergleiche.$C$119:.$C$127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91.7892913385827pt" svg:width="357.4369291338582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schleunigungsfakto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Amdahls_Law.$A$86:.$A$103"/>
          </chart:axis>
          <chart:series chart:label-cell-address="Amdahls_Law.$B$82" chart:values-cell-range-address="Amdahls_Law.$B$86:.$B$103" chart:class="chart:line" chart:attached-axis="primary-y" chart:style-name="G0S0">
            <chart:data-point chart:repeated="18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1.4285826771654pt" svg:width="261.4285039370079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schleunigungsfakto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GPU-Cores</text:p>
            </chart:title>
            <chart:grid chart:class="major" chart:style-name="GMa1"/>
          </chart:axis>
          <chart:series chart:label-cell-address="Amdahls_Law.$F$106" chart:values-cell-range-address="Amdahls_Law.$F$107:.$F$117" chart:class="chart:scatter" chart:attached-axis="primary-y" chart:style-name="G0S0">
            <chart:domain table:cell-range-address="Amdahls_Law.$E$107:.$E$117"/>
            <chart:data-point chart:repeated="11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5.0111023622047pt" svg:width="244.488188976378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5:.$A$9"/>
          </chart:axis>
          <chart:series chart:label-cell-address="Vergleiche.$B$4" chart:values-cell-range-address="Vergleiche.$B$5:.$B$9" chart:class="chart:line" chart:attached-axis="primary-y" chart:style-name="G0S0">
            <chart:data-point chart:repeated="5"/>
          </chart:series>
          <chart:series chart:label-cell-address="Vergleiche.$C$4" chart:values-cell-range-address="Vergleiche.$C$5:.$C$9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5.124094488189pt" svg:width="382.507165354330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11:.$A$14"/>
          </chart:axis>
          <chart:series chart:label-cell-address="Vergleiche.$B$10" chart:values-cell-range-address="Vergleiche.$B$11:.$B$14" chart:class="chart:line" chart:attached-axis="primary-y" chart:style-name="G0S0">
            <chart:data-point chart:repeated="4"/>
          </chart:series>
          <chart:series chart:label-cell-address="Vergleiche.$C$10" chart:values-cell-range-address="Vergleiche.$C$11:.$C$14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7.9025984251969pt" svg:width="247.4927559055118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19:.$A$23"/>
          </chart:axis>
          <chart:series chart:label-cell-address="Vergleiche.$B$18" chart:values-cell-range-address="Vergleiche.$B$19:.$B$23" chart:class="chart:line" chart:attached-axis="primary-y" chart:style-name="G0S0">
            <chart:data-point chart:repeated="5"/>
          </chart:series>
          <chart:series chart:label-cell-address="Vergleiche.$C$18" chart:values-cell-range-address="Vergleiche.$C$19:.$C$23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8.6679527559055pt" svg:width="381.004488188976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25:.$A$28"/>
          </chart:axis>
          <chart:series chart:label-cell-address="Vergleiche.$B$24" chart:values-cell-range-address="Vergleiche.$B$25:.$B$28" chart:class="chart:line" chart:attached-axis="primary-y" chart:style-name="G0S0">
            <chart:data-point chart:repeated="4"/>
          </chart:series>
          <chart:series chart:label-cell-address="Vergleiche.$C$24" chart:values-cell-range-address="Vergleiche.$C$25:.$C$28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e9713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80.028031496063pt" svg:width="388.4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33:.$A$41"/>
          </chart:axis>
          <chart:series chart:label-cell-address="Vergleiche.$B$32" chart:values-cell-range-address="Vergleiche.$B$33:.$B$41" chart:class="chart:line" chart:attached-axis="primary-y" chart:style-name="G0S0">
            <chart:data-point chart:repeated="9"/>
          </chart:series>
          <chart:series chart:label-cell-address="Vergleiche.$C$32" chart:values-cell-range-address="Vergleiche.$C$33:.$C$41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6.6267716535433pt" svg:width="246.756220472441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48:.$A$52"/>
          </chart:axis>
          <chart:series chart:label-cell-address="Vergleiche.$B$47" chart:values-cell-range-address="Vergleiche.$B$48:.$B$52" chart:class="chart:line" chart:attached-axis="primary-y" chart:style-name="G0S0">
            <chart:data-point chart:repeated="5"/>
          </chart:series>
          <chart:series chart:label-cell-address="Vergleiche.$C$47" chart:values-cell-range-address="Vergleiche.$C$48:.$C$52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7.3352755905512pt" svg:width="385.51173228346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54:.$A$57"/>
          </chart:axis>
          <chart:series chart:label-cell-address="Vergleiche.$B$53" chart:values-cell-range-address="Vergleiche.$B$54:.$B$57" chart:class="chart:line" chart:attached-axis="primary-y" chart:style-name="G0S0">
            <chart:data-point chart:repeated="4"/>
          </chart:series>
          <chart:series chart:label-cell-address="Vergleiche.$C$53" chart:values-cell-range-address="Vergleiche.$C$54:.$C$57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8.1293700787402pt" svg:width="244.1195275590551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Sek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aumtiefe [Ebenen]</text:p>
            </chart:title>
            <chart:categories table:cell-range-address="Vergleiche.$A$62:.$A$66"/>
          </chart:axis>
          <chart:series chart:label-cell-address="Vergleiche.$B$61" chart:values-cell-range-address="Vergleiche.$B$62:.$B$66" chart:class="chart:line" chart:attached-axis="primary-y" chart:style-name="G0S0">
            <chart:data-point chart:repeated="5"/>
          </chart:series>
          <chart:series chart:label-cell-address="Vergleiche.$C$61" chart:values-cell-range-address="Vergleiche.$C$62:.$C$6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