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peicherverbrauch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benen</text:p>
          </table:table-cell>
          <table:table-cell office:value-type="string" table:style-name="ce1">
            <text:p>Würfel</text:p>
          </table:table-cell>
          <table:table-cell table:style-name="ce1"/>
          <table:table-cell office:value-type="string" table:style-name="ce1">
            <text:p>2^n - 1</text:p>
          </table:table-cell>
          <table:table-cell/>
          <table:table-cell table:style-name="ce1">
            <draw:frame draw:z-index="1" draw:id="id0" draw:style-name="a0" draw:name="Diagramm 6" svg:x="0.06771in" svg:y="0.02604in" svg:width="4.25521in" svg:height="2.39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formula="of:= (2^[.A4])-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formula="of:= (2^[.A5])-1" table:style-name="ce1">
            <text:p>3</text:p>
          </table:table-cell>
          <table:table-cell table:style-name="ce1"/>
          <table:table-cell office:value-type="string" table:style-name="ce1">
            <text:p>1+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formula="of:= (2^[.A6])-1" table:style-name="ce1">
            <text:p>7</text:p>
          </table:table-cell>
          <table:table-cell table:style-name="ce1"/>
          <table:table-cell office:value-type="string" table:style-name="ce1">
            <text:p>1+2+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formula="of:= (2^[.A7])-1" table:style-name="ce1">
            <text:p>15</text:p>
          </table:table-cell>
          <table:table-cell table:style-name="ce1"/>
          <table:table-cell office:value-type="string" table:style-name="ce1">
            <text:p>1+2+4+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formula="of:= (2^[.A8])-1" table:style-name="ce1">
            <text:p>31</text:p>
          </table:table-cell>
          <table:table-cell table:style-name="ce1"/>
          <table:table-cell office:value-type="string" table:style-name="ce1">
            <text:p>1+2+4+8+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formula="of:= (2^[.A9])-1" table:style-name="ce1">
            <text:p>63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7" table:formula="of:= (2^[.A10])-1" table:style-name="ce1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5" table:formula="of:= (2^[.A11])-1" table:style-name="ce1">
            <text:p>255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1" table:formula="of:= (2^[.A12])-1" table:style-name="ce1">
            <text:p>511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3" table:formula="of:= (2^[.A13])-1" table:style-name="ce1">
            <text:p>1023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47" table:formula="of:= (2^[.A14])-1" table:style-name="ce1">
            <text:p>2047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95" table:formula="of:= (2^[.A15])-1" table:style-name="ce1">
            <text:p>4095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91" table:formula="of:= (2^[.A16])-1" table:style-name="ce1">
            <text:p>8191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383" table:formula="of:= (2^[.A17])-1" table:style-name="ce1">
            <text:p>16383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767" table:formula="of:= (2^[.A18])-1" table:style-name="ce1">
            <text:p>32767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535" table:formula="of:= (2^[.A19])-1" table:style-name="ce1">
            <text:p>65535</text:p>
          </table:table-cell>
          <table:table-cell table:number-columns-repeated="1638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1071" table:formula="of:= (2^[.A20])-1" table:style-name="ce1">
            <text:p>131071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2143" table:formula="of:= (2^[.A21])-1" table:style-name="ce1">
            <text:p>262143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4287" table:formula="of:= (2^[.A22])-1" table:style-name="ce1">
            <text:p>524287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48575" table:formula="of:= (2^[.A23])-1" table:style-name="ce1">
            <text:p>1048575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97151" table:formula="of:= (2^[.A24])-1" table:style-name="ce1">
            <text:p>2097151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94303" table:formula="of:= (2^[.A25])-1" table:style-name="ce1">
            <text:p>4194303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88607" table:formula="of:= (2^[.A26])-1" table:style-name="ce1">
            <text:p>8388607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777215" table:formula="of:= (2^[.A27])-1" table:style-name="ce1">
            <text:p>16777215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554431" table:formula="of:= (2^[.A28])-1" table:style-name="ce1">
            <text:p>33554431</text:p>
          </table:table-cell>
          <table:table-cell table:style-name="ce1"/>
          <table:table-cell office:value-type="string" table:style-name="ce1">
            <text:p>Byte pro Cuboid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296" table:style-name="ce1">
            <text:p>29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benen</text:p>
          </table:table-cell>
          <table:table-cell office:value-type="string" table:style-name="ce1">
            <text:p>Speicherplatzbedarf (B)</text:p>
          </table:table-cell>
          <table:table-cell table:style-name="ce1"/>
          <table:table-cell office:value-type="string" table:style-name="ce1">
            <text:p>Ebenen</text:p>
          </table:table-cell>
          <table:table-cell office:value-type="string" table:style-name="ce1">
            <text:p>Speicherplatzbedarf (kB)</text:p>
          </table:table-cell>
          <table:table-cell table:style-name="ce1"/>
          <table:table-cell office:value-type="string" table:style-name="ce1">
            <text:p>Ebenen</text:p>
          </table:table-cell>
          <table:table-cell office:value-type="string" table:style-name="ce1">
            <text:p>Speicherplatzbedarf (MB)</text:p>
          </table:table-cell>
          <table:table-cell table:style-name="ce1"/>
          <table:table-cell office:value-type="string" table:style-name="ce1">
            <text:p>Ebenen</text:p>
          </table:table-cell>
          <table:table-cell office:value-type="string" table:style-name="ce1">
            <text:p>Speicherplatzbedarf (GB)</text:p>
          </table:table-cell>
          <table:table-cell table:number-columns-repeated="2"/>
          <table:table-cell table:style-name="ce1">
            <draw:frame draw:z-index="2" draw:id="id1" draw:style-name="a1" draw:name="Diagramm 7" svg:x="0.03646in" svg:y="0.0260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6" table:formula="of:=[.B4]*[.$D$29]" table:style-name="ce1">
            <text:p>2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29599999999999999" table:formula="of:=[.B32]/1000" table:style-name="ce1">
            <text:p>0,2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.9599999999999998E-4" table:formula="of:=[.E32]/1000" table:style-name="ce1">
            <text:p>0,0002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.96E-7" table:formula="of:=[.H32]/1000" table:style-name="ce1">
            <text:p>0,00000029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8" table:formula="of:=[.B5]*[.$D$29]" table:style-name="ce1">
            <text:p>88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88800000000000001" table:formula="of:=[.B33]/1000" table:style-name="ce1">
            <text:p>0,88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.8800000000000001E-4" table:formula="of:=[.E33]/1000" table:style-name="ce1">
            <text:p>0,00088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.8800000000000001E-7" table:formula="of:=[.H33]/1000" table:style-name="ce1">
            <text:p>0,000000888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72" table:formula="of:=[.B6]*[.$D$29]" table:style-name="ce1">
            <text:p>20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0720000000000001" table:formula="of:=[.B34]/1000" table:style-name="ce1">
            <text:p>2,0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0720000000000001E-3" table:formula="of:=[.E34]/1000" table:style-name="ce1">
            <text:p>0,0020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0720000000000002E-6" table:formula="of:=[.H34]/1000" table:style-name="ce1">
            <text:p>0,00000207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40" table:formula="of:=[.B7]*[.$D$29]" table:style-name="ce1">
            <text:p>444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4400000000000004" table:formula="of:=[.B35]/1000" table:style-name="ce1">
            <text:p>4,4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4400000000000004E-3" table:formula="of:=[.E35]/1000" table:style-name="ce1">
            <text:p>0,0044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4400000000000007E-6" table:formula="of:=[.H35]/1000" table:style-name="ce1">
            <text:p>0,00000444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176" table:formula="of:=[.B8]*[.$D$29]" table:style-name="ce1">
            <text:p>917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.1760000000000002" table:formula="of:=[.B36]/1000" table:style-name="ce1">
            <text:p>9,17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.1760000000000001E-3" table:formula="of:=[.E36]/1000" table:style-name="ce1">
            <text:p>0,00917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.1759999999999999E-6" table:formula="of:=[.H36]/1000" table:style-name="ce1">
            <text:p>0,000009176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648" table:formula="of:=[.B9]*[.$D$29]" table:style-name="ce1">
            <text:p>1864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8.648" table:formula="of:=[.B37]/1000" table:style-name="ce1">
            <text:p>18,64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8648000000000001E-2" table:formula="of:=[.E37]/1000" table:style-name="ce1">
            <text:p>0,01864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8648000000000002E-5" table:formula="of:=[.H37]/1000" table:style-name="ce1">
            <text:p>0,000018648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592" table:formula="of:=[.B10]*[.$D$29]" table:style-name="ce1">
            <text:p>3759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7.591999999999999" table:formula="of:=[.B38]/1000" table:style-name="ce1">
            <text:p>37,59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.7592E-2" table:formula="of:=[.E38]/1000" table:style-name="ce1">
            <text:p>0,03759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.7592000000000002E-5" table:formula="of:=[.H38]/1000" table:style-name="ce1">
            <text:p>0,000037592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5480" table:formula="of:=[.B11]*[.$D$29]" table:style-name="ce1">
            <text:p>7548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5.48" table:formula="of:=[.B39]/1000" table:style-name="ce1">
            <text:p>75,4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.5480000000000005E-2" table:formula="of:=[.E39]/1000" table:style-name="ce1">
            <text:p>0,0754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.5480000000000002E-5" table:formula="of:=[.H39]/1000" table:style-name="ce1">
            <text:p>0,00007548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1256" table:formula="of:=[.B12]*[.$D$29]" table:style-name="ce1">
            <text:p>15125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51.256" table:formula="of:=[.B40]/1000" table:style-name="ce1">
            <text:p>151,25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151256" table:formula="of:=[.E40]/1000" table:style-name="ce1">
            <text:p>0,15125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51256E-4" table:formula="of:=[.H40]/1000" table:style-name="ce1">
            <text:p>0,000151256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2808" table:formula="of:=[.B13]*[.$D$29]" table:style-name="ce1">
            <text:p>30280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02.80799999999999" table:formula="of:=[.B41]/1000" table:style-name="ce1">
            <text:p>302,80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0280799999999997" table:formula="of:=[.E41]/1000" table:style-name="ce1">
            <text:p>0,30280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0280799999999995E-4" table:formula="of:=[.H41]/1000" table:style-name="ce1">
            <text:p>0,000302808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05912" table:formula="of:=[.B14]*[.$D$29]" table:style-name="ce1">
            <text:p>60591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05.91200000000003" table:formula="of:=[.B42]/1000" table:style-name="ce1">
            <text:p>605,91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60591200000000001" table:formula="of:=[.E42]/1000" table:style-name="ce1">
            <text:p>0,60591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.0591200000000001E-4" table:formula="of:=[.H42]/1000" table:style-name="ce1">
            <text:p>0,000605912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2120" table:formula="of:=[.B15]*[.$D$29]" table:style-name="ce1">
            <text:p>121212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12.1199999999999" table:formula="of:=[.B43]/1000" table:style-name="ce1">
            <text:p>1212,1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121199999999999" table:formula="of:=[.E43]/1000" table:style-name="ce1">
            <text:p>1,2121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121199999999999E-3" table:formula="of:=[.H43]/1000" table:style-name="ce1">
            <text:p>0,00121212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24536" table:formula="of:=[.B16]*[.$D$29]" table:style-name="ce1">
            <text:p>242453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424.5360000000001" table:formula="of:=[.B44]/1000" table:style-name="ce1">
            <text:p>2424,53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.4245360000000002" table:formula="of:=[.E44]/1000" table:style-name="ce1">
            <text:p>2,42453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.4245360000000001E-3" table:formula="of:=[.H44]/1000" table:style-name="ce1">
            <text:p>0,002424536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49368" table:formula="of:=[.B17]*[.$D$29]" table:style-name="ce1">
            <text:p>484936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849.3680000000004" table:formula="of:=[.B45]/1000" table:style-name="ce1">
            <text:p>4849,36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.8493680000000001" table:formula="of:=[.E45]/1000" table:style-name="ce1">
            <text:p>4,84936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.8493679999999997E-3" table:formula="of:=[.H45]/1000" table:style-name="ce1">
            <text:p>0,004849368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99032" table:formula="of:=[.B18]*[.$D$29]" table:style-name="ce1">
            <text:p>96990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699.0319999999992" table:formula="of:=[.B46]/1000" table:style-name="ce1">
            <text:p>9699,0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.699031999999999" table:formula="of:=[.E46]/1000" table:style-name="ce1">
            <text:p>9,6990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.6990319999999998E-3" table:formula="of:=[.H46]/1000" table:style-name="ce1">
            <text:p>0,009699032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398360" table:formula="of:=[.B19]*[.$D$29]" table:style-name="ce1">
            <text:p>1939836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9398.36" table:formula="of:=[.B47]/1000" table:style-name="ce1">
            <text:p>19398,3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9.39836" table:formula="of:=[.E47]/1000" table:style-name="ce1">
            <text:p>19,3983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939836E-2" table:formula="of:=[.H47]/1000" table:style-name="ce1">
            <text:p>0,01939836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797016" table:formula="of:=[.B20]*[.$D$29]" table:style-name="ce1">
            <text:p>387970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8797.016000000003" table:formula="of:=[.B48]/1000" table:style-name="ce1">
            <text:p>38797,0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8.797016000000006" table:formula="of:=[.E48]/1000" table:style-name="ce1">
            <text:p>38,7970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.8797016000000004E-2" table:formula="of:=[.H48]/1000" table:style-name="ce1">
            <text:p>0,038797016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594328" table:formula="of:=[.B21]*[.$D$29]" table:style-name="ce1">
            <text:p>7759432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7594.327999999994" table:formula="of:=[.B49]/1000" table:style-name="ce1">
            <text:p>77594,32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7.59432799999999" table:formula="of:=[.E49]/1000" table:style-name="ce1">
            <text:p>77,59432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.759432799999999E-2" table:formula="of:=[.H49]/1000" table:style-name="ce1">
            <text:p>0,077594328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5188952" table:formula="of:=[.B22]*[.$D$29]" table:style-name="ce1">
            <text:p>15518895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5188.95199999999" table:formula="of:=[.B50]/1000" table:style-name="ce1">
            <text:p>155188,95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5.188952" table:formula="of:=[.E50]/1000" table:style-name="ce1">
            <text:p>155,18895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.15518895199999999" table:formula="of:=[.H50]/1000" table:style-name="ce1">
            <text:p>0,155188952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0378200" table:formula="of:=[.B23]*[.$D$29]" table:style-name="ce1">
            <text:p>31037820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10378.2" table:formula="of:=[.B51]/1000" table:style-name="ce1">
            <text:p>310378,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10.37819999999999" table:formula="of:=[.E51]/1000" table:style-name="ce1">
            <text:p>310,378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31037819999999999" table:formula="of:=[.H51]/1000" table:style-name="ce1">
            <text:p>0,3103782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0756696" table:formula="of:=[.B24]*[.$D$29]" table:style-name="ce1">
            <text:p>6207566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20756.696" table:formula="of:=[.B52]/1000" table:style-name="ce1">
            <text:p>620756,6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20.75669600000003" table:formula="of:=[.E52]/1000" table:style-name="ce1">
            <text:p>620,7566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.62075669600000005" table:formula="of:=[.H52]/1000" table:style-name="ce1">
            <text:p>0,620756696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41513688" table:formula="of:=[.B25]*[.$D$29]" table:style-name="ce1">
            <text:p>124151368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241513.6880000001" table:formula="of:=[.B53]/1000" table:style-name="ce1">
            <text:p>1241513,68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241.513688" table:formula="of:=[.E53]/1000" table:style-name="ce1">
            <text:p>1241,51368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.2415136879999999" table:formula="of:=[.H53]/1000" table:style-name="ce1">
            <text:p>1,241513688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83027672" table:formula="of:=[.B26]*[.$D$29]" table:style-name="ce1">
            <text:p>248302767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83027.6719999998" table:formula="of:=[.B54]/1000" table:style-name="ce1">
            <text:p>2483027,67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83.0276719999997" table:formula="of:=[.E54]/1000" table:style-name="ce1">
            <text:p>2483,02767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4830276719999995" table:formula="of:=[.H54]/1000" table:style-name="ce1">
            <text:p>2,483027672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66055640" table:formula="of:=[.B27]*[.$D$29]" table:style-name="ce1">
            <text:p>496605564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966055.6399999997" table:formula="of:=[.B55]/1000" table:style-name="ce1">
            <text:p>4966055,6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966.0556399999996" table:formula="of:=[.E55]/1000" table:style-name="ce1">
            <text:p>4966,0556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.9660556399999995" table:formula="of:=[.H55]/1000" table:style-name="ce1">
            <text:p>4,96605564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932111576" table:formula="of:=[.B28]*[.$D$29]" table:style-name="ce1">
            <text:p>993211157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932111.5759999994" table:formula="of:=[.B56]/1000" table:style-name="ce1">
            <text:p>9932111,57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932.1115759999993" table:formula="of:=[.E56]/1000" table:style-name="ce1">
            <text:p>9932,11157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.9321115759999987" table:formula="of:=[.H56]/1000" table:style-name="ce1">
            <text:p>9,932111576</text:p>
          </table:table-cell>
          <table:table-cell table:number-columns-repeated="16373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Tomke Velten</meta:initial-creator>
    <dc:creator>Tomke Velten</dc:creator>
    <meta:creation-date>2026-01-30T18:22:01Z</meta:creation-date>
    <dc:date>2026-02-01T14:37:5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2.1250393700788pt" svg:width="306.3750393700788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Baumtiefe [Ebenen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Anzahl Quader</text:p>
            </chart:title>
            <chart:grid chart:class="major" chart:style-name="GMa1"/>
          </chart:axis>
          <chart:series chart:values-cell-range-address="Tabelle1.$B$4:.$B$28" chart:class="chart:scatter" chart:attached-axis="primary-y" chart:style-name="G0S0">
            <chart:domain table:cell-range-address="Tabelle1.$A$4:.$A$28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Baumtiefe [Ebenen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Speicherbedarf [MB]</text:p>
            </chart:title>
            <chart:grid chart:class="major" chart:style-name="GMa1"/>
          </chart:axis>
          <chart:series chart:values-cell-range-address="Tabelle1.$H$32:.$H$56" chart:class="chart:scatter" chart:attached-axis="primary-y" chart:style-name="G0S0">
            <chart:domain table:cell-range-address="Tabelle1.$G$32:.$G$56"/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